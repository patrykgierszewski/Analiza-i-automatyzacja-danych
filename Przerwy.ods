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Impact" svg:font-family="Impac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center"/>
    </style:style>
    <style:style style:name="ce4" style:family="table-cell" style:parent-style-name="Note" style:data-style-name="N0">
      <style:table-cell-properties fo:border="thin solid #B2B2B2" fo:background-color="#FFFFCC"/>
    </style:style>
    <style:style style:name="ce5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center"/>
      <style:text-properties style:font-name="Impact" style:font-name-asian="Impact" style:font-name-complex="Impact"/>
    </style:style>
    <style:style style:name="ce6" style:family="table-cell" style:parent-style-name="Note" style:data-style-name="N0">
      <style:table-cell-properties fo:border="thin solid #B2B2B2" fo:background-color="#FFFFCC"/>
      <style:text-properties style:font-name="Impact" style:font-name-asian="Impact" style:font-name-complex="Impact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9" style:family="table-cell" style:parent-style-name="Calculation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e10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4.25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Note" style:data-style-name="N0">
      <style:table-cell-properties fo:border="thin solid #B2B2B2" fo:background-color="#FFFFCC"/>
      <style:map style:condition="of:is-true-formula(NOT(ISERROR(SEARCH(&quot;Wyjście&quot;;[.D4]))))" style:apply-style-name="cf1" style:base-cell-address="Sheet1.D4"/>
    </style:style>
    <style:style style:name="ce12" style:family="table-cell" style:parent-style-name="Default" style:data-style-name="N0">
      <style:map style:condition="of:is-true-formula(NOT(ISERROR(SEARCH(&quot;Wyjście&quot;;[.D4]))))" style:apply-style-name="cf1" style:base-cell-address="Sheet1.D4"/>
    </style:style>
    <style:style style:name="ce13" style:family="table-cell">
      <style:map style:condition="of:is-true-formula(NOT(ISERROR(SEARCH(&quot;Wyjście&quot;;[.D4]))))" style:apply-style-name="cf1" style:base-cell-address="Sheet1.D4"/>
    </style:style>
    <style:style style:name="ce14" style:family="table-cell" style:parent-style-name="Note" style:data-style-name="N0">
      <style:table-cell-properties fo:border="thin solid #B2B2B2" fo:background-color="#FFFFCC"/>
      <style:map style:condition="of:is-true-formula(NOT(ISERROR(SEARCH(&quot;Wejście&quot;;[.E4]))))" style:apply-style-name="cf2" style:base-cell-address="Sheet1.E4"/>
      <style:map style:condition="of:is-true-formula(NOT(ISERROR(SEARCH(&quot;Przyjście&quot;;[.E4]))))" style:apply-style-name="cf2" style:base-cell-address="Sheet1.E4"/>
    </style:style>
    <style:style style:name="ce15" style:family="table-cell" style:parent-style-name="Default" style:data-style-name="N0">
      <style:map style:condition="of:is-true-formula(NOT(ISERROR(SEARCH(&quot;Wejście&quot;;[.E4]))))" style:apply-style-name="cf2" style:base-cell-address="Sheet1.E4"/>
      <style:map style:condition="of:is-true-formula(NOT(ISERROR(SEARCH(&quot;Przyjście&quot;;[.E4]))))" style:apply-style-name="cf2" style:base-cell-address="Sheet1.E4"/>
    </style:style>
    <style:style style:name="ce16" style:family="table-cell">
      <style:map style:condition="of:is-true-formula(NOT(ISERROR(SEARCH(&quot;Wejście&quot;;[.E4]))))" style:apply-style-name="cf2" style:base-cell-address="Sheet1.E4"/>
      <style:map style:condition="of:is-true-formula(NOT(ISERROR(SEARCH(&quot;Przyjście&quot;;[.E4]))))" style:apply-style-name="cf2" style:base-cell-address="Sheet1.E4"/>
    </style:style>
    <style:style style:name="ce17" style:family="table-cell" style:parent-style-name="Note" style:data-style-name="N0">
      <style:table-cell-properties fo:border="thin solid #B2B2B2" fo:background-color="#FFFFCC"/>
      <style:map style:condition="of:is-true-formula(NOT(ISERROR(SEARCH(&quot;Wejście&quot;;[.E4]))))" style:apply-style-name="cf2" style:base-cell-address="Sheet1.E4"/>
      <style:map style:condition="of:is-true-formula(NOT(ISERROR(SEARCH(&quot;Wejście&quot;;[.E4]))))" style:apply-style-name="cf2" style:base-cell-address="Sheet1.E4"/>
      <style:map style:condition="of:is-true-formula(NOT(ISERROR(SEARCH(&quot;Przyjście&quot;;[.E4]))))" style:apply-style-name="cf2" style:base-cell-address="Sheet1.E4"/>
    </style:style>
    <style:style style:name="ce18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  <style:map style:condition="of:cell-content()&gt;1" style:apply-style-name="cf1"/>
    </style:style>
    <style:style style:name="ce19" style:family="table-cell" style:parent-style-name="Note" style:data-style-name="N0">
      <style:table-cell-properties fo:border="thin solid #B2B2B2" fo:background-color="#FFFFCC"/>
      <style:map style:condition="of:is-true-formula(AND([.A4]=&quot;&quot;; [.D4]&lt;&gt;&quot;&quot;))" style:apply-style-name="cf3" style:base-cell-address="Sheet1.A4"/>
      <style:map style:condition="of:is-true-formula(AND([.A4]=&quot;&quot;;[.D4]&lt;&gt;&quot;&quot;))" style:apply-style-name="cf4" style:base-cell-address="Sheet1.A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Wejście&quot;)">
          <table:help-message table:display="true"/>
          <table:error-message table:display="true"/>
        </table:content-validation>
        <table:content-validation table:name="val2" table:condition="of:cell-content-is-in-list(&quot;WYJŚCIE&quot;)">
          <table:help-message table:display="true"/>
          <table:error-message table:display="true"/>
        </table:content-validation>
        <table:content-validation table:name="val3" table:condition="of:cell-content-is-in-list(&quot;5 min&quot;;&quot;Przerwa&quot;)">
          <table:help-message table:display="true"/>
          <table:error-message table:display="true"/>
        </table:content-validation>
        <table:content-validation table:name="val4" table:condition="of:cell-content-is-in-list(&quot;Patryk Gierszewski&quot;)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6" table:default-cell-style-name="ce1"/>
        <table:table-column table:style-name="co2" table:number-columns-repeated="16373" table:default-cell-style-name="ce1"/>
        <table:table-row table:style-name="ro1">
          <table:table-cell office:value-type="string" table:number-columns-spanned="8" table:number-rows-spanned="2" table:style-name="ce5">
            <text:p>Dostępne przerwy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covered-table-cell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6">
            <text:p>Agent</text:p>
          </table:table-cell>
          <table:table-cell office:value-type="string" table:style-name="ce6">
            <text:p>Rodzaj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Wyjście</text:p>
          </table:table-cell>
          <table:table-cell office:value-type="string" table:style-name="ce6">
            <text:p>Przyjście</text:p>
          </table:table-cell>
          <table:table-cell office:value-type="string" table:number-columns-spanned="3" table:number-rows-spanned="1" table:style-name="ce5">
            <text:p>Godzina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]&lt;&gt;&quot;&quot;;[.E4]&lt;&gt;&quot;&quot;);&quot;Brak Przerwy&quot;;IF(OR([.D4]&lt;&gt;&quot;&quot;;[.E4]&lt;&gt;&quot;&quot;);&quot;Przerwa&quot;;&quot;&quot;))" table:style-name="ce4"/>
          <table:table-cell table:content-validation-name="val2" table:style-name="ce11"/>
          <table:table-cell table:content-validation-name="val1" table:style-name="ce17"/>
          <table:table-cell table:number-columns-spanned="3" table:number-rows-spanned="1" table:style-name="ce3"/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10">
            <text:p>Statystyki</text:p>
          </table:table-cell>
          <table:covered-table-cell/>
          <table:table-cell table:number-columns-repeated="16372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]&lt;&gt;&quot;&quot;;[.E5]&lt;&gt;&quot;&quot;);&quot;Brak Przerwy&quot;;IF(OR([.D5]&lt;&gt;&quot;&quot;;[.E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2" table:style-name="ce1"/>
          <table:table-cell office:value-type="string" table:style-name="ce8">
            <text:p>Suma ogólnych przerw:</text:p>
          </table:table-cell>
          <table:table-cell office:value-type="float" office:value="0" table:formula="of:=COUNTIF([.C4:.C500];&quot;Przerwa&quot;)" table:style-name="ce9">
            <text:p>0</text:p>
          </table:table-cell>
          <table:table-cell table:number-columns-repeated="2" table:style-name="ce7"/>
          <table:table-cell table:number-columns-repeated="16370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]&lt;&gt;&quot;&quot;;[.E6]&lt;&gt;&quot;&quot;);&quot;Brak Przerwy&quot;;IF(OR([.D6]&lt;&gt;&quot;&quot;;[.E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2" table:style-name="ce1"/>
          <table:table-cell office:value-type="string" table:style-name="ce8">
            <text:p>Suma 5 min</text:p>
          </table:table-cell>
          <table:table-cell office:value-type="float" office:value="0" table:formula="of:=COUNTIF([.B4:.B599];&quot;5 min&quot;)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]&lt;&gt;&quot;&quot;;[.E7]&lt;&gt;&quot;&quot;);&quot;Brak Przerwy&quot;;IF(OR([.D7]&lt;&gt;&quot;&quot;;[.E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2" table:style-name="ce1"/>
          <table:table-cell office:value-type="string" table:style-name="ce8">
            <text:p>Przerwy 20 minut</text:p>
          </table:table-cell>
          <table:table-cell office:value-type="float" office:value="0" table:formula="of:=COUNTIF([.B4:.B500];&quot;Przerwa&quot;)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]&lt;&gt;&quot;&quot;;[.E8]&lt;&gt;&quot;&quot;);&quot;Brak Przerwy&quot;;IF(OR([.D8]&lt;&gt;&quot;&quot;;[.E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2" table:style-name="ce1"/>
          <table:table-cell office:value-type="string" table:style-name="ce8">
            <text:p>Bez powrotu</text:p>
          </table:table-cell>
          <table:table-cell office:value-type="float" office:value="0" table:formula="of:=COUNTIFS([.D4:.D500];&quot;&lt;&gt;&quot;;[.E4:.E500];&quot;&quot;)" table:style-name="ce18">
            <text:p>0</text:p>
          </table:table-cell>
          <table:table-cell table:number-columns-repeated="16372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]&lt;&gt;&quot;&quot;;[.E9]&lt;&gt;&quot;&quot;);&quot;Brak Przerwy&quot;;IF(OR([.D9]&lt;&gt;&quot;&quot;;[.E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2" table:style-name="ce1"/>
          <table:table-cell office:value-type="string" table:style-name="ce8">
            <text:p>Dostępni Agenci</text:p>
          </table:table-cell>
          <table:table-cell office:value-type="error" office:string-value="#VALUE!" table:formula="of:=ROWS(COM.MICROSOFT.UNIQUE(COM.MICROSOFT.FILTER([.A4:.A1000]; [.A4:.A1000]&lt;&gt;&quot;&quot;))) - COUNTIF([.C:.C]; &quot;Przerwa&quot;)" table:number-matrix-columns-spanned="1" table:number-matrix-rows-spanned="1" table:style-name="ce8">
            <text:p>#VALUE!</text:p>
          </table:table-cell>
          <table:table-cell table:number-columns-repeated="16372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]&lt;&gt;&quot;&quot;;[.E10]&lt;&gt;&quot;&quot;);&quot;Brak Przerwy&quot;;IF(OR([.D10]&lt;&gt;&quot;&quot;;[.E1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]&lt;&gt;&quot;&quot;;[.E11]&lt;&gt;&quot;&quot;);&quot;Brak Przerwy&quot;;IF(OR([.D11]&lt;&gt;&quot;&quot;;[.E1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]&lt;&gt;&quot;&quot;;[.E12]&lt;&gt;&quot;&quot;);&quot;Brak Przerwy&quot;;IF(OR([.D12]&lt;&gt;&quot;&quot;;[.E1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]&lt;&gt;&quot;&quot;;[.E13]&lt;&gt;&quot;&quot;);&quot;Brak Przerwy&quot;;IF(OR([.D13]&lt;&gt;&quot;&quot;;[.E1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]&lt;&gt;&quot;&quot;;[.E14]&lt;&gt;&quot;&quot;);&quot;Brak Przerwy&quot;;IF(OR([.D14]&lt;&gt;&quot;&quot;;[.E1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]&lt;&gt;&quot;&quot;;[.E15]&lt;&gt;&quot;&quot;);&quot;Brak Przerwy&quot;;IF(OR([.D15]&lt;&gt;&quot;&quot;;[.E1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]&lt;&gt;&quot;&quot;;[.E16]&lt;&gt;&quot;&quot;);&quot;Brak Przerwy&quot;;IF(OR([.D16]&lt;&gt;&quot;&quot;;[.E1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 table:style-name="ce1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]&lt;&gt;&quot;&quot;;[.E17]&lt;&gt;&quot;&quot;);&quot;Brak Przerwy&quot;;IF(OR([.D17]&lt;&gt;&quot;&quot;;[.E1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]&lt;&gt;&quot;&quot;;[.E18]&lt;&gt;&quot;&quot;);&quot;Brak Przerwy&quot;;IF(OR([.D18]&lt;&gt;&quot;&quot;;[.E1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]&lt;&gt;&quot;&quot;;[.E19]&lt;&gt;&quot;&quot;);&quot;Brak Przerwy&quot;;IF(OR([.D19]&lt;&gt;&quot;&quot;;[.E1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]&lt;&gt;&quot;&quot;;[.E20]&lt;&gt;&quot;&quot;);&quot;Brak Przerwy&quot;;IF(OR([.D20]&lt;&gt;&quot;&quot;;[.E2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]&lt;&gt;&quot;&quot;;[.E21]&lt;&gt;&quot;&quot;);&quot;Brak Przerwy&quot;;IF(OR([.D21]&lt;&gt;&quot;&quot;;[.E2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]&lt;&gt;&quot;&quot;;[.E22]&lt;&gt;&quot;&quot;);&quot;Brak Przerwy&quot;;IF(OR([.D22]&lt;&gt;&quot;&quot;;[.E2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]&lt;&gt;&quot;&quot;;[.E23]&lt;&gt;&quot;&quot;);&quot;Brak Przerwy&quot;;IF(OR([.D23]&lt;&gt;&quot;&quot;;[.E2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]&lt;&gt;&quot;&quot;;[.E24]&lt;&gt;&quot;&quot;);&quot;Brak Przerwy&quot;;IF(OR([.D24]&lt;&gt;&quot;&quot;;[.E2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]&lt;&gt;&quot;&quot;;[.E25]&lt;&gt;&quot;&quot;);&quot;Brak Przerwy&quot;;IF(OR([.D25]&lt;&gt;&quot;&quot;;[.E2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]&lt;&gt;&quot;&quot;;[.E26]&lt;&gt;&quot;&quot;);&quot;Brak Przerwy&quot;;IF(OR([.D26]&lt;&gt;&quot;&quot;;[.E2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]&lt;&gt;&quot;&quot;;[.E27]&lt;&gt;&quot;&quot;);&quot;Brak Przerwy&quot;;IF(OR([.D27]&lt;&gt;&quot;&quot;;[.E2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]&lt;&gt;&quot;&quot;;[.E28]&lt;&gt;&quot;&quot;);&quot;Brak Przerwy&quot;;IF(OR([.D28]&lt;&gt;&quot;&quot;;[.E2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]&lt;&gt;&quot;&quot;;[.E29]&lt;&gt;&quot;&quot;);&quot;Brak Przerwy&quot;;IF(OR([.D29]&lt;&gt;&quot;&quot;;[.E2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]&lt;&gt;&quot;&quot;;[.E30]&lt;&gt;&quot;&quot;);&quot;Brak Przerwy&quot;;IF(OR([.D30]&lt;&gt;&quot;&quot;;[.E3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]&lt;&gt;&quot;&quot;;[.E31]&lt;&gt;&quot;&quot;);&quot;Brak Przerwy&quot;;IF(OR([.D31]&lt;&gt;&quot;&quot;;[.E3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]&lt;&gt;&quot;&quot;;[.E32]&lt;&gt;&quot;&quot;);&quot;Brak Przerwy&quot;;IF(OR([.D32]&lt;&gt;&quot;&quot;;[.E3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]&lt;&gt;&quot;&quot;;[.E33]&lt;&gt;&quot;&quot;);&quot;Brak Przerwy&quot;;IF(OR([.D33]&lt;&gt;&quot;&quot;;[.E3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]&lt;&gt;&quot;&quot;;[.E34]&lt;&gt;&quot;&quot;);&quot;Brak Przerwy&quot;;IF(OR([.D34]&lt;&gt;&quot;&quot;;[.E3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]&lt;&gt;&quot;&quot;;[.E35]&lt;&gt;&quot;&quot;);&quot;Brak Przerwy&quot;;IF(OR([.D35]&lt;&gt;&quot;&quot;;[.E3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]&lt;&gt;&quot;&quot;;[.E36]&lt;&gt;&quot;&quot;);&quot;Brak Przerwy&quot;;IF(OR([.D36]&lt;&gt;&quot;&quot;;[.E3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]&lt;&gt;&quot;&quot;;[.E37]&lt;&gt;&quot;&quot;);&quot;Brak Przerwy&quot;;IF(OR([.D37]&lt;&gt;&quot;&quot;;[.E3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]&lt;&gt;&quot;&quot;;[.E38]&lt;&gt;&quot;&quot;);&quot;Brak Przerwy&quot;;IF(OR([.D38]&lt;&gt;&quot;&quot;;[.E3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]&lt;&gt;&quot;&quot;;[.E39]&lt;&gt;&quot;&quot;);&quot;Brak Przerwy&quot;;IF(OR([.D39]&lt;&gt;&quot;&quot;;[.E3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]&lt;&gt;&quot;&quot;;[.E40]&lt;&gt;&quot;&quot;);&quot;Brak Przerwy&quot;;IF(OR([.D40]&lt;&gt;&quot;&quot;;[.E4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]&lt;&gt;&quot;&quot;;[.E41]&lt;&gt;&quot;&quot;);&quot;Brak Przerwy&quot;;IF(OR([.D41]&lt;&gt;&quot;&quot;;[.E4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]&lt;&gt;&quot;&quot;;[.E42]&lt;&gt;&quot;&quot;);&quot;Brak Przerwy&quot;;IF(OR([.D42]&lt;&gt;&quot;&quot;;[.E4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]&lt;&gt;&quot;&quot;;[.E43]&lt;&gt;&quot;&quot;);&quot;Brak Przerwy&quot;;IF(OR([.D43]&lt;&gt;&quot;&quot;;[.E4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]&lt;&gt;&quot;&quot;;[.E44]&lt;&gt;&quot;&quot;);&quot;Brak Przerwy&quot;;IF(OR([.D44]&lt;&gt;&quot;&quot;;[.E4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]&lt;&gt;&quot;&quot;;[.E45]&lt;&gt;&quot;&quot;);&quot;Brak Przerwy&quot;;IF(OR([.D45]&lt;&gt;&quot;&quot;;[.E4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]&lt;&gt;&quot;&quot;;[.E46]&lt;&gt;&quot;&quot;);&quot;Brak Przerwy&quot;;IF(OR([.D46]&lt;&gt;&quot;&quot;;[.E4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]&lt;&gt;&quot;&quot;;[.E47]&lt;&gt;&quot;&quot;);&quot;Brak Przerwy&quot;;IF(OR([.D47]&lt;&gt;&quot;&quot;;[.E4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]&lt;&gt;&quot;&quot;;[.E48]&lt;&gt;&quot;&quot;);&quot;Brak Przerwy&quot;;IF(OR([.D48]&lt;&gt;&quot;&quot;;[.E4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]&lt;&gt;&quot;&quot;;[.E49]&lt;&gt;&quot;&quot;);&quot;Brak Przerwy&quot;;IF(OR([.D49]&lt;&gt;&quot;&quot;;[.E4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]&lt;&gt;&quot;&quot;;[.E50]&lt;&gt;&quot;&quot;);&quot;Brak Przerwy&quot;;IF(OR([.D50]&lt;&gt;&quot;&quot;;[.E5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]&lt;&gt;&quot;&quot;;[.E51]&lt;&gt;&quot;&quot;);&quot;Brak Przerwy&quot;;IF(OR([.D51]&lt;&gt;&quot;&quot;;[.E5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]&lt;&gt;&quot;&quot;;[.E52]&lt;&gt;&quot;&quot;);&quot;Brak Przerwy&quot;;IF(OR([.D52]&lt;&gt;&quot;&quot;;[.E5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]&lt;&gt;&quot;&quot;;[.E53]&lt;&gt;&quot;&quot;);&quot;Brak Przerwy&quot;;IF(OR([.D53]&lt;&gt;&quot;&quot;;[.E5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]&lt;&gt;&quot;&quot;;[.E54]&lt;&gt;&quot;&quot;);&quot;Brak Przerwy&quot;;IF(OR([.D54]&lt;&gt;&quot;&quot;;[.E5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]&lt;&gt;&quot;&quot;;[.E55]&lt;&gt;&quot;&quot;);&quot;Brak Przerwy&quot;;IF(OR([.D55]&lt;&gt;&quot;&quot;;[.E5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]&lt;&gt;&quot;&quot;;[.E56]&lt;&gt;&quot;&quot;);&quot;Brak Przerwy&quot;;IF(OR([.D56]&lt;&gt;&quot;&quot;;[.E5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]&lt;&gt;&quot;&quot;;[.E57]&lt;&gt;&quot;&quot;);&quot;Brak Przerwy&quot;;IF(OR([.D57]&lt;&gt;&quot;&quot;;[.E5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]&lt;&gt;&quot;&quot;;[.E58]&lt;&gt;&quot;&quot;);&quot;Brak Przerwy&quot;;IF(OR([.D58]&lt;&gt;&quot;&quot;;[.E5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]&lt;&gt;&quot;&quot;;[.E59]&lt;&gt;&quot;&quot;);&quot;Brak Przerwy&quot;;IF(OR([.D59]&lt;&gt;&quot;&quot;;[.E5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0]&lt;&gt;&quot;&quot;;[.E60]&lt;&gt;&quot;&quot;);&quot;Brak Przerwy&quot;;IF(OR([.D60]&lt;&gt;&quot;&quot;;[.E6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1]&lt;&gt;&quot;&quot;;[.E61]&lt;&gt;&quot;&quot;);&quot;Brak Przerwy&quot;;IF(OR([.D61]&lt;&gt;&quot;&quot;;[.E6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2]&lt;&gt;&quot;&quot;;[.E62]&lt;&gt;&quot;&quot;);&quot;Brak Przerwy&quot;;IF(OR([.D62]&lt;&gt;&quot;&quot;;[.E6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3]&lt;&gt;&quot;&quot;;[.E63]&lt;&gt;&quot;&quot;);&quot;Brak Przerwy&quot;;IF(OR([.D63]&lt;&gt;&quot;&quot;;[.E6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4]&lt;&gt;&quot;&quot;;[.E64]&lt;&gt;&quot;&quot;);&quot;Brak Przerwy&quot;;IF(OR([.D64]&lt;&gt;&quot;&quot;;[.E6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5]&lt;&gt;&quot;&quot;;[.E65]&lt;&gt;&quot;&quot;);&quot;Brak Przerwy&quot;;IF(OR([.D65]&lt;&gt;&quot;&quot;;[.E6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6]&lt;&gt;&quot;&quot;;[.E66]&lt;&gt;&quot;&quot;);&quot;Brak Przerwy&quot;;IF(OR([.D66]&lt;&gt;&quot;&quot;;[.E6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7]&lt;&gt;&quot;&quot;;[.E67]&lt;&gt;&quot;&quot;);&quot;Brak Przerwy&quot;;IF(OR([.D67]&lt;&gt;&quot;&quot;;[.E6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8]&lt;&gt;&quot;&quot;;[.E68]&lt;&gt;&quot;&quot;);&quot;Brak Przerwy&quot;;IF(OR([.D68]&lt;&gt;&quot;&quot;;[.E6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69]&lt;&gt;&quot;&quot;;[.E69]&lt;&gt;&quot;&quot;);&quot;Brak Przerwy&quot;;IF(OR([.D69]&lt;&gt;&quot;&quot;;[.E6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0]&lt;&gt;&quot;&quot;;[.E70]&lt;&gt;&quot;&quot;);&quot;Brak Przerwy&quot;;IF(OR([.D70]&lt;&gt;&quot;&quot;;[.E7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1]&lt;&gt;&quot;&quot;;[.E71]&lt;&gt;&quot;&quot;);&quot;Brak Przerwy&quot;;IF(OR([.D71]&lt;&gt;&quot;&quot;;[.E7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2]&lt;&gt;&quot;&quot;;[.E72]&lt;&gt;&quot;&quot;);&quot;Brak Przerwy&quot;;IF(OR([.D72]&lt;&gt;&quot;&quot;;[.E7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3]&lt;&gt;&quot;&quot;;[.E73]&lt;&gt;&quot;&quot;);&quot;Brak Przerwy&quot;;IF(OR([.D73]&lt;&gt;&quot;&quot;;[.E7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4]&lt;&gt;&quot;&quot;;[.E74]&lt;&gt;&quot;&quot;);&quot;Brak Przerwy&quot;;IF(OR([.D74]&lt;&gt;&quot;&quot;;[.E7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5]&lt;&gt;&quot;&quot;;[.E75]&lt;&gt;&quot;&quot;);&quot;Brak Przerwy&quot;;IF(OR([.D75]&lt;&gt;&quot;&quot;;[.E7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6]&lt;&gt;&quot;&quot;;[.E76]&lt;&gt;&quot;&quot;);&quot;Brak Przerwy&quot;;IF(OR([.D76]&lt;&gt;&quot;&quot;;[.E7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7]&lt;&gt;&quot;&quot;;[.E77]&lt;&gt;&quot;&quot;);&quot;Brak Przerwy&quot;;IF(OR([.D77]&lt;&gt;&quot;&quot;;[.E7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8]&lt;&gt;&quot;&quot;;[.E78]&lt;&gt;&quot;&quot;);&quot;Brak Przerwy&quot;;IF(OR([.D78]&lt;&gt;&quot;&quot;;[.E7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79]&lt;&gt;&quot;&quot;;[.E79]&lt;&gt;&quot;&quot;);&quot;Brak Przerwy&quot;;IF(OR([.D79]&lt;&gt;&quot;&quot;;[.E7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0]&lt;&gt;&quot;&quot;;[.E80]&lt;&gt;&quot;&quot;);&quot;Brak Przerwy&quot;;IF(OR([.D80]&lt;&gt;&quot;&quot;;[.E8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1]&lt;&gt;&quot;&quot;;[.E81]&lt;&gt;&quot;&quot;);&quot;Brak Przerwy&quot;;IF(OR([.D81]&lt;&gt;&quot;&quot;;[.E8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2]&lt;&gt;&quot;&quot;;[.E82]&lt;&gt;&quot;&quot;);&quot;Brak Przerwy&quot;;IF(OR([.D82]&lt;&gt;&quot;&quot;;[.E8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3]&lt;&gt;&quot;&quot;;[.E83]&lt;&gt;&quot;&quot;);&quot;Brak Przerwy&quot;;IF(OR([.D83]&lt;&gt;&quot;&quot;;[.E8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4]&lt;&gt;&quot;&quot;;[.E84]&lt;&gt;&quot;&quot;);&quot;Brak Przerwy&quot;;IF(OR([.D84]&lt;&gt;&quot;&quot;;[.E8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5]&lt;&gt;&quot;&quot;;[.E85]&lt;&gt;&quot;&quot;);&quot;Brak Przerwy&quot;;IF(OR([.D85]&lt;&gt;&quot;&quot;;[.E8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6]&lt;&gt;&quot;&quot;;[.E86]&lt;&gt;&quot;&quot;);&quot;Brak Przerwy&quot;;IF(OR([.D86]&lt;&gt;&quot;&quot;;[.E8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7]&lt;&gt;&quot;&quot;;[.E87]&lt;&gt;&quot;&quot;);&quot;Brak Przerwy&quot;;IF(OR([.D87]&lt;&gt;&quot;&quot;;[.E8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8]&lt;&gt;&quot;&quot;;[.E88]&lt;&gt;&quot;&quot;);&quot;Brak Przerwy&quot;;IF(OR([.D88]&lt;&gt;&quot;&quot;;[.E8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89]&lt;&gt;&quot;&quot;;[.E89]&lt;&gt;&quot;&quot;);&quot;Brak Przerwy&quot;;IF(OR([.D89]&lt;&gt;&quot;&quot;;[.E8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0]&lt;&gt;&quot;&quot;;[.E90]&lt;&gt;&quot;&quot;);&quot;Brak Przerwy&quot;;IF(OR([.D90]&lt;&gt;&quot;&quot;;[.E9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1]&lt;&gt;&quot;&quot;;[.E91]&lt;&gt;&quot;&quot;);&quot;Brak Przerwy&quot;;IF(OR([.D91]&lt;&gt;&quot;&quot;;[.E9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2]&lt;&gt;&quot;&quot;;[.E92]&lt;&gt;&quot;&quot;);&quot;Brak Przerwy&quot;;IF(OR([.D92]&lt;&gt;&quot;&quot;;[.E9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3]&lt;&gt;&quot;&quot;;[.E93]&lt;&gt;&quot;&quot;);&quot;Brak Przerwy&quot;;IF(OR([.D93]&lt;&gt;&quot;&quot;;[.E9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4]&lt;&gt;&quot;&quot;;[.E94]&lt;&gt;&quot;&quot;);&quot;Brak Przerwy&quot;;IF(OR([.D94]&lt;&gt;&quot;&quot;;[.E9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5]&lt;&gt;&quot;&quot;;[.E95]&lt;&gt;&quot;&quot;);&quot;Brak Przerwy&quot;;IF(OR([.D95]&lt;&gt;&quot;&quot;;[.E9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6]&lt;&gt;&quot;&quot;;[.E96]&lt;&gt;&quot;&quot;);&quot;Brak Przerwy&quot;;IF(OR([.D96]&lt;&gt;&quot;&quot;;[.E9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7]&lt;&gt;&quot;&quot;;[.E97]&lt;&gt;&quot;&quot;);&quot;Brak Przerwy&quot;;IF(OR([.D97]&lt;&gt;&quot;&quot;;[.E9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8]&lt;&gt;&quot;&quot;;[.E98]&lt;&gt;&quot;&quot;);&quot;Brak Przerwy&quot;;IF(OR([.D98]&lt;&gt;&quot;&quot;;[.E9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99]&lt;&gt;&quot;&quot;;[.E99]&lt;&gt;&quot;&quot;);&quot;Brak Przerwy&quot;;IF(OR([.D99]&lt;&gt;&quot;&quot;;[.E9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0]&lt;&gt;&quot;&quot;;[.E100]&lt;&gt;&quot;&quot;);&quot;Brak Przerwy&quot;;IF(OR([.D100]&lt;&gt;&quot;&quot;;[.E10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1]&lt;&gt;&quot;&quot;;[.E101]&lt;&gt;&quot;&quot;);&quot;Brak Przerwy&quot;;IF(OR([.D101]&lt;&gt;&quot;&quot;;[.E10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2]&lt;&gt;&quot;&quot;;[.E102]&lt;&gt;&quot;&quot;);&quot;Brak Przerwy&quot;;IF(OR([.D102]&lt;&gt;&quot;&quot;;[.E10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3]&lt;&gt;&quot;&quot;;[.E103]&lt;&gt;&quot;&quot;);&quot;Brak Przerwy&quot;;IF(OR([.D103]&lt;&gt;&quot;&quot;;[.E10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4]&lt;&gt;&quot;&quot;;[.E104]&lt;&gt;&quot;&quot;);&quot;Brak Przerwy&quot;;IF(OR([.D104]&lt;&gt;&quot;&quot;;[.E10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5]&lt;&gt;&quot;&quot;;[.E105]&lt;&gt;&quot;&quot;);&quot;Brak Przerwy&quot;;IF(OR([.D105]&lt;&gt;&quot;&quot;;[.E10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6]&lt;&gt;&quot;&quot;;[.E106]&lt;&gt;&quot;&quot;);&quot;Brak Przerwy&quot;;IF(OR([.D106]&lt;&gt;&quot;&quot;;[.E10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7]&lt;&gt;&quot;&quot;;[.E107]&lt;&gt;&quot;&quot;);&quot;Brak Przerwy&quot;;IF(OR([.D107]&lt;&gt;&quot;&quot;;[.E10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8]&lt;&gt;&quot;&quot;;[.E108]&lt;&gt;&quot;&quot;);&quot;Brak Przerwy&quot;;IF(OR([.D108]&lt;&gt;&quot;&quot;;[.E10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09]&lt;&gt;&quot;&quot;;[.E109]&lt;&gt;&quot;&quot;);&quot;Brak Przerwy&quot;;IF(OR([.D109]&lt;&gt;&quot;&quot;;[.E10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0]&lt;&gt;&quot;&quot;;[.E110]&lt;&gt;&quot;&quot;);&quot;Brak Przerwy&quot;;IF(OR([.D110]&lt;&gt;&quot;&quot;;[.E11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1]&lt;&gt;&quot;&quot;;[.E111]&lt;&gt;&quot;&quot;);&quot;Brak Przerwy&quot;;IF(OR([.D111]&lt;&gt;&quot;&quot;;[.E11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2]&lt;&gt;&quot;&quot;;[.E112]&lt;&gt;&quot;&quot;);&quot;Brak Przerwy&quot;;IF(OR([.D112]&lt;&gt;&quot;&quot;;[.E11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3]&lt;&gt;&quot;&quot;;[.E113]&lt;&gt;&quot;&quot;);&quot;Brak Przerwy&quot;;IF(OR([.D113]&lt;&gt;&quot;&quot;;[.E11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4]&lt;&gt;&quot;&quot;;[.E114]&lt;&gt;&quot;&quot;);&quot;Brak Przerwy&quot;;IF(OR([.D114]&lt;&gt;&quot;&quot;;[.E11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5]&lt;&gt;&quot;&quot;;[.E115]&lt;&gt;&quot;&quot;);&quot;Brak Przerwy&quot;;IF(OR([.D115]&lt;&gt;&quot;&quot;;[.E11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6]&lt;&gt;&quot;&quot;;[.E116]&lt;&gt;&quot;&quot;);&quot;Brak Przerwy&quot;;IF(OR([.D116]&lt;&gt;&quot;&quot;;[.E11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7]&lt;&gt;&quot;&quot;;[.E117]&lt;&gt;&quot;&quot;);&quot;Brak Przerwy&quot;;IF(OR([.D117]&lt;&gt;&quot;&quot;;[.E11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8]&lt;&gt;&quot;&quot;;[.E118]&lt;&gt;&quot;&quot;);&quot;Brak Przerwy&quot;;IF(OR([.D118]&lt;&gt;&quot;&quot;;[.E11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19]&lt;&gt;&quot;&quot;;[.E119]&lt;&gt;&quot;&quot;);&quot;Brak Przerwy&quot;;IF(OR([.D119]&lt;&gt;&quot;&quot;;[.E11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0]&lt;&gt;&quot;&quot;;[.E120]&lt;&gt;&quot;&quot;);&quot;Brak Przerwy&quot;;IF(OR([.D120]&lt;&gt;&quot;&quot;;[.E12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1]&lt;&gt;&quot;&quot;;[.E121]&lt;&gt;&quot;&quot;);&quot;Brak Przerwy&quot;;IF(OR([.D121]&lt;&gt;&quot;&quot;;[.E12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2]&lt;&gt;&quot;&quot;;[.E122]&lt;&gt;&quot;&quot;);&quot;Brak Przerwy&quot;;IF(OR([.D122]&lt;&gt;&quot;&quot;;[.E12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3]&lt;&gt;&quot;&quot;;[.E123]&lt;&gt;&quot;&quot;);&quot;Brak Przerwy&quot;;IF(OR([.D123]&lt;&gt;&quot;&quot;;[.E12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4]&lt;&gt;&quot;&quot;;[.E124]&lt;&gt;&quot;&quot;);&quot;Brak Przerwy&quot;;IF(OR([.D124]&lt;&gt;&quot;&quot;;[.E12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5]&lt;&gt;&quot;&quot;;[.E125]&lt;&gt;&quot;&quot;);&quot;Brak Przerwy&quot;;IF(OR([.D125]&lt;&gt;&quot;&quot;;[.E12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6]&lt;&gt;&quot;&quot;;[.E126]&lt;&gt;&quot;&quot;);&quot;Brak Przerwy&quot;;IF(OR([.D126]&lt;&gt;&quot;&quot;;[.E12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7]&lt;&gt;&quot;&quot;;[.E127]&lt;&gt;&quot;&quot;);&quot;Brak Przerwy&quot;;IF(OR([.D127]&lt;&gt;&quot;&quot;;[.E12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8]&lt;&gt;&quot;&quot;;[.E128]&lt;&gt;&quot;&quot;);&quot;Brak Przerwy&quot;;IF(OR([.D128]&lt;&gt;&quot;&quot;;[.E12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29]&lt;&gt;&quot;&quot;;[.E129]&lt;&gt;&quot;&quot;);&quot;Brak Przerwy&quot;;IF(OR([.D129]&lt;&gt;&quot;&quot;;[.E12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0]&lt;&gt;&quot;&quot;;[.E130]&lt;&gt;&quot;&quot;);&quot;Brak Przerwy&quot;;IF(OR([.D130]&lt;&gt;&quot;&quot;;[.E13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1]&lt;&gt;&quot;&quot;;[.E131]&lt;&gt;&quot;&quot;);&quot;Brak Przerwy&quot;;IF(OR([.D131]&lt;&gt;&quot;&quot;;[.E13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2]&lt;&gt;&quot;&quot;;[.E132]&lt;&gt;&quot;&quot;);&quot;Brak Przerwy&quot;;IF(OR([.D132]&lt;&gt;&quot;&quot;;[.E13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3]&lt;&gt;&quot;&quot;;[.E133]&lt;&gt;&quot;&quot;);&quot;Brak Przerwy&quot;;IF(OR([.D133]&lt;&gt;&quot;&quot;;[.E13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4]&lt;&gt;&quot;&quot;;[.E134]&lt;&gt;&quot;&quot;);&quot;Brak Przerwy&quot;;IF(OR([.D134]&lt;&gt;&quot;&quot;;[.E13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5]&lt;&gt;&quot;&quot;;[.E135]&lt;&gt;&quot;&quot;);&quot;Brak Przerwy&quot;;IF(OR([.D135]&lt;&gt;&quot;&quot;;[.E13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6]&lt;&gt;&quot;&quot;;[.E136]&lt;&gt;&quot;&quot;);&quot;Brak Przerwy&quot;;IF(OR([.D136]&lt;&gt;&quot;&quot;;[.E13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7]&lt;&gt;&quot;&quot;;[.E137]&lt;&gt;&quot;&quot;);&quot;Brak Przerwy&quot;;IF(OR([.D137]&lt;&gt;&quot;&quot;;[.E13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8]&lt;&gt;&quot;&quot;;[.E138]&lt;&gt;&quot;&quot;);&quot;Brak Przerwy&quot;;IF(OR([.D138]&lt;&gt;&quot;&quot;;[.E13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39]&lt;&gt;&quot;&quot;;[.E139]&lt;&gt;&quot;&quot;);&quot;Brak Przerwy&quot;;IF(OR([.D139]&lt;&gt;&quot;&quot;;[.E13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0]&lt;&gt;&quot;&quot;;[.E140]&lt;&gt;&quot;&quot;);&quot;Brak Przerwy&quot;;IF(OR([.D140]&lt;&gt;&quot;&quot;;[.E14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1]&lt;&gt;&quot;&quot;;[.E141]&lt;&gt;&quot;&quot;);&quot;Brak Przerwy&quot;;IF(OR([.D141]&lt;&gt;&quot;&quot;;[.E14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2]&lt;&gt;&quot;&quot;;[.E142]&lt;&gt;&quot;&quot;);&quot;Brak Przerwy&quot;;IF(OR([.D142]&lt;&gt;&quot;&quot;;[.E14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3]&lt;&gt;&quot;&quot;;[.E143]&lt;&gt;&quot;&quot;);&quot;Brak Przerwy&quot;;IF(OR([.D143]&lt;&gt;&quot;&quot;;[.E14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4]&lt;&gt;&quot;&quot;;[.E144]&lt;&gt;&quot;&quot;);&quot;Brak Przerwy&quot;;IF(OR([.D144]&lt;&gt;&quot;&quot;;[.E14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5]&lt;&gt;&quot;&quot;;[.E145]&lt;&gt;&quot;&quot;);&quot;Brak Przerwy&quot;;IF(OR([.D145]&lt;&gt;&quot;&quot;;[.E14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6]&lt;&gt;&quot;&quot;;[.E146]&lt;&gt;&quot;&quot;);&quot;Brak Przerwy&quot;;IF(OR([.D146]&lt;&gt;&quot;&quot;;[.E14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7]&lt;&gt;&quot;&quot;;[.E147]&lt;&gt;&quot;&quot;);&quot;Brak Przerwy&quot;;IF(OR([.D147]&lt;&gt;&quot;&quot;;[.E14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8]&lt;&gt;&quot;&quot;;[.E148]&lt;&gt;&quot;&quot;);&quot;Brak Przerwy&quot;;IF(OR([.D148]&lt;&gt;&quot;&quot;;[.E14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49]&lt;&gt;&quot;&quot;;[.E149]&lt;&gt;&quot;&quot;);&quot;Brak Przerwy&quot;;IF(OR([.D149]&lt;&gt;&quot;&quot;;[.E14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0]&lt;&gt;&quot;&quot;;[.E150]&lt;&gt;&quot;&quot;);&quot;Brak Przerwy&quot;;IF(OR([.D150]&lt;&gt;&quot;&quot;;[.E15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1]&lt;&gt;&quot;&quot;;[.E151]&lt;&gt;&quot;&quot;);&quot;Brak Przerwy&quot;;IF(OR([.D151]&lt;&gt;&quot;&quot;;[.E15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2]&lt;&gt;&quot;&quot;;[.E152]&lt;&gt;&quot;&quot;);&quot;Brak Przerwy&quot;;IF(OR([.D152]&lt;&gt;&quot;&quot;;[.E15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3]&lt;&gt;&quot;&quot;;[.E153]&lt;&gt;&quot;&quot;);&quot;Brak Przerwy&quot;;IF(OR([.D153]&lt;&gt;&quot;&quot;;[.E15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4]&lt;&gt;&quot;&quot;;[.E154]&lt;&gt;&quot;&quot;);&quot;Brak Przerwy&quot;;IF(OR([.D154]&lt;&gt;&quot;&quot;;[.E15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5]&lt;&gt;&quot;&quot;;[.E155]&lt;&gt;&quot;&quot;);&quot;Brak Przerwy&quot;;IF(OR([.D155]&lt;&gt;&quot;&quot;;[.E15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6]&lt;&gt;&quot;&quot;;[.E156]&lt;&gt;&quot;&quot;);&quot;Brak Przerwy&quot;;IF(OR([.D156]&lt;&gt;&quot;&quot;;[.E15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7]&lt;&gt;&quot;&quot;;[.E157]&lt;&gt;&quot;&quot;);&quot;Brak Przerwy&quot;;IF(OR([.D157]&lt;&gt;&quot;&quot;;[.E15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8]&lt;&gt;&quot;&quot;;[.E158]&lt;&gt;&quot;&quot;);&quot;Brak Przerwy&quot;;IF(OR([.D158]&lt;&gt;&quot;&quot;;[.E15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59]&lt;&gt;&quot;&quot;;[.E159]&lt;&gt;&quot;&quot;);&quot;Brak Przerwy&quot;;IF(OR([.D159]&lt;&gt;&quot;&quot;;[.E15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0]&lt;&gt;&quot;&quot;;[.E160]&lt;&gt;&quot;&quot;);&quot;Brak Przerwy&quot;;IF(OR([.D160]&lt;&gt;&quot;&quot;;[.E16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1]&lt;&gt;&quot;&quot;;[.E161]&lt;&gt;&quot;&quot;);&quot;Brak Przerwy&quot;;IF(OR([.D161]&lt;&gt;&quot;&quot;;[.E16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2]&lt;&gt;&quot;&quot;;[.E162]&lt;&gt;&quot;&quot;);&quot;Brak Przerwy&quot;;IF(OR([.D162]&lt;&gt;&quot;&quot;;[.E16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3]&lt;&gt;&quot;&quot;;[.E163]&lt;&gt;&quot;&quot;);&quot;Brak Przerwy&quot;;IF(OR([.D163]&lt;&gt;&quot;&quot;;[.E16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4]&lt;&gt;&quot;&quot;;[.E164]&lt;&gt;&quot;&quot;);&quot;Brak Przerwy&quot;;IF(OR([.D164]&lt;&gt;&quot;&quot;;[.E16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5]&lt;&gt;&quot;&quot;;[.E165]&lt;&gt;&quot;&quot;);&quot;Brak Przerwy&quot;;IF(OR([.D165]&lt;&gt;&quot;&quot;;[.E16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6]&lt;&gt;&quot;&quot;;[.E166]&lt;&gt;&quot;&quot;);&quot;Brak Przerwy&quot;;IF(OR([.D166]&lt;&gt;&quot;&quot;;[.E16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7]&lt;&gt;&quot;&quot;;[.E167]&lt;&gt;&quot;&quot;);&quot;Brak Przerwy&quot;;IF(OR([.D167]&lt;&gt;&quot;&quot;;[.E16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8]&lt;&gt;&quot;&quot;;[.E168]&lt;&gt;&quot;&quot;);&quot;Brak Przerwy&quot;;IF(OR([.D168]&lt;&gt;&quot;&quot;;[.E16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69]&lt;&gt;&quot;&quot;;[.E169]&lt;&gt;&quot;&quot;);&quot;Brak Przerwy&quot;;IF(OR([.D169]&lt;&gt;&quot;&quot;;[.E16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0]&lt;&gt;&quot;&quot;;[.E170]&lt;&gt;&quot;&quot;);&quot;Brak Przerwy&quot;;IF(OR([.D170]&lt;&gt;&quot;&quot;;[.E17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1]&lt;&gt;&quot;&quot;;[.E171]&lt;&gt;&quot;&quot;);&quot;Brak Przerwy&quot;;IF(OR([.D171]&lt;&gt;&quot;&quot;;[.E17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2]&lt;&gt;&quot;&quot;;[.E172]&lt;&gt;&quot;&quot;);&quot;Brak Przerwy&quot;;IF(OR([.D172]&lt;&gt;&quot;&quot;;[.E17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3]&lt;&gt;&quot;&quot;;[.E173]&lt;&gt;&quot;&quot;);&quot;Brak Przerwy&quot;;IF(OR([.D173]&lt;&gt;&quot;&quot;;[.E17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4]&lt;&gt;&quot;&quot;;[.E174]&lt;&gt;&quot;&quot;);&quot;Brak Przerwy&quot;;IF(OR([.D174]&lt;&gt;&quot;&quot;;[.E17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5]&lt;&gt;&quot;&quot;;[.E175]&lt;&gt;&quot;&quot;);&quot;Brak Przerwy&quot;;IF(OR([.D175]&lt;&gt;&quot;&quot;;[.E17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6]&lt;&gt;&quot;&quot;;[.E176]&lt;&gt;&quot;&quot;);&quot;Brak Przerwy&quot;;IF(OR([.D176]&lt;&gt;&quot;&quot;;[.E17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7]&lt;&gt;&quot;&quot;;[.E177]&lt;&gt;&quot;&quot;);&quot;Brak Przerwy&quot;;IF(OR([.D177]&lt;&gt;&quot;&quot;;[.E17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8]&lt;&gt;&quot;&quot;;[.E178]&lt;&gt;&quot;&quot;);&quot;Brak Przerwy&quot;;IF(OR([.D178]&lt;&gt;&quot;&quot;;[.E17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79]&lt;&gt;&quot;&quot;;[.E179]&lt;&gt;&quot;&quot;);&quot;Brak Przerwy&quot;;IF(OR([.D179]&lt;&gt;&quot;&quot;;[.E17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0]&lt;&gt;&quot;&quot;;[.E180]&lt;&gt;&quot;&quot;);&quot;Brak Przerwy&quot;;IF(OR([.D180]&lt;&gt;&quot;&quot;;[.E18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1]&lt;&gt;&quot;&quot;;[.E181]&lt;&gt;&quot;&quot;);&quot;Brak Przerwy&quot;;IF(OR([.D181]&lt;&gt;&quot;&quot;;[.E18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2]&lt;&gt;&quot;&quot;;[.E182]&lt;&gt;&quot;&quot;);&quot;Brak Przerwy&quot;;IF(OR([.D182]&lt;&gt;&quot;&quot;;[.E18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3]&lt;&gt;&quot;&quot;;[.E183]&lt;&gt;&quot;&quot;);&quot;Brak Przerwy&quot;;IF(OR([.D183]&lt;&gt;&quot;&quot;;[.E18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4]&lt;&gt;&quot;&quot;;[.E184]&lt;&gt;&quot;&quot;);&quot;Brak Przerwy&quot;;IF(OR([.D184]&lt;&gt;&quot;&quot;;[.E18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5]&lt;&gt;&quot;&quot;;[.E185]&lt;&gt;&quot;&quot;);&quot;Brak Przerwy&quot;;IF(OR([.D185]&lt;&gt;&quot;&quot;;[.E18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6]&lt;&gt;&quot;&quot;;[.E186]&lt;&gt;&quot;&quot;);&quot;Brak Przerwy&quot;;IF(OR([.D186]&lt;&gt;&quot;&quot;;[.E18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7]&lt;&gt;&quot;&quot;;[.E187]&lt;&gt;&quot;&quot;);&quot;Brak Przerwy&quot;;IF(OR([.D187]&lt;&gt;&quot;&quot;;[.E18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8]&lt;&gt;&quot;&quot;;[.E188]&lt;&gt;&quot;&quot;);&quot;Brak Przerwy&quot;;IF(OR([.D188]&lt;&gt;&quot;&quot;;[.E18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89]&lt;&gt;&quot;&quot;;[.E189]&lt;&gt;&quot;&quot;);&quot;Brak Przerwy&quot;;IF(OR([.D189]&lt;&gt;&quot;&quot;;[.E18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0]&lt;&gt;&quot;&quot;;[.E190]&lt;&gt;&quot;&quot;);&quot;Brak Przerwy&quot;;IF(OR([.D190]&lt;&gt;&quot;&quot;;[.E19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1]&lt;&gt;&quot;&quot;;[.E191]&lt;&gt;&quot;&quot;);&quot;Brak Przerwy&quot;;IF(OR([.D191]&lt;&gt;&quot;&quot;;[.E19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2]&lt;&gt;&quot;&quot;;[.E192]&lt;&gt;&quot;&quot;);&quot;Brak Przerwy&quot;;IF(OR([.D192]&lt;&gt;&quot;&quot;;[.E19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3]&lt;&gt;&quot;&quot;;[.E193]&lt;&gt;&quot;&quot;);&quot;Brak Przerwy&quot;;IF(OR([.D193]&lt;&gt;&quot;&quot;;[.E19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4]&lt;&gt;&quot;&quot;;[.E194]&lt;&gt;&quot;&quot;);&quot;Brak Przerwy&quot;;IF(OR([.D194]&lt;&gt;&quot;&quot;;[.E19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5]&lt;&gt;&quot;&quot;;[.E195]&lt;&gt;&quot;&quot;);&quot;Brak Przerwy&quot;;IF(OR([.D195]&lt;&gt;&quot;&quot;;[.E19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6]&lt;&gt;&quot;&quot;;[.E196]&lt;&gt;&quot;&quot;);&quot;Brak Przerwy&quot;;IF(OR([.D196]&lt;&gt;&quot;&quot;;[.E19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7]&lt;&gt;&quot;&quot;;[.E197]&lt;&gt;&quot;&quot;);&quot;Brak Przerwy&quot;;IF(OR([.D197]&lt;&gt;&quot;&quot;;[.E19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8]&lt;&gt;&quot;&quot;;[.E198]&lt;&gt;&quot;&quot;);&quot;Brak Przerwy&quot;;IF(OR([.D198]&lt;&gt;&quot;&quot;;[.E19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199]&lt;&gt;&quot;&quot;;[.E199]&lt;&gt;&quot;&quot;);&quot;Brak Przerwy&quot;;IF(OR([.D199]&lt;&gt;&quot;&quot;;[.E19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0]&lt;&gt;&quot;&quot;;[.E200]&lt;&gt;&quot;&quot;);&quot;Brak Przerwy&quot;;IF(OR([.D200]&lt;&gt;&quot;&quot;;[.E20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1]&lt;&gt;&quot;&quot;;[.E201]&lt;&gt;&quot;&quot;);&quot;Brak Przerwy&quot;;IF(OR([.D201]&lt;&gt;&quot;&quot;;[.E20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2]&lt;&gt;&quot;&quot;;[.E202]&lt;&gt;&quot;&quot;);&quot;Brak Przerwy&quot;;IF(OR([.D202]&lt;&gt;&quot;&quot;;[.E20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3]&lt;&gt;&quot;&quot;;[.E203]&lt;&gt;&quot;&quot;);&quot;Brak Przerwy&quot;;IF(OR([.D203]&lt;&gt;&quot;&quot;;[.E20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4]&lt;&gt;&quot;&quot;;[.E204]&lt;&gt;&quot;&quot;);&quot;Brak Przerwy&quot;;IF(OR([.D204]&lt;&gt;&quot;&quot;;[.E20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5]&lt;&gt;&quot;&quot;;[.E205]&lt;&gt;&quot;&quot;);&quot;Brak Przerwy&quot;;IF(OR([.D205]&lt;&gt;&quot;&quot;;[.E20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6]&lt;&gt;&quot;&quot;;[.E206]&lt;&gt;&quot;&quot;);&quot;Brak Przerwy&quot;;IF(OR([.D206]&lt;&gt;&quot;&quot;;[.E20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7]&lt;&gt;&quot;&quot;;[.E207]&lt;&gt;&quot;&quot;);&quot;Brak Przerwy&quot;;IF(OR([.D207]&lt;&gt;&quot;&quot;;[.E20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8]&lt;&gt;&quot;&quot;;[.E208]&lt;&gt;&quot;&quot;);&quot;Brak Przerwy&quot;;IF(OR([.D208]&lt;&gt;&quot;&quot;;[.E20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09]&lt;&gt;&quot;&quot;;[.E209]&lt;&gt;&quot;&quot;);&quot;Brak Przerwy&quot;;IF(OR([.D209]&lt;&gt;&quot;&quot;;[.E20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0]&lt;&gt;&quot;&quot;;[.E210]&lt;&gt;&quot;&quot;);&quot;Brak Przerwy&quot;;IF(OR([.D210]&lt;&gt;&quot;&quot;;[.E21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1]&lt;&gt;&quot;&quot;;[.E211]&lt;&gt;&quot;&quot;);&quot;Brak Przerwy&quot;;IF(OR([.D211]&lt;&gt;&quot;&quot;;[.E21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2]&lt;&gt;&quot;&quot;;[.E212]&lt;&gt;&quot;&quot;);&quot;Brak Przerwy&quot;;IF(OR([.D212]&lt;&gt;&quot;&quot;;[.E21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3]&lt;&gt;&quot;&quot;;[.E213]&lt;&gt;&quot;&quot;);&quot;Brak Przerwy&quot;;IF(OR([.D213]&lt;&gt;&quot;&quot;;[.E21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4]&lt;&gt;&quot;&quot;;[.E214]&lt;&gt;&quot;&quot;);&quot;Brak Przerwy&quot;;IF(OR([.D214]&lt;&gt;&quot;&quot;;[.E21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5]&lt;&gt;&quot;&quot;;[.E215]&lt;&gt;&quot;&quot;);&quot;Brak Przerwy&quot;;IF(OR([.D215]&lt;&gt;&quot;&quot;;[.E21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6]&lt;&gt;&quot;&quot;;[.E216]&lt;&gt;&quot;&quot;);&quot;Brak Przerwy&quot;;IF(OR([.D216]&lt;&gt;&quot;&quot;;[.E21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7]&lt;&gt;&quot;&quot;;[.E217]&lt;&gt;&quot;&quot;);&quot;Brak Przerwy&quot;;IF(OR([.D217]&lt;&gt;&quot;&quot;;[.E21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8]&lt;&gt;&quot;&quot;;[.E218]&lt;&gt;&quot;&quot;);&quot;Brak Przerwy&quot;;IF(OR([.D218]&lt;&gt;&quot;&quot;;[.E21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19]&lt;&gt;&quot;&quot;;[.E219]&lt;&gt;&quot;&quot;);&quot;Brak Przerwy&quot;;IF(OR([.D219]&lt;&gt;&quot;&quot;;[.E21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0]&lt;&gt;&quot;&quot;;[.E220]&lt;&gt;&quot;&quot;);&quot;Brak Przerwy&quot;;IF(OR([.D220]&lt;&gt;&quot;&quot;;[.E22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1]&lt;&gt;&quot;&quot;;[.E221]&lt;&gt;&quot;&quot;);&quot;Brak Przerwy&quot;;IF(OR([.D221]&lt;&gt;&quot;&quot;;[.E22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2]&lt;&gt;&quot;&quot;;[.E222]&lt;&gt;&quot;&quot;);&quot;Brak Przerwy&quot;;IF(OR([.D222]&lt;&gt;&quot;&quot;;[.E22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3]&lt;&gt;&quot;&quot;;[.E223]&lt;&gt;&quot;&quot;);&quot;Brak Przerwy&quot;;IF(OR([.D223]&lt;&gt;&quot;&quot;;[.E22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4]&lt;&gt;&quot;&quot;;[.E224]&lt;&gt;&quot;&quot;);&quot;Brak Przerwy&quot;;IF(OR([.D224]&lt;&gt;&quot;&quot;;[.E22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5]&lt;&gt;&quot;&quot;;[.E225]&lt;&gt;&quot;&quot;);&quot;Brak Przerwy&quot;;IF(OR([.D225]&lt;&gt;&quot;&quot;;[.E22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6]&lt;&gt;&quot;&quot;;[.E226]&lt;&gt;&quot;&quot;);&quot;Brak Przerwy&quot;;IF(OR([.D226]&lt;&gt;&quot;&quot;;[.E22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7]&lt;&gt;&quot;&quot;;[.E227]&lt;&gt;&quot;&quot;);&quot;Brak Przerwy&quot;;IF(OR([.D227]&lt;&gt;&quot;&quot;;[.E22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8]&lt;&gt;&quot;&quot;;[.E228]&lt;&gt;&quot;&quot;);&quot;Brak Przerwy&quot;;IF(OR([.D228]&lt;&gt;&quot;&quot;;[.E22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29]&lt;&gt;&quot;&quot;;[.E229]&lt;&gt;&quot;&quot;);&quot;Brak Przerwy&quot;;IF(OR([.D229]&lt;&gt;&quot;&quot;;[.E22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0]&lt;&gt;&quot;&quot;;[.E230]&lt;&gt;&quot;&quot;);&quot;Brak Przerwy&quot;;IF(OR([.D230]&lt;&gt;&quot;&quot;;[.E23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1]&lt;&gt;&quot;&quot;;[.E231]&lt;&gt;&quot;&quot;);&quot;Brak Przerwy&quot;;IF(OR([.D231]&lt;&gt;&quot;&quot;;[.E23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2]&lt;&gt;&quot;&quot;;[.E232]&lt;&gt;&quot;&quot;);&quot;Brak Przerwy&quot;;IF(OR([.D232]&lt;&gt;&quot;&quot;;[.E23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3]&lt;&gt;&quot;&quot;;[.E233]&lt;&gt;&quot;&quot;);&quot;Brak Przerwy&quot;;IF(OR([.D233]&lt;&gt;&quot;&quot;;[.E23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4]&lt;&gt;&quot;&quot;;[.E234]&lt;&gt;&quot;&quot;);&quot;Brak Przerwy&quot;;IF(OR([.D234]&lt;&gt;&quot;&quot;;[.E23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5]&lt;&gt;&quot;&quot;;[.E235]&lt;&gt;&quot;&quot;);&quot;Brak Przerwy&quot;;IF(OR([.D235]&lt;&gt;&quot;&quot;;[.E23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6]&lt;&gt;&quot;&quot;;[.E236]&lt;&gt;&quot;&quot;);&quot;Brak Przerwy&quot;;IF(OR([.D236]&lt;&gt;&quot;&quot;;[.E23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7]&lt;&gt;&quot;&quot;;[.E237]&lt;&gt;&quot;&quot;);&quot;Brak Przerwy&quot;;IF(OR([.D237]&lt;&gt;&quot;&quot;;[.E23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8]&lt;&gt;&quot;&quot;;[.E238]&lt;&gt;&quot;&quot;);&quot;Brak Przerwy&quot;;IF(OR([.D238]&lt;&gt;&quot;&quot;;[.E23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39]&lt;&gt;&quot;&quot;;[.E239]&lt;&gt;&quot;&quot;);&quot;Brak Przerwy&quot;;IF(OR([.D239]&lt;&gt;&quot;&quot;;[.E23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0]&lt;&gt;&quot;&quot;;[.E240]&lt;&gt;&quot;&quot;);&quot;Brak Przerwy&quot;;IF(OR([.D240]&lt;&gt;&quot;&quot;;[.E24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1]&lt;&gt;&quot;&quot;;[.E241]&lt;&gt;&quot;&quot;);&quot;Brak Przerwy&quot;;IF(OR([.D241]&lt;&gt;&quot;&quot;;[.E24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2]&lt;&gt;&quot;&quot;;[.E242]&lt;&gt;&quot;&quot;);&quot;Brak Przerwy&quot;;IF(OR([.D242]&lt;&gt;&quot;&quot;;[.E24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3]&lt;&gt;&quot;&quot;;[.E243]&lt;&gt;&quot;&quot;);&quot;Brak Przerwy&quot;;IF(OR([.D243]&lt;&gt;&quot;&quot;;[.E24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4]&lt;&gt;&quot;&quot;;[.E244]&lt;&gt;&quot;&quot;);&quot;Brak Przerwy&quot;;IF(OR([.D244]&lt;&gt;&quot;&quot;;[.E24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5]&lt;&gt;&quot;&quot;;[.E245]&lt;&gt;&quot;&quot;);&quot;Brak Przerwy&quot;;IF(OR([.D245]&lt;&gt;&quot;&quot;;[.E24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6]&lt;&gt;&quot;&quot;;[.E246]&lt;&gt;&quot;&quot;);&quot;Brak Przerwy&quot;;IF(OR([.D246]&lt;&gt;&quot;&quot;;[.E24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7]&lt;&gt;&quot;&quot;;[.E247]&lt;&gt;&quot;&quot;);&quot;Brak Przerwy&quot;;IF(OR([.D247]&lt;&gt;&quot;&quot;;[.E24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8]&lt;&gt;&quot;&quot;;[.E248]&lt;&gt;&quot;&quot;);&quot;Brak Przerwy&quot;;IF(OR([.D248]&lt;&gt;&quot;&quot;;[.E24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49]&lt;&gt;&quot;&quot;;[.E249]&lt;&gt;&quot;&quot;);&quot;Brak Przerwy&quot;;IF(OR([.D249]&lt;&gt;&quot;&quot;;[.E24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0]&lt;&gt;&quot;&quot;;[.E250]&lt;&gt;&quot;&quot;);&quot;Brak Przerwy&quot;;IF(OR([.D250]&lt;&gt;&quot;&quot;;[.E25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1]&lt;&gt;&quot;&quot;;[.E251]&lt;&gt;&quot;&quot;);&quot;Brak Przerwy&quot;;IF(OR([.D251]&lt;&gt;&quot;&quot;;[.E25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2]&lt;&gt;&quot;&quot;;[.E252]&lt;&gt;&quot;&quot;);&quot;Brak Przerwy&quot;;IF(OR([.D252]&lt;&gt;&quot;&quot;;[.E25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3]&lt;&gt;&quot;&quot;;[.E253]&lt;&gt;&quot;&quot;);&quot;Brak Przerwy&quot;;IF(OR([.D253]&lt;&gt;&quot;&quot;;[.E25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4]&lt;&gt;&quot;&quot;;[.E254]&lt;&gt;&quot;&quot;);&quot;Brak Przerwy&quot;;IF(OR([.D254]&lt;&gt;&quot;&quot;;[.E25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5]&lt;&gt;&quot;&quot;;[.E255]&lt;&gt;&quot;&quot;);&quot;Brak Przerwy&quot;;IF(OR([.D255]&lt;&gt;&quot;&quot;;[.E25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6]&lt;&gt;&quot;&quot;;[.E256]&lt;&gt;&quot;&quot;);&quot;Brak Przerwy&quot;;IF(OR([.D256]&lt;&gt;&quot;&quot;;[.E25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7]&lt;&gt;&quot;&quot;;[.E257]&lt;&gt;&quot;&quot;);&quot;Brak Przerwy&quot;;IF(OR([.D257]&lt;&gt;&quot;&quot;;[.E25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8]&lt;&gt;&quot;&quot;;[.E258]&lt;&gt;&quot;&quot;);&quot;Brak Przerwy&quot;;IF(OR([.D258]&lt;&gt;&quot;&quot;;[.E25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59]&lt;&gt;&quot;&quot;;[.E259]&lt;&gt;&quot;&quot;);&quot;Brak Przerwy&quot;;IF(OR([.D259]&lt;&gt;&quot;&quot;;[.E25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0]&lt;&gt;&quot;&quot;;[.E260]&lt;&gt;&quot;&quot;);&quot;Brak Przerwy&quot;;IF(OR([.D260]&lt;&gt;&quot;&quot;;[.E26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1]&lt;&gt;&quot;&quot;;[.E261]&lt;&gt;&quot;&quot;);&quot;Brak Przerwy&quot;;IF(OR([.D261]&lt;&gt;&quot;&quot;;[.E26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2]&lt;&gt;&quot;&quot;;[.E262]&lt;&gt;&quot;&quot;);&quot;Brak Przerwy&quot;;IF(OR([.D262]&lt;&gt;&quot;&quot;;[.E26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3]&lt;&gt;&quot;&quot;;[.E263]&lt;&gt;&quot;&quot;);&quot;Brak Przerwy&quot;;IF(OR([.D263]&lt;&gt;&quot;&quot;;[.E26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4]&lt;&gt;&quot;&quot;;[.E264]&lt;&gt;&quot;&quot;);&quot;Brak Przerwy&quot;;IF(OR([.D264]&lt;&gt;&quot;&quot;;[.E26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5]&lt;&gt;&quot;&quot;;[.E265]&lt;&gt;&quot;&quot;);&quot;Brak Przerwy&quot;;IF(OR([.D265]&lt;&gt;&quot;&quot;;[.E26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6]&lt;&gt;&quot;&quot;;[.E266]&lt;&gt;&quot;&quot;);&quot;Brak Przerwy&quot;;IF(OR([.D266]&lt;&gt;&quot;&quot;;[.E26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7]&lt;&gt;&quot;&quot;;[.E267]&lt;&gt;&quot;&quot;);&quot;Brak Przerwy&quot;;IF(OR([.D267]&lt;&gt;&quot;&quot;;[.E26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8]&lt;&gt;&quot;&quot;;[.E268]&lt;&gt;&quot;&quot;);&quot;Brak Przerwy&quot;;IF(OR([.D268]&lt;&gt;&quot;&quot;;[.E26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69]&lt;&gt;&quot;&quot;;[.E269]&lt;&gt;&quot;&quot;);&quot;Brak Przerwy&quot;;IF(OR([.D269]&lt;&gt;&quot;&quot;;[.E26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0]&lt;&gt;&quot;&quot;;[.E270]&lt;&gt;&quot;&quot;);&quot;Brak Przerwy&quot;;IF(OR([.D270]&lt;&gt;&quot;&quot;;[.E27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1]&lt;&gt;&quot;&quot;;[.E271]&lt;&gt;&quot;&quot;);&quot;Brak Przerwy&quot;;IF(OR([.D271]&lt;&gt;&quot;&quot;;[.E27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2]&lt;&gt;&quot;&quot;;[.E272]&lt;&gt;&quot;&quot;);&quot;Brak Przerwy&quot;;IF(OR([.D272]&lt;&gt;&quot;&quot;;[.E27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3]&lt;&gt;&quot;&quot;;[.E273]&lt;&gt;&quot;&quot;);&quot;Brak Przerwy&quot;;IF(OR([.D273]&lt;&gt;&quot;&quot;;[.E27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4]&lt;&gt;&quot;&quot;;[.E274]&lt;&gt;&quot;&quot;);&quot;Brak Przerwy&quot;;IF(OR([.D274]&lt;&gt;&quot;&quot;;[.E27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5]&lt;&gt;&quot;&quot;;[.E275]&lt;&gt;&quot;&quot;);&quot;Brak Przerwy&quot;;IF(OR([.D275]&lt;&gt;&quot;&quot;;[.E27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6]&lt;&gt;&quot;&quot;;[.E276]&lt;&gt;&quot;&quot;);&quot;Brak Przerwy&quot;;IF(OR([.D276]&lt;&gt;&quot;&quot;;[.E27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7]&lt;&gt;&quot;&quot;;[.E277]&lt;&gt;&quot;&quot;);&quot;Brak Przerwy&quot;;IF(OR([.D277]&lt;&gt;&quot;&quot;;[.E27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8]&lt;&gt;&quot;&quot;;[.E278]&lt;&gt;&quot;&quot;);&quot;Brak Przerwy&quot;;IF(OR([.D278]&lt;&gt;&quot;&quot;;[.E27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79]&lt;&gt;&quot;&quot;;[.E279]&lt;&gt;&quot;&quot;);&quot;Brak Przerwy&quot;;IF(OR([.D279]&lt;&gt;&quot;&quot;;[.E27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0]&lt;&gt;&quot;&quot;;[.E280]&lt;&gt;&quot;&quot;);&quot;Brak Przerwy&quot;;IF(OR([.D280]&lt;&gt;&quot;&quot;;[.E28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1]&lt;&gt;&quot;&quot;;[.E281]&lt;&gt;&quot;&quot;);&quot;Brak Przerwy&quot;;IF(OR([.D281]&lt;&gt;&quot;&quot;;[.E28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2]&lt;&gt;&quot;&quot;;[.E282]&lt;&gt;&quot;&quot;);&quot;Brak Przerwy&quot;;IF(OR([.D282]&lt;&gt;&quot;&quot;;[.E28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3]&lt;&gt;&quot;&quot;;[.E283]&lt;&gt;&quot;&quot;);&quot;Brak Przerwy&quot;;IF(OR([.D283]&lt;&gt;&quot;&quot;;[.E28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4]&lt;&gt;&quot;&quot;;[.E284]&lt;&gt;&quot;&quot;);&quot;Brak Przerwy&quot;;IF(OR([.D284]&lt;&gt;&quot;&quot;;[.E28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5]&lt;&gt;&quot;&quot;;[.E285]&lt;&gt;&quot;&quot;);&quot;Brak Przerwy&quot;;IF(OR([.D285]&lt;&gt;&quot;&quot;;[.E28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6]&lt;&gt;&quot;&quot;;[.E286]&lt;&gt;&quot;&quot;);&quot;Brak Przerwy&quot;;IF(OR([.D286]&lt;&gt;&quot;&quot;;[.E28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7]&lt;&gt;&quot;&quot;;[.E287]&lt;&gt;&quot;&quot;);&quot;Brak Przerwy&quot;;IF(OR([.D287]&lt;&gt;&quot;&quot;;[.E28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8]&lt;&gt;&quot;&quot;;[.E288]&lt;&gt;&quot;&quot;);&quot;Brak Przerwy&quot;;IF(OR([.D288]&lt;&gt;&quot;&quot;;[.E28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89]&lt;&gt;&quot;&quot;;[.E289]&lt;&gt;&quot;&quot;);&quot;Brak Przerwy&quot;;IF(OR([.D289]&lt;&gt;&quot;&quot;;[.E28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0]&lt;&gt;&quot;&quot;;[.E290]&lt;&gt;&quot;&quot;);&quot;Brak Przerwy&quot;;IF(OR([.D290]&lt;&gt;&quot;&quot;;[.E29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1]&lt;&gt;&quot;&quot;;[.E291]&lt;&gt;&quot;&quot;);&quot;Brak Przerwy&quot;;IF(OR([.D291]&lt;&gt;&quot;&quot;;[.E29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2]&lt;&gt;&quot;&quot;;[.E292]&lt;&gt;&quot;&quot;);&quot;Brak Przerwy&quot;;IF(OR([.D292]&lt;&gt;&quot;&quot;;[.E29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3]&lt;&gt;&quot;&quot;;[.E293]&lt;&gt;&quot;&quot;);&quot;Brak Przerwy&quot;;IF(OR([.D293]&lt;&gt;&quot;&quot;;[.E29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4]&lt;&gt;&quot;&quot;;[.E294]&lt;&gt;&quot;&quot;);&quot;Brak Przerwy&quot;;IF(OR([.D294]&lt;&gt;&quot;&quot;;[.E29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5]&lt;&gt;&quot;&quot;;[.E295]&lt;&gt;&quot;&quot;);&quot;Brak Przerwy&quot;;IF(OR([.D295]&lt;&gt;&quot;&quot;;[.E29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6]&lt;&gt;&quot;&quot;;[.E296]&lt;&gt;&quot;&quot;);&quot;Brak Przerwy&quot;;IF(OR([.D296]&lt;&gt;&quot;&quot;;[.E29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7]&lt;&gt;&quot;&quot;;[.E297]&lt;&gt;&quot;&quot;);&quot;Brak Przerwy&quot;;IF(OR([.D297]&lt;&gt;&quot;&quot;;[.E29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8]&lt;&gt;&quot;&quot;;[.E298]&lt;&gt;&quot;&quot;);&quot;Brak Przerwy&quot;;IF(OR([.D298]&lt;&gt;&quot;&quot;;[.E29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299]&lt;&gt;&quot;&quot;;[.E299]&lt;&gt;&quot;&quot;);&quot;Brak Przerwy&quot;;IF(OR([.D299]&lt;&gt;&quot;&quot;;[.E29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0]&lt;&gt;&quot;&quot;;[.E300]&lt;&gt;&quot;&quot;);&quot;Brak Przerwy&quot;;IF(OR([.D300]&lt;&gt;&quot;&quot;;[.E30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1]&lt;&gt;&quot;&quot;;[.E301]&lt;&gt;&quot;&quot;);&quot;Brak Przerwy&quot;;IF(OR([.D301]&lt;&gt;&quot;&quot;;[.E30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2]&lt;&gt;&quot;&quot;;[.E302]&lt;&gt;&quot;&quot;);&quot;Brak Przerwy&quot;;IF(OR([.D302]&lt;&gt;&quot;&quot;;[.E30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3]&lt;&gt;&quot;&quot;;[.E303]&lt;&gt;&quot;&quot;);&quot;Brak Przerwy&quot;;IF(OR([.D303]&lt;&gt;&quot;&quot;;[.E30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4]&lt;&gt;&quot;&quot;;[.E304]&lt;&gt;&quot;&quot;);&quot;Brak Przerwy&quot;;IF(OR([.D304]&lt;&gt;&quot;&quot;;[.E30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5]&lt;&gt;&quot;&quot;;[.E305]&lt;&gt;&quot;&quot;);&quot;Brak Przerwy&quot;;IF(OR([.D305]&lt;&gt;&quot;&quot;;[.E30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6]&lt;&gt;&quot;&quot;;[.E306]&lt;&gt;&quot;&quot;);&quot;Brak Przerwy&quot;;IF(OR([.D306]&lt;&gt;&quot;&quot;;[.E30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7]&lt;&gt;&quot;&quot;;[.E307]&lt;&gt;&quot;&quot;);&quot;Brak Przerwy&quot;;IF(OR([.D307]&lt;&gt;&quot;&quot;;[.E30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8]&lt;&gt;&quot;&quot;;[.E308]&lt;&gt;&quot;&quot;);&quot;Brak Przerwy&quot;;IF(OR([.D308]&lt;&gt;&quot;&quot;;[.E30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09]&lt;&gt;&quot;&quot;;[.E309]&lt;&gt;&quot;&quot;);&quot;Brak Przerwy&quot;;IF(OR([.D309]&lt;&gt;&quot;&quot;;[.E30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0]&lt;&gt;&quot;&quot;;[.E310]&lt;&gt;&quot;&quot;);&quot;Brak Przerwy&quot;;IF(OR([.D310]&lt;&gt;&quot;&quot;;[.E31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1]&lt;&gt;&quot;&quot;;[.E311]&lt;&gt;&quot;&quot;);&quot;Brak Przerwy&quot;;IF(OR([.D311]&lt;&gt;&quot;&quot;;[.E31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2]&lt;&gt;&quot;&quot;;[.E312]&lt;&gt;&quot;&quot;);&quot;Brak Przerwy&quot;;IF(OR([.D312]&lt;&gt;&quot;&quot;;[.E31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3]&lt;&gt;&quot;&quot;;[.E313]&lt;&gt;&quot;&quot;);&quot;Brak Przerwy&quot;;IF(OR([.D313]&lt;&gt;&quot;&quot;;[.E31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4]&lt;&gt;&quot;&quot;;[.E314]&lt;&gt;&quot;&quot;);&quot;Brak Przerwy&quot;;IF(OR([.D314]&lt;&gt;&quot;&quot;;[.E31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5]&lt;&gt;&quot;&quot;;[.E315]&lt;&gt;&quot;&quot;);&quot;Brak Przerwy&quot;;IF(OR([.D315]&lt;&gt;&quot;&quot;;[.E31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6]&lt;&gt;&quot;&quot;;[.E316]&lt;&gt;&quot;&quot;);&quot;Brak Przerwy&quot;;IF(OR([.D316]&lt;&gt;&quot;&quot;;[.E31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7]&lt;&gt;&quot;&quot;;[.E317]&lt;&gt;&quot;&quot;);&quot;Brak Przerwy&quot;;IF(OR([.D317]&lt;&gt;&quot;&quot;;[.E31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8]&lt;&gt;&quot;&quot;;[.E318]&lt;&gt;&quot;&quot;);&quot;Brak Przerwy&quot;;IF(OR([.D318]&lt;&gt;&quot;&quot;;[.E31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19]&lt;&gt;&quot;&quot;;[.E319]&lt;&gt;&quot;&quot;);&quot;Brak Przerwy&quot;;IF(OR([.D319]&lt;&gt;&quot;&quot;;[.E31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0]&lt;&gt;&quot;&quot;;[.E320]&lt;&gt;&quot;&quot;);&quot;Brak Przerwy&quot;;IF(OR([.D320]&lt;&gt;&quot;&quot;;[.E32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1]&lt;&gt;&quot;&quot;;[.E321]&lt;&gt;&quot;&quot;);&quot;Brak Przerwy&quot;;IF(OR([.D321]&lt;&gt;&quot;&quot;;[.E32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2]&lt;&gt;&quot;&quot;;[.E322]&lt;&gt;&quot;&quot;);&quot;Brak Przerwy&quot;;IF(OR([.D322]&lt;&gt;&quot;&quot;;[.E32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3]&lt;&gt;&quot;&quot;;[.E323]&lt;&gt;&quot;&quot;);&quot;Brak Przerwy&quot;;IF(OR([.D323]&lt;&gt;&quot;&quot;;[.E32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4]&lt;&gt;&quot;&quot;;[.E324]&lt;&gt;&quot;&quot;);&quot;Brak Przerwy&quot;;IF(OR([.D324]&lt;&gt;&quot;&quot;;[.E32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5]&lt;&gt;&quot;&quot;;[.E325]&lt;&gt;&quot;&quot;);&quot;Brak Przerwy&quot;;IF(OR([.D325]&lt;&gt;&quot;&quot;;[.E32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6]&lt;&gt;&quot;&quot;;[.E326]&lt;&gt;&quot;&quot;);&quot;Brak Przerwy&quot;;IF(OR([.D326]&lt;&gt;&quot;&quot;;[.E32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7]&lt;&gt;&quot;&quot;;[.E327]&lt;&gt;&quot;&quot;);&quot;Brak Przerwy&quot;;IF(OR([.D327]&lt;&gt;&quot;&quot;;[.E32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8]&lt;&gt;&quot;&quot;;[.E328]&lt;&gt;&quot;&quot;);&quot;Brak Przerwy&quot;;IF(OR([.D328]&lt;&gt;&quot;&quot;;[.E32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29]&lt;&gt;&quot;&quot;;[.E329]&lt;&gt;&quot;&quot;);&quot;Brak Przerwy&quot;;IF(OR([.D329]&lt;&gt;&quot;&quot;;[.E32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0]&lt;&gt;&quot;&quot;;[.E330]&lt;&gt;&quot;&quot;);&quot;Brak Przerwy&quot;;IF(OR([.D330]&lt;&gt;&quot;&quot;;[.E33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1]&lt;&gt;&quot;&quot;;[.E331]&lt;&gt;&quot;&quot;);&quot;Brak Przerwy&quot;;IF(OR([.D331]&lt;&gt;&quot;&quot;;[.E33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2]&lt;&gt;&quot;&quot;;[.E332]&lt;&gt;&quot;&quot;);&quot;Brak Przerwy&quot;;IF(OR([.D332]&lt;&gt;&quot;&quot;;[.E33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3]&lt;&gt;&quot;&quot;;[.E333]&lt;&gt;&quot;&quot;);&quot;Brak Przerwy&quot;;IF(OR([.D333]&lt;&gt;&quot;&quot;;[.E33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4]&lt;&gt;&quot;&quot;;[.E334]&lt;&gt;&quot;&quot;);&quot;Brak Przerwy&quot;;IF(OR([.D334]&lt;&gt;&quot;&quot;;[.E33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5]&lt;&gt;&quot;&quot;;[.E335]&lt;&gt;&quot;&quot;);&quot;Brak Przerwy&quot;;IF(OR([.D335]&lt;&gt;&quot;&quot;;[.E33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6]&lt;&gt;&quot;&quot;;[.E336]&lt;&gt;&quot;&quot;);&quot;Brak Przerwy&quot;;IF(OR([.D336]&lt;&gt;&quot;&quot;;[.E33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7]&lt;&gt;&quot;&quot;;[.E337]&lt;&gt;&quot;&quot;);&quot;Brak Przerwy&quot;;IF(OR([.D337]&lt;&gt;&quot;&quot;;[.E33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8]&lt;&gt;&quot;&quot;;[.E338]&lt;&gt;&quot;&quot;);&quot;Brak Przerwy&quot;;IF(OR([.D338]&lt;&gt;&quot;&quot;;[.E33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39]&lt;&gt;&quot;&quot;;[.E339]&lt;&gt;&quot;&quot;);&quot;Brak Przerwy&quot;;IF(OR([.D339]&lt;&gt;&quot;&quot;;[.E33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0]&lt;&gt;&quot;&quot;;[.E340]&lt;&gt;&quot;&quot;);&quot;Brak Przerwy&quot;;IF(OR([.D340]&lt;&gt;&quot;&quot;;[.E34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1]&lt;&gt;&quot;&quot;;[.E341]&lt;&gt;&quot;&quot;);&quot;Brak Przerwy&quot;;IF(OR([.D341]&lt;&gt;&quot;&quot;;[.E34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2]&lt;&gt;&quot;&quot;;[.E342]&lt;&gt;&quot;&quot;);&quot;Brak Przerwy&quot;;IF(OR([.D342]&lt;&gt;&quot;&quot;;[.E34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3]&lt;&gt;&quot;&quot;;[.E343]&lt;&gt;&quot;&quot;);&quot;Brak Przerwy&quot;;IF(OR([.D343]&lt;&gt;&quot;&quot;;[.E34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4]&lt;&gt;&quot;&quot;;[.E344]&lt;&gt;&quot;&quot;);&quot;Brak Przerwy&quot;;IF(OR([.D344]&lt;&gt;&quot;&quot;;[.E34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5]&lt;&gt;&quot;&quot;;[.E345]&lt;&gt;&quot;&quot;);&quot;Brak Przerwy&quot;;IF(OR([.D345]&lt;&gt;&quot;&quot;;[.E34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6]&lt;&gt;&quot;&quot;;[.E346]&lt;&gt;&quot;&quot;);&quot;Brak Przerwy&quot;;IF(OR([.D346]&lt;&gt;&quot;&quot;;[.E34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7]&lt;&gt;&quot;&quot;;[.E347]&lt;&gt;&quot;&quot;);&quot;Brak Przerwy&quot;;IF(OR([.D347]&lt;&gt;&quot;&quot;;[.E34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8]&lt;&gt;&quot;&quot;;[.E348]&lt;&gt;&quot;&quot;);&quot;Brak Przerwy&quot;;IF(OR([.D348]&lt;&gt;&quot;&quot;;[.E34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49]&lt;&gt;&quot;&quot;;[.E349]&lt;&gt;&quot;&quot;);&quot;Brak Przerwy&quot;;IF(OR([.D349]&lt;&gt;&quot;&quot;;[.E34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0]&lt;&gt;&quot;&quot;;[.E350]&lt;&gt;&quot;&quot;);&quot;Brak Przerwy&quot;;IF(OR([.D350]&lt;&gt;&quot;&quot;;[.E35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1]&lt;&gt;&quot;&quot;;[.E351]&lt;&gt;&quot;&quot;);&quot;Brak Przerwy&quot;;IF(OR([.D351]&lt;&gt;&quot;&quot;;[.E35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2]&lt;&gt;&quot;&quot;;[.E352]&lt;&gt;&quot;&quot;);&quot;Brak Przerwy&quot;;IF(OR([.D352]&lt;&gt;&quot;&quot;;[.E35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3]&lt;&gt;&quot;&quot;;[.E353]&lt;&gt;&quot;&quot;);&quot;Brak Przerwy&quot;;IF(OR([.D353]&lt;&gt;&quot;&quot;;[.E35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4]&lt;&gt;&quot;&quot;;[.E354]&lt;&gt;&quot;&quot;);&quot;Brak Przerwy&quot;;IF(OR([.D354]&lt;&gt;&quot;&quot;;[.E35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5]&lt;&gt;&quot;&quot;;[.E355]&lt;&gt;&quot;&quot;);&quot;Brak Przerwy&quot;;IF(OR([.D355]&lt;&gt;&quot;&quot;;[.E35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6]&lt;&gt;&quot;&quot;;[.E356]&lt;&gt;&quot;&quot;);&quot;Brak Przerwy&quot;;IF(OR([.D356]&lt;&gt;&quot;&quot;;[.E35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7]&lt;&gt;&quot;&quot;;[.E357]&lt;&gt;&quot;&quot;);&quot;Brak Przerwy&quot;;IF(OR([.D357]&lt;&gt;&quot;&quot;;[.E35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8]&lt;&gt;&quot;&quot;;[.E358]&lt;&gt;&quot;&quot;);&quot;Brak Przerwy&quot;;IF(OR([.D358]&lt;&gt;&quot;&quot;;[.E35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59]&lt;&gt;&quot;&quot;;[.E359]&lt;&gt;&quot;&quot;);&quot;Brak Przerwy&quot;;IF(OR([.D359]&lt;&gt;&quot;&quot;;[.E35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0]&lt;&gt;&quot;&quot;;[.E360]&lt;&gt;&quot;&quot;);&quot;Brak Przerwy&quot;;IF(OR([.D360]&lt;&gt;&quot;&quot;;[.E36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1]&lt;&gt;&quot;&quot;;[.E361]&lt;&gt;&quot;&quot;);&quot;Brak Przerwy&quot;;IF(OR([.D361]&lt;&gt;&quot;&quot;;[.E36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2]&lt;&gt;&quot;&quot;;[.E362]&lt;&gt;&quot;&quot;);&quot;Brak Przerwy&quot;;IF(OR([.D362]&lt;&gt;&quot;&quot;;[.E36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3]&lt;&gt;&quot;&quot;;[.E363]&lt;&gt;&quot;&quot;);&quot;Brak Przerwy&quot;;IF(OR([.D363]&lt;&gt;&quot;&quot;;[.E36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4]&lt;&gt;&quot;&quot;;[.E364]&lt;&gt;&quot;&quot;);&quot;Brak Przerwy&quot;;IF(OR([.D364]&lt;&gt;&quot;&quot;;[.E36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5]&lt;&gt;&quot;&quot;;[.E365]&lt;&gt;&quot;&quot;);&quot;Brak Przerwy&quot;;IF(OR([.D365]&lt;&gt;&quot;&quot;;[.E36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6]&lt;&gt;&quot;&quot;;[.E366]&lt;&gt;&quot;&quot;);&quot;Brak Przerwy&quot;;IF(OR([.D366]&lt;&gt;&quot;&quot;;[.E36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7]&lt;&gt;&quot;&quot;;[.E367]&lt;&gt;&quot;&quot;);&quot;Brak Przerwy&quot;;IF(OR([.D367]&lt;&gt;&quot;&quot;;[.E36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8]&lt;&gt;&quot;&quot;;[.E368]&lt;&gt;&quot;&quot;);&quot;Brak Przerwy&quot;;IF(OR([.D368]&lt;&gt;&quot;&quot;;[.E36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69]&lt;&gt;&quot;&quot;;[.E369]&lt;&gt;&quot;&quot;);&quot;Brak Przerwy&quot;;IF(OR([.D369]&lt;&gt;&quot;&quot;;[.E36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0]&lt;&gt;&quot;&quot;;[.E370]&lt;&gt;&quot;&quot;);&quot;Brak Przerwy&quot;;IF(OR([.D370]&lt;&gt;&quot;&quot;;[.E37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1]&lt;&gt;&quot;&quot;;[.E371]&lt;&gt;&quot;&quot;);&quot;Brak Przerwy&quot;;IF(OR([.D371]&lt;&gt;&quot;&quot;;[.E37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2]&lt;&gt;&quot;&quot;;[.E372]&lt;&gt;&quot;&quot;);&quot;Brak Przerwy&quot;;IF(OR([.D372]&lt;&gt;&quot;&quot;;[.E37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3]&lt;&gt;&quot;&quot;;[.E373]&lt;&gt;&quot;&quot;);&quot;Brak Przerwy&quot;;IF(OR([.D373]&lt;&gt;&quot;&quot;;[.E37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4]&lt;&gt;&quot;&quot;;[.E374]&lt;&gt;&quot;&quot;);&quot;Brak Przerwy&quot;;IF(OR([.D374]&lt;&gt;&quot;&quot;;[.E37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5]&lt;&gt;&quot;&quot;;[.E375]&lt;&gt;&quot;&quot;);&quot;Brak Przerwy&quot;;IF(OR([.D375]&lt;&gt;&quot;&quot;;[.E37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6]&lt;&gt;&quot;&quot;;[.E376]&lt;&gt;&quot;&quot;);&quot;Brak Przerwy&quot;;IF(OR([.D376]&lt;&gt;&quot;&quot;;[.E37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7]&lt;&gt;&quot;&quot;;[.E377]&lt;&gt;&quot;&quot;);&quot;Brak Przerwy&quot;;IF(OR([.D377]&lt;&gt;&quot;&quot;;[.E37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8]&lt;&gt;&quot;&quot;;[.E378]&lt;&gt;&quot;&quot;);&quot;Brak Przerwy&quot;;IF(OR([.D378]&lt;&gt;&quot;&quot;;[.E37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79]&lt;&gt;&quot;&quot;;[.E379]&lt;&gt;&quot;&quot;);&quot;Brak Przerwy&quot;;IF(OR([.D379]&lt;&gt;&quot;&quot;;[.E37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0]&lt;&gt;&quot;&quot;;[.E380]&lt;&gt;&quot;&quot;);&quot;Brak Przerwy&quot;;IF(OR([.D380]&lt;&gt;&quot;&quot;;[.E38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1]&lt;&gt;&quot;&quot;;[.E381]&lt;&gt;&quot;&quot;);&quot;Brak Przerwy&quot;;IF(OR([.D381]&lt;&gt;&quot;&quot;;[.E38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2]&lt;&gt;&quot;&quot;;[.E382]&lt;&gt;&quot;&quot;);&quot;Brak Przerwy&quot;;IF(OR([.D382]&lt;&gt;&quot;&quot;;[.E38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3]&lt;&gt;&quot;&quot;;[.E383]&lt;&gt;&quot;&quot;);&quot;Brak Przerwy&quot;;IF(OR([.D383]&lt;&gt;&quot;&quot;;[.E38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4]&lt;&gt;&quot;&quot;;[.E384]&lt;&gt;&quot;&quot;);&quot;Brak Przerwy&quot;;IF(OR([.D384]&lt;&gt;&quot;&quot;;[.E38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5]&lt;&gt;&quot;&quot;;[.E385]&lt;&gt;&quot;&quot;);&quot;Brak Przerwy&quot;;IF(OR([.D385]&lt;&gt;&quot;&quot;;[.E38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6]&lt;&gt;&quot;&quot;;[.E386]&lt;&gt;&quot;&quot;);&quot;Brak Przerwy&quot;;IF(OR([.D386]&lt;&gt;&quot;&quot;;[.E38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7]&lt;&gt;&quot;&quot;;[.E387]&lt;&gt;&quot;&quot;);&quot;Brak Przerwy&quot;;IF(OR([.D387]&lt;&gt;&quot;&quot;;[.E38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8]&lt;&gt;&quot;&quot;;[.E388]&lt;&gt;&quot;&quot;);&quot;Brak Przerwy&quot;;IF(OR([.D388]&lt;&gt;&quot;&quot;;[.E38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89]&lt;&gt;&quot;&quot;;[.E389]&lt;&gt;&quot;&quot;);&quot;Brak Przerwy&quot;;IF(OR([.D389]&lt;&gt;&quot;&quot;;[.E38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0]&lt;&gt;&quot;&quot;;[.E390]&lt;&gt;&quot;&quot;);&quot;Brak Przerwy&quot;;IF(OR([.D390]&lt;&gt;&quot;&quot;;[.E39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1]&lt;&gt;&quot;&quot;;[.E391]&lt;&gt;&quot;&quot;);&quot;Brak Przerwy&quot;;IF(OR([.D391]&lt;&gt;&quot;&quot;;[.E39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2]&lt;&gt;&quot;&quot;;[.E392]&lt;&gt;&quot;&quot;);&quot;Brak Przerwy&quot;;IF(OR([.D392]&lt;&gt;&quot;&quot;;[.E39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3]&lt;&gt;&quot;&quot;;[.E393]&lt;&gt;&quot;&quot;);&quot;Brak Przerwy&quot;;IF(OR([.D393]&lt;&gt;&quot;&quot;;[.E39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4]&lt;&gt;&quot;&quot;;[.E394]&lt;&gt;&quot;&quot;);&quot;Brak Przerwy&quot;;IF(OR([.D394]&lt;&gt;&quot;&quot;;[.E39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5]&lt;&gt;&quot;&quot;;[.E395]&lt;&gt;&quot;&quot;);&quot;Brak Przerwy&quot;;IF(OR([.D395]&lt;&gt;&quot;&quot;;[.E39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6]&lt;&gt;&quot;&quot;;[.E396]&lt;&gt;&quot;&quot;);&quot;Brak Przerwy&quot;;IF(OR([.D396]&lt;&gt;&quot;&quot;;[.E39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7]&lt;&gt;&quot;&quot;;[.E397]&lt;&gt;&quot;&quot;);&quot;Brak Przerwy&quot;;IF(OR([.D397]&lt;&gt;&quot;&quot;;[.E39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8]&lt;&gt;&quot;&quot;;[.E398]&lt;&gt;&quot;&quot;);&quot;Brak Przerwy&quot;;IF(OR([.D398]&lt;&gt;&quot;&quot;;[.E39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399]&lt;&gt;&quot;&quot;;[.E399]&lt;&gt;&quot;&quot;);&quot;Brak Przerwy&quot;;IF(OR([.D399]&lt;&gt;&quot;&quot;;[.E39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0]&lt;&gt;&quot;&quot;;[.E400]&lt;&gt;&quot;&quot;);&quot;Brak Przerwy&quot;;IF(OR([.D400]&lt;&gt;&quot;&quot;;[.E40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1]&lt;&gt;&quot;&quot;;[.E401]&lt;&gt;&quot;&quot;);&quot;Brak Przerwy&quot;;IF(OR([.D401]&lt;&gt;&quot;&quot;;[.E40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2]&lt;&gt;&quot;&quot;;[.E402]&lt;&gt;&quot;&quot;);&quot;Brak Przerwy&quot;;IF(OR([.D402]&lt;&gt;&quot;&quot;;[.E40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3]&lt;&gt;&quot;&quot;;[.E403]&lt;&gt;&quot;&quot;);&quot;Brak Przerwy&quot;;IF(OR([.D403]&lt;&gt;&quot;&quot;;[.E40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4]&lt;&gt;&quot;&quot;;[.E404]&lt;&gt;&quot;&quot;);&quot;Brak Przerwy&quot;;IF(OR([.D404]&lt;&gt;&quot;&quot;;[.E40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5]&lt;&gt;&quot;&quot;;[.E405]&lt;&gt;&quot;&quot;);&quot;Brak Przerwy&quot;;IF(OR([.D405]&lt;&gt;&quot;&quot;;[.E40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6]&lt;&gt;&quot;&quot;;[.E406]&lt;&gt;&quot;&quot;);&quot;Brak Przerwy&quot;;IF(OR([.D406]&lt;&gt;&quot;&quot;;[.E40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7]&lt;&gt;&quot;&quot;;[.E407]&lt;&gt;&quot;&quot;);&quot;Brak Przerwy&quot;;IF(OR([.D407]&lt;&gt;&quot;&quot;;[.E40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8]&lt;&gt;&quot;&quot;;[.E408]&lt;&gt;&quot;&quot;);&quot;Brak Przerwy&quot;;IF(OR([.D408]&lt;&gt;&quot;&quot;;[.E40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09]&lt;&gt;&quot;&quot;;[.E409]&lt;&gt;&quot;&quot;);&quot;Brak Przerwy&quot;;IF(OR([.D409]&lt;&gt;&quot;&quot;;[.E40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0]&lt;&gt;&quot;&quot;;[.E410]&lt;&gt;&quot;&quot;);&quot;Brak Przerwy&quot;;IF(OR([.D410]&lt;&gt;&quot;&quot;;[.E41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1]&lt;&gt;&quot;&quot;;[.E411]&lt;&gt;&quot;&quot;);&quot;Brak Przerwy&quot;;IF(OR([.D411]&lt;&gt;&quot;&quot;;[.E41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2]&lt;&gt;&quot;&quot;;[.E412]&lt;&gt;&quot;&quot;);&quot;Brak Przerwy&quot;;IF(OR([.D412]&lt;&gt;&quot;&quot;;[.E41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3]&lt;&gt;&quot;&quot;;[.E413]&lt;&gt;&quot;&quot;);&quot;Brak Przerwy&quot;;IF(OR([.D413]&lt;&gt;&quot;&quot;;[.E41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4]&lt;&gt;&quot;&quot;;[.E414]&lt;&gt;&quot;&quot;);&quot;Brak Przerwy&quot;;IF(OR([.D414]&lt;&gt;&quot;&quot;;[.E41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5]&lt;&gt;&quot;&quot;;[.E415]&lt;&gt;&quot;&quot;);&quot;Brak Przerwy&quot;;IF(OR([.D415]&lt;&gt;&quot;&quot;;[.E41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6]&lt;&gt;&quot;&quot;;[.E416]&lt;&gt;&quot;&quot;);&quot;Brak Przerwy&quot;;IF(OR([.D416]&lt;&gt;&quot;&quot;;[.E41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7]&lt;&gt;&quot;&quot;;[.E417]&lt;&gt;&quot;&quot;);&quot;Brak Przerwy&quot;;IF(OR([.D417]&lt;&gt;&quot;&quot;;[.E41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8]&lt;&gt;&quot;&quot;;[.E418]&lt;&gt;&quot;&quot;);&quot;Brak Przerwy&quot;;IF(OR([.D418]&lt;&gt;&quot;&quot;;[.E41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19]&lt;&gt;&quot;&quot;;[.E419]&lt;&gt;&quot;&quot;);&quot;Brak Przerwy&quot;;IF(OR([.D419]&lt;&gt;&quot;&quot;;[.E41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0]&lt;&gt;&quot;&quot;;[.E420]&lt;&gt;&quot;&quot;);&quot;Brak Przerwy&quot;;IF(OR([.D420]&lt;&gt;&quot;&quot;;[.E42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1]&lt;&gt;&quot;&quot;;[.E421]&lt;&gt;&quot;&quot;);&quot;Brak Przerwy&quot;;IF(OR([.D421]&lt;&gt;&quot;&quot;;[.E42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2]&lt;&gt;&quot;&quot;;[.E422]&lt;&gt;&quot;&quot;);&quot;Brak Przerwy&quot;;IF(OR([.D422]&lt;&gt;&quot;&quot;;[.E42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3]&lt;&gt;&quot;&quot;;[.E423]&lt;&gt;&quot;&quot;);&quot;Brak Przerwy&quot;;IF(OR([.D423]&lt;&gt;&quot;&quot;;[.E42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4]&lt;&gt;&quot;&quot;;[.E424]&lt;&gt;&quot;&quot;);&quot;Brak Przerwy&quot;;IF(OR([.D424]&lt;&gt;&quot;&quot;;[.E42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5]&lt;&gt;&quot;&quot;;[.E425]&lt;&gt;&quot;&quot;);&quot;Brak Przerwy&quot;;IF(OR([.D425]&lt;&gt;&quot;&quot;;[.E42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6]&lt;&gt;&quot;&quot;;[.E426]&lt;&gt;&quot;&quot;);&quot;Brak Przerwy&quot;;IF(OR([.D426]&lt;&gt;&quot;&quot;;[.E42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7]&lt;&gt;&quot;&quot;;[.E427]&lt;&gt;&quot;&quot;);&quot;Brak Przerwy&quot;;IF(OR([.D427]&lt;&gt;&quot;&quot;;[.E42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8]&lt;&gt;&quot;&quot;;[.E428]&lt;&gt;&quot;&quot;);&quot;Brak Przerwy&quot;;IF(OR([.D428]&lt;&gt;&quot;&quot;;[.E42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29]&lt;&gt;&quot;&quot;;[.E429]&lt;&gt;&quot;&quot;);&quot;Brak Przerwy&quot;;IF(OR([.D429]&lt;&gt;&quot;&quot;;[.E42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0]&lt;&gt;&quot;&quot;;[.E430]&lt;&gt;&quot;&quot;);&quot;Brak Przerwy&quot;;IF(OR([.D430]&lt;&gt;&quot;&quot;;[.E43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1]&lt;&gt;&quot;&quot;;[.E431]&lt;&gt;&quot;&quot;);&quot;Brak Przerwy&quot;;IF(OR([.D431]&lt;&gt;&quot;&quot;;[.E43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2]&lt;&gt;&quot;&quot;;[.E432]&lt;&gt;&quot;&quot;);&quot;Brak Przerwy&quot;;IF(OR([.D432]&lt;&gt;&quot;&quot;;[.E43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3]&lt;&gt;&quot;&quot;;[.E433]&lt;&gt;&quot;&quot;);&quot;Brak Przerwy&quot;;IF(OR([.D433]&lt;&gt;&quot;&quot;;[.E43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4]&lt;&gt;&quot;&quot;;[.E434]&lt;&gt;&quot;&quot;);&quot;Brak Przerwy&quot;;IF(OR([.D434]&lt;&gt;&quot;&quot;;[.E43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5]&lt;&gt;&quot;&quot;;[.E435]&lt;&gt;&quot;&quot;);&quot;Brak Przerwy&quot;;IF(OR([.D435]&lt;&gt;&quot;&quot;;[.E43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6]&lt;&gt;&quot;&quot;;[.E436]&lt;&gt;&quot;&quot;);&quot;Brak Przerwy&quot;;IF(OR([.D436]&lt;&gt;&quot;&quot;;[.E43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7]&lt;&gt;&quot;&quot;;[.E437]&lt;&gt;&quot;&quot;);&quot;Brak Przerwy&quot;;IF(OR([.D437]&lt;&gt;&quot;&quot;;[.E43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8]&lt;&gt;&quot;&quot;;[.E438]&lt;&gt;&quot;&quot;);&quot;Brak Przerwy&quot;;IF(OR([.D438]&lt;&gt;&quot;&quot;;[.E43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39]&lt;&gt;&quot;&quot;;[.E439]&lt;&gt;&quot;&quot;);&quot;Brak Przerwy&quot;;IF(OR([.D439]&lt;&gt;&quot;&quot;;[.E43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0]&lt;&gt;&quot;&quot;;[.E440]&lt;&gt;&quot;&quot;);&quot;Brak Przerwy&quot;;IF(OR([.D440]&lt;&gt;&quot;&quot;;[.E44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1]&lt;&gt;&quot;&quot;;[.E441]&lt;&gt;&quot;&quot;);&quot;Brak Przerwy&quot;;IF(OR([.D441]&lt;&gt;&quot;&quot;;[.E44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2]&lt;&gt;&quot;&quot;;[.E442]&lt;&gt;&quot;&quot;);&quot;Brak Przerwy&quot;;IF(OR([.D442]&lt;&gt;&quot;&quot;;[.E44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3]&lt;&gt;&quot;&quot;;[.E443]&lt;&gt;&quot;&quot;);&quot;Brak Przerwy&quot;;IF(OR([.D443]&lt;&gt;&quot;&quot;;[.E44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4]&lt;&gt;&quot;&quot;;[.E444]&lt;&gt;&quot;&quot;);&quot;Brak Przerwy&quot;;IF(OR([.D444]&lt;&gt;&quot;&quot;;[.E44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5]&lt;&gt;&quot;&quot;;[.E445]&lt;&gt;&quot;&quot;);&quot;Brak Przerwy&quot;;IF(OR([.D445]&lt;&gt;&quot;&quot;;[.E44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6]&lt;&gt;&quot;&quot;;[.E446]&lt;&gt;&quot;&quot;);&quot;Brak Przerwy&quot;;IF(OR([.D446]&lt;&gt;&quot;&quot;;[.E44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7]&lt;&gt;&quot;&quot;;[.E447]&lt;&gt;&quot;&quot;);&quot;Brak Przerwy&quot;;IF(OR([.D447]&lt;&gt;&quot;&quot;;[.E44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8]&lt;&gt;&quot;&quot;;[.E448]&lt;&gt;&quot;&quot;);&quot;Brak Przerwy&quot;;IF(OR([.D448]&lt;&gt;&quot;&quot;;[.E44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49]&lt;&gt;&quot;&quot;;[.E449]&lt;&gt;&quot;&quot;);&quot;Brak Przerwy&quot;;IF(OR([.D449]&lt;&gt;&quot;&quot;;[.E44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0]&lt;&gt;&quot;&quot;;[.E450]&lt;&gt;&quot;&quot;);&quot;Brak Przerwy&quot;;IF(OR([.D450]&lt;&gt;&quot;&quot;;[.E45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1]&lt;&gt;&quot;&quot;;[.E451]&lt;&gt;&quot;&quot;);&quot;Brak Przerwy&quot;;IF(OR([.D451]&lt;&gt;&quot;&quot;;[.E45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2]&lt;&gt;&quot;&quot;;[.E452]&lt;&gt;&quot;&quot;);&quot;Brak Przerwy&quot;;IF(OR([.D452]&lt;&gt;&quot;&quot;;[.E45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3]&lt;&gt;&quot;&quot;;[.E453]&lt;&gt;&quot;&quot;);&quot;Brak Przerwy&quot;;IF(OR([.D453]&lt;&gt;&quot;&quot;;[.E45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4]&lt;&gt;&quot;&quot;;[.E454]&lt;&gt;&quot;&quot;);&quot;Brak Przerwy&quot;;IF(OR([.D454]&lt;&gt;&quot;&quot;;[.E45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5]&lt;&gt;&quot;&quot;;[.E455]&lt;&gt;&quot;&quot;);&quot;Brak Przerwy&quot;;IF(OR([.D455]&lt;&gt;&quot;&quot;;[.E45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6]&lt;&gt;&quot;&quot;;[.E456]&lt;&gt;&quot;&quot;);&quot;Brak Przerwy&quot;;IF(OR([.D456]&lt;&gt;&quot;&quot;;[.E45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7]&lt;&gt;&quot;&quot;;[.E457]&lt;&gt;&quot;&quot;);&quot;Brak Przerwy&quot;;IF(OR([.D457]&lt;&gt;&quot;&quot;;[.E45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8]&lt;&gt;&quot;&quot;;[.E458]&lt;&gt;&quot;&quot;);&quot;Brak Przerwy&quot;;IF(OR([.D458]&lt;&gt;&quot;&quot;;[.E45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59]&lt;&gt;&quot;&quot;;[.E459]&lt;&gt;&quot;&quot;);&quot;Brak Przerwy&quot;;IF(OR([.D459]&lt;&gt;&quot;&quot;;[.E45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0]&lt;&gt;&quot;&quot;;[.E460]&lt;&gt;&quot;&quot;);&quot;Brak Przerwy&quot;;IF(OR([.D460]&lt;&gt;&quot;&quot;;[.E46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1]&lt;&gt;&quot;&quot;;[.E461]&lt;&gt;&quot;&quot;);&quot;Brak Przerwy&quot;;IF(OR([.D461]&lt;&gt;&quot;&quot;;[.E46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2]&lt;&gt;&quot;&quot;;[.E462]&lt;&gt;&quot;&quot;);&quot;Brak Przerwy&quot;;IF(OR([.D462]&lt;&gt;&quot;&quot;;[.E46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3]&lt;&gt;&quot;&quot;;[.E463]&lt;&gt;&quot;&quot;);&quot;Brak Przerwy&quot;;IF(OR([.D463]&lt;&gt;&quot;&quot;;[.E46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4]&lt;&gt;&quot;&quot;;[.E464]&lt;&gt;&quot;&quot;);&quot;Brak Przerwy&quot;;IF(OR([.D464]&lt;&gt;&quot;&quot;;[.E46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5]&lt;&gt;&quot;&quot;;[.E465]&lt;&gt;&quot;&quot;);&quot;Brak Przerwy&quot;;IF(OR([.D465]&lt;&gt;&quot;&quot;;[.E46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6]&lt;&gt;&quot;&quot;;[.E466]&lt;&gt;&quot;&quot;);&quot;Brak Przerwy&quot;;IF(OR([.D466]&lt;&gt;&quot;&quot;;[.E46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7]&lt;&gt;&quot;&quot;;[.E467]&lt;&gt;&quot;&quot;);&quot;Brak Przerwy&quot;;IF(OR([.D467]&lt;&gt;&quot;&quot;;[.E46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8]&lt;&gt;&quot;&quot;;[.E468]&lt;&gt;&quot;&quot;);&quot;Brak Przerwy&quot;;IF(OR([.D468]&lt;&gt;&quot;&quot;;[.E46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69]&lt;&gt;&quot;&quot;;[.E469]&lt;&gt;&quot;&quot;);&quot;Brak Przerwy&quot;;IF(OR([.D469]&lt;&gt;&quot;&quot;;[.E46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0]&lt;&gt;&quot;&quot;;[.E470]&lt;&gt;&quot;&quot;);&quot;Brak Przerwy&quot;;IF(OR([.D470]&lt;&gt;&quot;&quot;;[.E47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1]&lt;&gt;&quot;&quot;;[.E471]&lt;&gt;&quot;&quot;);&quot;Brak Przerwy&quot;;IF(OR([.D471]&lt;&gt;&quot;&quot;;[.E47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2]&lt;&gt;&quot;&quot;;[.E472]&lt;&gt;&quot;&quot;);&quot;Brak Przerwy&quot;;IF(OR([.D472]&lt;&gt;&quot;&quot;;[.E47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3]&lt;&gt;&quot;&quot;;[.E473]&lt;&gt;&quot;&quot;);&quot;Brak Przerwy&quot;;IF(OR([.D473]&lt;&gt;&quot;&quot;;[.E47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4]&lt;&gt;&quot;&quot;;[.E474]&lt;&gt;&quot;&quot;);&quot;Brak Przerwy&quot;;IF(OR([.D474]&lt;&gt;&quot;&quot;;[.E47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5]&lt;&gt;&quot;&quot;;[.E475]&lt;&gt;&quot;&quot;);&quot;Brak Przerwy&quot;;IF(OR([.D475]&lt;&gt;&quot;&quot;;[.E47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6]&lt;&gt;&quot;&quot;;[.E476]&lt;&gt;&quot;&quot;);&quot;Brak Przerwy&quot;;IF(OR([.D476]&lt;&gt;&quot;&quot;;[.E47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7]&lt;&gt;&quot;&quot;;[.E477]&lt;&gt;&quot;&quot;);&quot;Brak Przerwy&quot;;IF(OR([.D477]&lt;&gt;&quot;&quot;;[.E47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8]&lt;&gt;&quot;&quot;;[.E478]&lt;&gt;&quot;&quot;);&quot;Brak Przerwy&quot;;IF(OR([.D478]&lt;&gt;&quot;&quot;;[.E47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79]&lt;&gt;&quot;&quot;;[.E479]&lt;&gt;&quot;&quot;);&quot;Brak Przerwy&quot;;IF(OR([.D479]&lt;&gt;&quot;&quot;;[.E47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0]&lt;&gt;&quot;&quot;;[.E480]&lt;&gt;&quot;&quot;);&quot;Brak Przerwy&quot;;IF(OR([.D480]&lt;&gt;&quot;&quot;;[.E48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1]&lt;&gt;&quot;&quot;;[.E481]&lt;&gt;&quot;&quot;);&quot;Brak Przerwy&quot;;IF(OR([.D481]&lt;&gt;&quot;&quot;;[.E48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2]&lt;&gt;&quot;&quot;;[.E482]&lt;&gt;&quot;&quot;);&quot;Brak Przerwy&quot;;IF(OR([.D482]&lt;&gt;&quot;&quot;;[.E48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3]&lt;&gt;&quot;&quot;;[.E483]&lt;&gt;&quot;&quot;);&quot;Brak Przerwy&quot;;IF(OR([.D483]&lt;&gt;&quot;&quot;;[.E48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4]&lt;&gt;&quot;&quot;;[.E484]&lt;&gt;&quot;&quot;);&quot;Brak Przerwy&quot;;IF(OR([.D484]&lt;&gt;&quot;&quot;;[.E48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5]&lt;&gt;&quot;&quot;;[.E485]&lt;&gt;&quot;&quot;);&quot;Brak Przerwy&quot;;IF(OR([.D485]&lt;&gt;&quot;&quot;;[.E48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6]&lt;&gt;&quot;&quot;;[.E486]&lt;&gt;&quot;&quot;);&quot;Brak Przerwy&quot;;IF(OR([.D486]&lt;&gt;&quot;&quot;;[.E48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7]&lt;&gt;&quot;&quot;;[.E487]&lt;&gt;&quot;&quot;);&quot;Brak Przerwy&quot;;IF(OR([.D487]&lt;&gt;&quot;&quot;;[.E48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8]&lt;&gt;&quot;&quot;;[.E488]&lt;&gt;&quot;&quot;);&quot;Brak Przerwy&quot;;IF(OR([.D488]&lt;&gt;&quot;&quot;;[.E48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89]&lt;&gt;&quot;&quot;;[.E489]&lt;&gt;&quot;&quot;);&quot;Brak Przerwy&quot;;IF(OR([.D489]&lt;&gt;&quot;&quot;;[.E48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0]&lt;&gt;&quot;&quot;;[.E490]&lt;&gt;&quot;&quot;);&quot;Brak Przerwy&quot;;IF(OR([.D490]&lt;&gt;&quot;&quot;;[.E49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1]&lt;&gt;&quot;&quot;;[.E491]&lt;&gt;&quot;&quot;);&quot;Brak Przerwy&quot;;IF(OR([.D491]&lt;&gt;&quot;&quot;;[.E49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2]&lt;&gt;&quot;&quot;;[.E492]&lt;&gt;&quot;&quot;);&quot;Brak Przerwy&quot;;IF(OR([.D492]&lt;&gt;&quot;&quot;;[.E49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3]&lt;&gt;&quot;&quot;;[.E493]&lt;&gt;&quot;&quot;);&quot;Brak Przerwy&quot;;IF(OR([.D493]&lt;&gt;&quot;&quot;;[.E49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4]&lt;&gt;&quot;&quot;;[.E494]&lt;&gt;&quot;&quot;);&quot;Brak Przerwy&quot;;IF(OR([.D494]&lt;&gt;&quot;&quot;;[.E49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5]&lt;&gt;&quot;&quot;;[.E495]&lt;&gt;&quot;&quot;);&quot;Brak Przerwy&quot;;IF(OR([.D495]&lt;&gt;&quot;&quot;;[.E49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6]&lt;&gt;&quot;&quot;;[.E496]&lt;&gt;&quot;&quot;);&quot;Brak Przerwy&quot;;IF(OR([.D496]&lt;&gt;&quot;&quot;;[.E49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7]&lt;&gt;&quot;&quot;;[.E497]&lt;&gt;&quot;&quot;);&quot;Brak Przerwy&quot;;IF(OR([.D497]&lt;&gt;&quot;&quot;;[.E49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8]&lt;&gt;&quot;&quot;;[.E498]&lt;&gt;&quot;&quot;);&quot;Brak Przerwy&quot;;IF(OR([.D498]&lt;&gt;&quot;&quot;;[.E49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499]&lt;&gt;&quot;&quot;;[.E499]&lt;&gt;&quot;&quot;);&quot;Brak Przerwy&quot;;IF(OR([.D499]&lt;&gt;&quot;&quot;;[.E49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0]&lt;&gt;&quot;&quot;;[.E500]&lt;&gt;&quot;&quot;);&quot;Brak Przerwy&quot;;IF(OR([.D500]&lt;&gt;&quot;&quot;;[.E50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1]&lt;&gt;&quot;&quot;;[.E501]&lt;&gt;&quot;&quot;);&quot;Brak Przerwy&quot;;IF(OR([.D501]&lt;&gt;&quot;&quot;;[.E50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2]&lt;&gt;&quot;&quot;;[.E502]&lt;&gt;&quot;&quot;);&quot;Brak Przerwy&quot;;IF(OR([.D502]&lt;&gt;&quot;&quot;;[.E50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3]&lt;&gt;&quot;&quot;;[.E503]&lt;&gt;&quot;&quot;);&quot;Brak Przerwy&quot;;IF(OR([.D503]&lt;&gt;&quot;&quot;;[.E50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4]&lt;&gt;&quot;&quot;;[.E504]&lt;&gt;&quot;&quot;);&quot;Brak Przerwy&quot;;IF(OR([.D504]&lt;&gt;&quot;&quot;;[.E50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5]&lt;&gt;&quot;&quot;;[.E505]&lt;&gt;&quot;&quot;);&quot;Brak Przerwy&quot;;IF(OR([.D505]&lt;&gt;&quot;&quot;;[.E50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6]&lt;&gt;&quot;&quot;;[.E506]&lt;&gt;&quot;&quot;);&quot;Brak Przerwy&quot;;IF(OR([.D506]&lt;&gt;&quot;&quot;;[.E50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7]&lt;&gt;&quot;&quot;;[.E507]&lt;&gt;&quot;&quot;);&quot;Brak Przerwy&quot;;IF(OR([.D507]&lt;&gt;&quot;&quot;;[.E50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8]&lt;&gt;&quot;&quot;;[.E508]&lt;&gt;&quot;&quot;);&quot;Brak Przerwy&quot;;IF(OR([.D508]&lt;&gt;&quot;&quot;;[.E50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09]&lt;&gt;&quot;&quot;;[.E509]&lt;&gt;&quot;&quot;);&quot;Brak Przerwy&quot;;IF(OR([.D509]&lt;&gt;&quot;&quot;;[.E50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0]&lt;&gt;&quot;&quot;;[.E510]&lt;&gt;&quot;&quot;);&quot;Brak Przerwy&quot;;IF(OR([.D510]&lt;&gt;&quot;&quot;;[.E51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1]&lt;&gt;&quot;&quot;;[.E511]&lt;&gt;&quot;&quot;);&quot;Brak Przerwy&quot;;IF(OR([.D511]&lt;&gt;&quot;&quot;;[.E51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2]&lt;&gt;&quot;&quot;;[.E512]&lt;&gt;&quot;&quot;);&quot;Brak Przerwy&quot;;IF(OR([.D512]&lt;&gt;&quot;&quot;;[.E51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3]&lt;&gt;&quot;&quot;;[.E513]&lt;&gt;&quot;&quot;);&quot;Brak Przerwy&quot;;IF(OR([.D513]&lt;&gt;&quot;&quot;;[.E51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4]&lt;&gt;&quot;&quot;;[.E514]&lt;&gt;&quot;&quot;);&quot;Brak Przerwy&quot;;IF(OR([.D514]&lt;&gt;&quot;&quot;;[.E51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5]&lt;&gt;&quot;&quot;;[.E515]&lt;&gt;&quot;&quot;);&quot;Brak Przerwy&quot;;IF(OR([.D515]&lt;&gt;&quot;&quot;;[.E51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6]&lt;&gt;&quot;&quot;;[.E516]&lt;&gt;&quot;&quot;);&quot;Brak Przerwy&quot;;IF(OR([.D516]&lt;&gt;&quot;&quot;;[.E51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7]&lt;&gt;&quot;&quot;;[.E517]&lt;&gt;&quot;&quot;);&quot;Brak Przerwy&quot;;IF(OR([.D517]&lt;&gt;&quot;&quot;;[.E51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8]&lt;&gt;&quot;&quot;;[.E518]&lt;&gt;&quot;&quot;);&quot;Brak Przerwy&quot;;IF(OR([.D518]&lt;&gt;&quot;&quot;;[.E51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19]&lt;&gt;&quot;&quot;;[.E519]&lt;&gt;&quot;&quot;);&quot;Brak Przerwy&quot;;IF(OR([.D519]&lt;&gt;&quot;&quot;;[.E51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0]&lt;&gt;&quot;&quot;;[.E520]&lt;&gt;&quot;&quot;);&quot;Brak Przerwy&quot;;IF(OR([.D520]&lt;&gt;&quot;&quot;;[.E52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1]&lt;&gt;&quot;&quot;;[.E521]&lt;&gt;&quot;&quot;);&quot;Brak Przerwy&quot;;IF(OR([.D521]&lt;&gt;&quot;&quot;;[.E52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2]&lt;&gt;&quot;&quot;;[.E522]&lt;&gt;&quot;&quot;);&quot;Brak Przerwy&quot;;IF(OR([.D522]&lt;&gt;&quot;&quot;;[.E52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3]&lt;&gt;&quot;&quot;;[.E523]&lt;&gt;&quot;&quot;);&quot;Brak Przerwy&quot;;IF(OR([.D523]&lt;&gt;&quot;&quot;;[.E52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4]&lt;&gt;&quot;&quot;;[.E524]&lt;&gt;&quot;&quot;);&quot;Brak Przerwy&quot;;IF(OR([.D524]&lt;&gt;&quot;&quot;;[.E52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5]&lt;&gt;&quot;&quot;;[.E525]&lt;&gt;&quot;&quot;);&quot;Brak Przerwy&quot;;IF(OR([.D525]&lt;&gt;&quot;&quot;;[.E52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6]&lt;&gt;&quot;&quot;;[.E526]&lt;&gt;&quot;&quot;);&quot;Brak Przerwy&quot;;IF(OR([.D526]&lt;&gt;&quot;&quot;;[.E52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7]&lt;&gt;&quot;&quot;;[.E527]&lt;&gt;&quot;&quot;);&quot;Brak Przerwy&quot;;IF(OR([.D527]&lt;&gt;&quot;&quot;;[.E52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8]&lt;&gt;&quot;&quot;;[.E528]&lt;&gt;&quot;&quot;);&quot;Brak Przerwy&quot;;IF(OR([.D528]&lt;&gt;&quot;&quot;;[.E52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29]&lt;&gt;&quot;&quot;;[.E529]&lt;&gt;&quot;&quot;);&quot;Brak Przerwy&quot;;IF(OR([.D529]&lt;&gt;&quot;&quot;;[.E52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0]&lt;&gt;&quot;&quot;;[.E530]&lt;&gt;&quot;&quot;);&quot;Brak Przerwy&quot;;IF(OR([.D530]&lt;&gt;&quot;&quot;;[.E53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1]&lt;&gt;&quot;&quot;;[.E531]&lt;&gt;&quot;&quot;);&quot;Brak Przerwy&quot;;IF(OR([.D531]&lt;&gt;&quot;&quot;;[.E53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2]&lt;&gt;&quot;&quot;;[.E532]&lt;&gt;&quot;&quot;);&quot;Brak Przerwy&quot;;IF(OR([.D532]&lt;&gt;&quot;&quot;;[.E53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3]&lt;&gt;&quot;&quot;;[.E533]&lt;&gt;&quot;&quot;);&quot;Brak Przerwy&quot;;IF(OR([.D533]&lt;&gt;&quot;&quot;;[.E53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4]&lt;&gt;&quot;&quot;;[.E534]&lt;&gt;&quot;&quot;);&quot;Brak Przerwy&quot;;IF(OR([.D534]&lt;&gt;&quot;&quot;;[.E53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5]&lt;&gt;&quot;&quot;;[.E535]&lt;&gt;&quot;&quot;);&quot;Brak Przerwy&quot;;IF(OR([.D535]&lt;&gt;&quot;&quot;;[.E53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6]&lt;&gt;&quot;&quot;;[.E536]&lt;&gt;&quot;&quot;);&quot;Brak Przerwy&quot;;IF(OR([.D536]&lt;&gt;&quot;&quot;;[.E53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7]&lt;&gt;&quot;&quot;;[.E537]&lt;&gt;&quot;&quot;);&quot;Brak Przerwy&quot;;IF(OR([.D537]&lt;&gt;&quot;&quot;;[.E53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8]&lt;&gt;&quot;&quot;;[.E538]&lt;&gt;&quot;&quot;);&quot;Brak Przerwy&quot;;IF(OR([.D538]&lt;&gt;&quot;&quot;;[.E53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39]&lt;&gt;&quot;&quot;;[.E539]&lt;&gt;&quot;&quot;);&quot;Brak Przerwy&quot;;IF(OR([.D539]&lt;&gt;&quot;&quot;;[.E53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0]&lt;&gt;&quot;&quot;;[.E540]&lt;&gt;&quot;&quot;);&quot;Brak Przerwy&quot;;IF(OR([.D540]&lt;&gt;&quot;&quot;;[.E54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1]&lt;&gt;&quot;&quot;;[.E541]&lt;&gt;&quot;&quot;);&quot;Brak Przerwy&quot;;IF(OR([.D541]&lt;&gt;&quot;&quot;;[.E54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2]&lt;&gt;&quot;&quot;;[.E542]&lt;&gt;&quot;&quot;);&quot;Brak Przerwy&quot;;IF(OR([.D542]&lt;&gt;&quot;&quot;;[.E54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3]&lt;&gt;&quot;&quot;;[.E543]&lt;&gt;&quot;&quot;);&quot;Brak Przerwy&quot;;IF(OR([.D543]&lt;&gt;&quot;&quot;;[.E54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4]&lt;&gt;&quot;&quot;;[.E544]&lt;&gt;&quot;&quot;);&quot;Brak Przerwy&quot;;IF(OR([.D544]&lt;&gt;&quot;&quot;;[.E54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5]&lt;&gt;&quot;&quot;;[.E545]&lt;&gt;&quot;&quot;);&quot;Brak Przerwy&quot;;IF(OR([.D545]&lt;&gt;&quot;&quot;;[.E54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6]&lt;&gt;&quot;&quot;;[.E546]&lt;&gt;&quot;&quot;);&quot;Brak Przerwy&quot;;IF(OR([.D546]&lt;&gt;&quot;&quot;;[.E54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7]&lt;&gt;&quot;&quot;;[.E547]&lt;&gt;&quot;&quot;);&quot;Brak Przerwy&quot;;IF(OR([.D547]&lt;&gt;&quot;&quot;;[.E54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8]&lt;&gt;&quot;&quot;;[.E548]&lt;&gt;&quot;&quot;);&quot;Brak Przerwy&quot;;IF(OR([.D548]&lt;&gt;&quot;&quot;;[.E54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49]&lt;&gt;&quot;&quot;;[.E549]&lt;&gt;&quot;&quot;);&quot;Brak Przerwy&quot;;IF(OR([.D549]&lt;&gt;&quot;&quot;;[.E54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0]&lt;&gt;&quot;&quot;;[.E550]&lt;&gt;&quot;&quot;);&quot;Brak Przerwy&quot;;IF(OR([.D550]&lt;&gt;&quot;&quot;;[.E55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1]&lt;&gt;&quot;&quot;;[.E551]&lt;&gt;&quot;&quot;);&quot;Brak Przerwy&quot;;IF(OR([.D551]&lt;&gt;&quot;&quot;;[.E55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2]&lt;&gt;&quot;&quot;;[.E552]&lt;&gt;&quot;&quot;);&quot;Brak Przerwy&quot;;IF(OR([.D552]&lt;&gt;&quot;&quot;;[.E55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3]&lt;&gt;&quot;&quot;;[.E553]&lt;&gt;&quot;&quot;);&quot;Brak Przerwy&quot;;IF(OR([.D553]&lt;&gt;&quot;&quot;;[.E55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4]&lt;&gt;&quot;&quot;;[.E554]&lt;&gt;&quot;&quot;);&quot;Brak Przerwy&quot;;IF(OR([.D554]&lt;&gt;&quot;&quot;;[.E55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5]&lt;&gt;&quot;&quot;;[.E555]&lt;&gt;&quot;&quot;);&quot;Brak Przerwy&quot;;IF(OR([.D555]&lt;&gt;&quot;&quot;;[.E55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6]&lt;&gt;&quot;&quot;;[.E556]&lt;&gt;&quot;&quot;);&quot;Brak Przerwy&quot;;IF(OR([.D556]&lt;&gt;&quot;&quot;;[.E55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7]&lt;&gt;&quot;&quot;;[.E557]&lt;&gt;&quot;&quot;);&quot;Brak Przerwy&quot;;IF(OR([.D557]&lt;&gt;&quot;&quot;;[.E55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8]&lt;&gt;&quot;&quot;;[.E558]&lt;&gt;&quot;&quot;);&quot;Brak Przerwy&quot;;IF(OR([.D558]&lt;&gt;&quot;&quot;;[.E55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59]&lt;&gt;&quot;&quot;;[.E559]&lt;&gt;&quot;&quot;);&quot;Brak Przerwy&quot;;IF(OR([.D559]&lt;&gt;&quot;&quot;;[.E55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0]&lt;&gt;&quot;&quot;;[.E560]&lt;&gt;&quot;&quot;);&quot;Brak Przerwy&quot;;IF(OR([.D560]&lt;&gt;&quot;&quot;;[.E56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1]&lt;&gt;&quot;&quot;;[.E561]&lt;&gt;&quot;&quot;);&quot;Brak Przerwy&quot;;IF(OR([.D561]&lt;&gt;&quot;&quot;;[.E56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2]&lt;&gt;&quot;&quot;;[.E562]&lt;&gt;&quot;&quot;);&quot;Brak Przerwy&quot;;IF(OR([.D562]&lt;&gt;&quot;&quot;;[.E56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3]&lt;&gt;&quot;&quot;;[.E563]&lt;&gt;&quot;&quot;);&quot;Brak Przerwy&quot;;IF(OR([.D563]&lt;&gt;&quot;&quot;;[.E56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4]&lt;&gt;&quot;&quot;;[.E564]&lt;&gt;&quot;&quot;);&quot;Brak Przerwy&quot;;IF(OR([.D564]&lt;&gt;&quot;&quot;;[.E56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5]&lt;&gt;&quot;&quot;;[.E565]&lt;&gt;&quot;&quot;);&quot;Brak Przerwy&quot;;IF(OR([.D565]&lt;&gt;&quot;&quot;;[.E56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6]&lt;&gt;&quot;&quot;;[.E566]&lt;&gt;&quot;&quot;);&quot;Brak Przerwy&quot;;IF(OR([.D566]&lt;&gt;&quot;&quot;;[.E56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7]&lt;&gt;&quot;&quot;;[.E567]&lt;&gt;&quot;&quot;);&quot;Brak Przerwy&quot;;IF(OR([.D567]&lt;&gt;&quot;&quot;;[.E56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8]&lt;&gt;&quot;&quot;;[.E568]&lt;&gt;&quot;&quot;);&quot;Brak Przerwy&quot;;IF(OR([.D568]&lt;&gt;&quot;&quot;;[.E56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69]&lt;&gt;&quot;&quot;;[.E569]&lt;&gt;&quot;&quot;);&quot;Brak Przerwy&quot;;IF(OR([.D569]&lt;&gt;&quot;&quot;;[.E56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0]&lt;&gt;&quot;&quot;;[.E570]&lt;&gt;&quot;&quot;);&quot;Brak Przerwy&quot;;IF(OR([.D570]&lt;&gt;&quot;&quot;;[.E57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1]&lt;&gt;&quot;&quot;;[.E571]&lt;&gt;&quot;&quot;);&quot;Brak Przerwy&quot;;IF(OR([.D571]&lt;&gt;&quot;&quot;;[.E57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2]&lt;&gt;&quot;&quot;;[.E572]&lt;&gt;&quot;&quot;);&quot;Brak Przerwy&quot;;IF(OR([.D572]&lt;&gt;&quot;&quot;;[.E57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3]&lt;&gt;&quot;&quot;;[.E573]&lt;&gt;&quot;&quot;);&quot;Brak Przerwy&quot;;IF(OR([.D573]&lt;&gt;&quot;&quot;;[.E57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4]&lt;&gt;&quot;&quot;;[.E574]&lt;&gt;&quot;&quot;);&quot;Brak Przerwy&quot;;IF(OR([.D574]&lt;&gt;&quot;&quot;;[.E57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5]&lt;&gt;&quot;&quot;;[.E575]&lt;&gt;&quot;&quot;);&quot;Brak Przerwy&quot;;IF(OR([.D575]&lt;&gt;&quot;&quot;;[.E57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6]&lt;&gt;&quot;&quot;;[.E576]&lt;&gt;&quot;&quot;);&quot;Brak Przerwy&quot;;IF(OR([.D576]&lt;&gt;&quot;&quot;;[.E57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7]&lt;&gt;&quot;&quot;;[.E577]&lt;&gt;&quot;&quot;);&quot;Brak Przerwy&quot;;IF(OR([.D577]&lt;&gt;&quot;&quot;;[.E57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8]&lt;&gt;&quot;&quot;;[.E578]&lt;&gt;&quot;&quot;);&quot;Brak Przerwy&quot;;IF(OR([.D578]&lt;&gt;&quot;&quot;;[.E57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79]&lt;&gt;&quot;&quot;;[.E579]&lt;&gt;&quot;&quot;);&quot;Brak Przerwy&quot;;IF(OR([.D579]&lt;&gt;&quot;&quot;;[.E57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0]&lt;&gt;&quot;&quot;;[.E580]&lt;&gt;&quot;&quot;);&quot;Brak Przerwy&quot;;IF(OR([.D580]&lt;&gt;&quot;&quot;;[.E58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1]&lt;&gt;&quot;&quot;;[.E581]&lt;&gt;&quot;&quot;);&quot;Brak Przerwy&quot;;IF(OR([.D581]&lt;&gt;&quot;&quot;;[.E58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2]&lt;&gt;&quot;&quot;;[.E582]&lt;&gt;&quot;&quot;);&quot;Brak Przerwy&quot;;IF(OR([.D582]&lt;&gt;&quot;&quot;;[.E58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3]&lt;&gt;&quot;&quot;;[.E583]&lt;&gt;&quot;&quot;);&quot;Brak Przerwy&quot;;IF(OR([.D583]&lt;&gt;&quot;&quot;;[.E58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4]&lt;&gt;&quot;&quot;;[.E584]&lt;&gt;&quot;&quot;);&quot;Brak Przerwy&quot;;IF(OR([.D584]&lt;&gt;&quot;&quot;;[.E58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5]&lt;&gt;&quot;&quot;;[.E585]&lt;&gt;&quot;&quot;);&quot;Brak Przerwy&quot;;IF(OR([.D585]&lt;&gt;&quot;&quot;;[.E58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6]&lt;&gt;&quot;&quot;;[.E586]&lt;&gt;&quot;&quot;);&quot;Brak Przerwy&quot;;IF(OR([.D586]&lt;&gt;&quot;&quot;;[.E58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7]&lt;&gt;&quot;&quot;;[.E587]&lt;&gt;&quot;&quot;);&quot;Brak Przerwy&quot;;IF(OR([.D587]&lt;&gt;&quot;&quot;;[.E58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8]&lt;&gt;&quot;&quot;;[.E588]&lt;&gt;&quot;&quot;);&quot;Brak Przerwy&quot;;IF(OR([.D588]&lt;&gt;&quot;&quot;;[.E58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89]&lt;&gt;&quot;&quot;;[.E589]&lt;&gt;&quot;&quot;);&quot;Brak Przerwy&quot;;IF(OR([.D589]&lt;&gt;&quot;&quot;;[.E58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0]&lt;&gt;&quot;&quot;;[.E590]&lt;&gt;&quot;&quot;);&quot;Brak Przerwy&quot;;IF(OR([.D590]&lt;&gt;&quot;&quot;;[.E590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1]&lt;&gt;&quot;&quot;;[.E591]&lt;&gt;&quot;&quot;);&quot;Brak Przerwy&quot;;IF(OR([.D591]&lt;&gt;&quot;&quot;;[.E591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2]&lt;&gt;&quot;&quot;;[.E592]&lt;&gt;&quot;&quot;);&quot;Brak Przerwy&quot;;IF(OR([.D592]&lt;&gt;&quot;&quot;;[.E592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3]&lt;&gt;&quot;&quot;;[.E593]&lt;&gt;&quot;&quot;);&quot;Brak Przerwy&quot;;IF(OR([.D593]&lt;&gt;&quot;&quot;;[.E593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4]&lt;&gt;&quot;&quot;;[.E594]&lt;&gt;&quot;&quot;);&quot;Brak Przerwy&quot;;IF(OR([.D594]&lt;&gt;&quot;&quot;;[.E594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5]&lt;&gt;&quot;&quot;;[.E595]&lt;&gt;&quot;&quot;);&quot;Brak Przerwy&quot;;IF(OR([.D595]&lt;&gt;&quot;&quot;;[.E595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6]&lt;&gt;&quot;&quot;;[.E596]&lt;&gt;&quot;&quot;);&quot;Brak Przerwy&quot;;IF(OR([.D596]&lt;&gt;&quot;&quot;;[.E596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7]&lt;&gt;&quot;&quot;;[.E597]&lt;&gt;&quot;&quot;);&quot;Brak Przerwy&quot;;IF(OR([.D597]&lt;&gt;&quot;&quot;;[.E597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8]&lt;&gt;&quot;&quot;;[.E598]&lt;&gt;&quot;&quot;);&quot;Brak Przerwy&quot;;IF(OR([.D598]&lt;&gt;&quot;&quot;;[.E598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content-validation-name="val4" table:style-name="ce19"/>
          <table:table-cell table:content-validation-name="val3" table:style-name="ce4"/>
          <table:table-cell office:value-type="string" office:string-value="" table:formula="of:=IF(AND([.D599]&lt;&gt;&quot;&quot;;[.E599]&lt;&gt;&quot;&quot;);&quot;Brak Przerwy&quot;;IF(OR([.D599]&lt;&gt;&quot;&quot;;[.E599]&lt;&gt;&quot;&quot;);&quot;Przerwa&quot;;&quot;&quot;))" table:style-name="ce4"/>
          <table:table-cell table:content-validation-name="val2" table:style-name="ce11"/>
          <table:table-cell table:content-validation-name="val1" table:style-name="ce14"/>
          <table:table-cell table:number-columns-spanned="3" table:number-rows-spanned="1" table:style-name="ce3"/>
          <table:covered-table-cell table:number-columns-repeated="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0]&lt;&gt;&quot;&quot;;[.E600]&lt;&gt;&quot;&quot;);&quot;Brak Przerwy&quot;;IF(OR([.D600]&lt;&gt;&quot;&quot;;[.E6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1]&lt;&gt;&quot;&quot;;[.E601]&lt;&gt;&quot;&quot;);&quot;Brak Przerwy&quot;;IF(OR([.D601]&lt;&gt;&quot;&quot;;[.E6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2]&lt;&gt;&quot;&quot;;[.E602]&lt;&gt;&quot;&quot;);&quot;Brak Przerwy&quot;;IF(OR([.D602]&lt;&gt;&quot;&quot;;[.E6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3]&lt;&gt;&quot;&quot;;[.E603]&lt;&gt;&quot;&quot;);&quot;Brak Przerwy&quot;;IF(OR([.D603]&lt;&gt;&quot;&quot;;[.E6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4]&lt;&gt;&quot;&quot;;[.E604]&lt;&gt;&quot;&quot;);&quot;Brak Przerwy&quot;;IF(OR([.D604]&lt;&gt;&quot;&quot;;[.E6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5]&lt;&gt;&quot;&quot;;[.E605]&lt;&gt;&quot;&quot;);&quot;Brak Przerwy&quot;;IF(OR([.D605]&lt;&gt;&quot;&quot;;[.E6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6]&lt;&gt;&quot;&quot;;[.E606]&lt;&gt;&quot;&quot;);&quot;Brak Przerwy&quot;;IF(OR([.D606]&lt;&gt;&quot;&quot;;[.E6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7]&lt;&gt;&quot;&quot;;[.E607]&lt;&gt;&quot;&quot;);&quot;Brak Przerwy&quot;;IF(OR([.D607]&lt;&gt;&quot;&quot;;[.E6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8]&lt;&gt;&quot;&quot;;[.E608]&lt;&gt;&quot;&quot;);&quot;Brak Przerwy&quot;;IF(OR([.D608]&lt;&gt;&quot;&quot;;[.E6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09]&lt;&gt;&quot;&quot;;[.E609]&lt;&gt;&quot;&quot;);&quot;Brak Przerwy&quot;;IF(OR([.D609]&lt;&gt;&quot;&quot;;[.E6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0]&lt;&gt;&quot;&quot;;[.E610]&lt;&gt;&quot;&quot;);&quot;Brak Przerwy&quot;;IF(OR([.D610]&lt;&gt;&quot;&quot;;[.E6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1]&lt;&gt;&quot;&quot;;[.E611]&lt;&gt;&quot;&quot;);&quot;Brak Przerwy&quot;;IF(OR([.D611]&lt;&gt;&quot;&quot;;[.E6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2]&lt;&gt;&quot;&quot;;[.E612]&lt;&gt;&quot;&quot;);&quot;Brak Przerwy&quot;;IF(OR([.D612]&lt;&gt;&quot;&quot;;[.E6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3]&lt;&gt;&quot;&quot;;[.E613]&lt;&gt;&quot;&quot;);&quot;Brak Przerwy&quot;;IF(OR([.D613]&lt;&gt;&quot;&quot;;[.E6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4]&lt;&gt;&quot;&quot;;[.E614]&lt;&gt;&quot;&quot;);&quot;Brak Przerwy&quot;;IF(OR([.D614]&lt;&gt;&quot;&quot;;[.E6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5]&lt;&gt;&quot;&quot;;[.E615]&lt;&gt;&quot;&quot;);&quot;Brak Przerwy&quot;;IF(OR([.D615]&lt;&gt;&quot;&quot;;[.E6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6]&lt;&gt;&quot;&quot;;[.E616]&lt;&gt;&quot;&quot;);&quot;Brak Przerwy&quot;;IF(OR([.D616]&lt;&gt;&quot;&quot;;[.E6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7]&lt;&gt;&quot;&quot;;[.E617]&lt;&gt;&quot;&quot;);&quot;Brak Przerwy&quot;;IF(OR([.D617]&lt;&gt;&quot;&quot;;[.E6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8]&lt;&gt;&quot;&quot;;[.E618]&lt;&gt;&quot;&quot;);&quot;Brak Przerwy&quot;;IF(OR([.D618]&lt;&gt;&quot;&quot;;[.E6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19]&lt;&gt;&quot;&quot;;[.E619]&lt;&gt;&quot;&quot;);&quot;Brak Przerwy&quot;;IF(OR([.D619]&lt;&gt;&quot;&quot;;[.E6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0]&lt;&gt;&quot;&quot;;[.E620]&lt;&gt;&quot;&quot;);&quot;Brak Przerwy&quot;;IF(OR([.D620]&lt;&gt;&quot;&quot;;[.E6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1]&lt;&gt;&quot;&quot;;[.E621]&lt;&gt;&quot;&quot;);&quot;Brak Przerwy&quot;;IF(OR([.D621]&lt;&gt;&quot;&quot;;[.E6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2]&lt;&gt;&quot;&quot;;[.E622]&lt;&gt;&quot;&quot;);&quot;Brak Przerwy&quot;;IF(OR([.D622]&lt;&gt;&quot;&quot;;[.E6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3]&lt;&gt;&quot;&quot;;[.E623]&lt;&gt;&quot;&quot;);&quot;Brak Przerwy&quot;;IF(OR([.D623]&lt;&gt;&quot;&quot;;[.E6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4]&lt;&gt;&quot;&quot;;[.E624]&lt;&gt;&quot;&quot;);&quot;Brak Przerwy&quot;;IF(OR([.D624]&lt;&gt;&quot;&quot;;[.E6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5]&lt;&gt;&quot;&quot;;[.E625]&lt;&gt;&quot;&quot;);&quot;Brak Przerwy&quot;;IF(OR([.D625]&lt;&gt;&quot;&quot;;[.E6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6]&lt;&gt;&quot;&quot;;[.E626]&lt;&gt;&quot;&quot;);&quot;Brak Przerwy&quot;;IF(OR([.D626]&lt;&gt;&quot;&quot;;[.E6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7]&lt;&gt;&quot;&quot;;[.E627]&lt;&gt;&quot;&quot;);&quot;Brak Przerwy&quot;;IF(OR([.D627]&lt;&gt;&quot;&quot;;[.E6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8]&lt;&gt;&quot;&quot;;[.E628]&lt;&gt;&quot;&quot;);&quot;Brak Przerwy&quot;;IF(OR([.D628]&lt;&gt;&quot;&quot;;[.E6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29]&lt;&gt;&quot;&quot;;[.E629]&lt;&gt;&quot;&quot;);&quot;Brak Przerwy&quot;;IF(OR([.D629]&lt;&gt;&quot;&quot;;[.E6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0]&lt;&gt;&quot;&quot;;[.E630]&lt;&gt;&quot;&quot;);&quot;Brak Przerwy&quot;;IF(OR([.D630]&lt;&gt;&quot;&quot;;[.E6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1]&lt;&gt;&quot;&quot;;[.E631]&lt;&gt;&quot;&quot;);&quot;Brak Przerwy&quot;;IF(OR([.D631]&lt;&gt;&quot;&quot;;[.E6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2]&lt;&gt;&quot;&quot;;[.E632]&lt;&gt;&quot;&quot;);&quot;Brak Przerwy&quot;;IF(OR([.D632]&lt;&gt;&quot;&quot;;[.E6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3]&lt;&gt;&quot;&quot;;[.E633]&lt;&gt;&quot;&quot;);&quot;Brak Przerwy&quot;;IF(OR([.D633]&lt;&gt;&quot;&quot;;[.E6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4]&lt;&gt;&quot;&quot;;[.E634]&lt;&gt;&quot;&quot;);&quot;Brak Przerwy&quot;;IF(OR([.D634]&lt;&gt;&quot;&quot;;[.E6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5]&lt;&gt;&quot;&quot;;[.E635]&lt;&gt;&quot;&quot;);&quot;Brak Przerwy&quot;;IF(OR([.D635]&lt;&gt;&quot;&quot;;[.E6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6]&lt;&gt;&quot;&quot;;[.E636]&lt;&gt;&quot;&quot;);&quot;Brak Przerwy&quot;;IF(OR([.D636]&lt;&gt;&quot;&quot;;[.E6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7]&lt;&gt;&quot;&quot;;[.E637]&lt;&gt;&quot;&quot;);&quot;Brak Przerwy&quot;;IF(OR([.D637]&lt;&gt;&quot;&quot;;[.E6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8]&lt;&gt;&quot;&quot;;[.E638]&lt;&gt;&quot;&quot;);&quot;Brak Przerwy&quot;;IF(OR([.D638]&lt;&gt;&quot;&quot;;[.E6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39]&lt;&gt;&quot;&quot;;[.E639]&lt;&gt;&quot;&quot;);&quot;Brak Przerwy&quot;;IF(OR([.D639]&lt;&gt;&quot;&quot;;[.E6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0]&lt;&gt;&quot;&quot;;[.E640]&lt;&gt;&quot;&quot;);&quot;Brak Przerwy&quot;;IF(OR([.D640]&lt;&gt;&quot;&quot;;[.E6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1]&lt;&gt;&quot;&quot;;[.E641]&lt;&gt;&quot;&quot;);&quot;Brak Przerwy&quot;;IF(OR([.D641]&lt;&gt;&quot;&quot;;[.E6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2]&lt;&gt;&quot;&quot;;[.E642]&lt;&gt;&quot;&quot;);&quot;Brak Przerwy&quot;;IF(OR([.D642]&lt;&gt;&quot;&quot;;[.E6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3]&lt;&gt;&quot;&quot;;[.E643]&lt;&gt;&quot;&quot;);&quot;Brak Przerwy&quot;;IF(OR([.D643]&lt;&gt;&quot;&quot;;[.E6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4]&lt;&gt;&quot;&quot;;[.E644]&lt;&gt;&quot;&quot;);&quot;Brak Przerwy&quot;;IF(OR([.D644]&lt;&gt;&quot;&quot;;[.E6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5]&lt;&gt;&quot;&quot;;[.E645]&lt;&gt;&quot;&quot;);&quot;Brak Przerwy&quot;;IF(OR([.D645]&lt;&gt;&quot;&quot;;[.E6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6]&lt;&gt;&quot;&quot;;[.E646]&lt;&gt;&quot;&quot;);&quot;Brak Przerwy&quot;;IF(OR([.D646]&lt;&gt;&quot;&quot;;[.E6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7]&lt;&gt;&quot;&quot;;[.E647]&lt;&gt;&quot;&quot;);&quot;Brak Przerwy&quot;;IF(OR([.D647]&lt;&gt;&quot;&quot;;[.E6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8]&lt;&gt;&quot;&quot;;[.E648]&lt;&gt;&quot;&quot;);&quot;Brak Przerwy&quot;;IF(OR([.D648]&lt;&gt;&quot;&quot;;[.E6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49]&lt;&gt;&quot;&quot;;[.E649]&lt;&gt;&quot;&quot;);&quot;Brak Przerwy&quot;;IF(OR([.D649]&lt;&gt;&quot;&quot;;[.E6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0]&lt;&gt;&quot;&quot;;[.E650]&lt;&gt;&quot;&quot;);&quot;Brak Przerwy&quot;;IF(OR([.D650]&lt;&gt;&quot;&quot;;[.E6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1]&lt;&gt;&quot;&quot;;[.E651]&lt;&gt;&quot;&quot;);&quot;Brak Przerwy&quot;;IF(OR([.D651]&lt;&gt;&quot;&quot;;[.E6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2]&lt;&gt;&quot;&quot;;[.E652]&lt;&gt;&quot;&quot;);&quot;Brak Przerwy&quot;;IF(OR([.D652]&lt;&gt;&quot;&quot;;[.E6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3]&lt;&gt;&quot;&quot;;[.E653]&lt;&gt;&quot;&quot;);&quot;Brak Przerwy&quot;;IF(OR([.D653]&lt;&gt;&quot;&quot;;[.E6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4]&lt;&gt;&quot;&quot;;[.E654]&lt;&gt;&quot;&quot;);&quot;Brak Przerwy&quot;;IF(OR([.D654]&lt;&gt;&quot;&quot;;[.E6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5]&lt;&gt;&quot;&quot;;[.E655]&lt;&gt;&quot;&quot;);&quot;Brak Przerwy&quot;;IF(OR([.D655]&lt;&gt;&quot;&quot;;[.E6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6]&lt;&gt;&quot;&quot;;[.E656]&lt;&gt;&quot;&quot;);&quot;Brak Przerwy&quot;;IF(OR([.D656]&lt;&gt;&quot;&quot;;[.E6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7]&lt;&gt;&quot;&quot;;[.E657]&lt;&gt;&quot;&quot;);&quot;Brak Przerwy&quot;;IF(OR([.D657]&lt;&gt;&quot;&quot;;[.E6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8]&lt;&gt;&quot;&quot;;[.E658]&lt;&gt;&quot;&quot;);&quot;Brak Przerwy&quot;;IF(OR([.D658]&lt;&gt;&quot;&quot;;[.E6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59]&lt;&gt;&quot;&quot;;[.E659]&lt;&gt;&quot;&quot;);&quot;Brak Przerwy&quot;;IF(OR([.D659]&lt;&gt;&quot;&quot;;[.E6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0]&lt;&gt;&quot;&quot;;[.E660]&lt;&gt;&quot;&quot;);&quot;Brak Przerwy&quot;;IF(OR([.D660]&lt;&gt;&quot;&quot;;[.E6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1]&lt;&gt;&quot;&quot;;[.E661]&lt;&gt;&quot;&quot;);&quot;Brak Przerwy&quot;;IF(OR([.D661]&lt;&gt;&quot;&quot;;[.E6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2]&lt;&gt;&quot;&quot;;[.E662]&lt;&gt;&quot;&quot;);&quot;Brak Przerwy&quot;;IF(OR([.D662]&lt;&gt;&quot;&quot;;[.E6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3]&lt;&gt;&quot;&quot;;[.E663]&lt;&gt;&quot;&quot;);&quot;Brak Przerwy&quot;;IF(OR([.D663]&lt;&gt;&quot;&quot;;[.E6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4]&lt;&gt;&quot;&quot;;[.E664]&lt;&gt;&quot;&quot;);&quot;Brak Przerwy&quot;;IF(OR([.D664]&lt;&gt;&quot;&quot;;[.E6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5]&lt;&gt;&quot;&quot;;[.E665]&lt;&gt;&quot;&quot;);&quot;Brak Przerwy&quot;;IF(OR([.D665]&lt;&gt;&quot;&quot;;[.E6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6]&lt;&gt;&quot;&quot;;[.E666]&lt;&gt;&quot;&quot;);&quot;Brak Przerwy&quot;;IF(OR([.D666]&lt;&gt;&quot;&quot;;[.E6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7]&lt;&gt;&quot;&quot;;[.E667]&lt;&gt;&quot;&quot;);&quot;Brak Przerwy&quot;;IF(OR([.D667]&lt;&gt;&quot;&quot;;[.E6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8]&lt;&gt;&quot;&quot;;[.E668]&lt;&gt;&quot;&quot;);&quot;Brak Przerwy&quot;;IF(OR([.D668]&lt;&gt;&quot;&quot;;[.E6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69]&lt;&gt;&quot;&quot;;[.E669]&lt;&gt;&quot;&quot;);&quot;Brak Przerwy&quot;;IF(OR([.D669]&lt;&gt;&quot;&quot;;[.E6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0]&lt;&gt;&quot;&quot;;[.E670]&lt;&gt;&quot;&quot;);&quot;Brak Przerwy&quot;;IF(OR([.D670]&lt;&gt;&quot;&quot;;[.E6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1]&lt;&gt;&quot;&quot;;[.E671]&lt;&gt;&quot;&quot;);&quot;Brak Przerwy&quot;;IF(OR([.D671]&lt;&gt;&quot;&quot;;[.E6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2]&lt;&gt;&quot;&quot;;[.E672]&lt;&gt;&quot;&quot;);&quot;Brak Przerwy&quot;;IF(OR([.D672]&lt;&gt;&quot;&quot;;[.E6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3]&lt;&gt;&quot;&quot;;[.E673]&lt;&gt;&quot;&quot;);&quot;Brak Przerwy&quot;;IF(OR([.D673]&lt;&gt;&quot;&quot;;[.E6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4]&lt;&gt;&quot;&quot;;[.E674]&lt;&gt;&quot;&quot;);&quot;Brak Przerwy&quot;;IF(OR([.D674]&lt;&gt;&quot;&quot;;[.E6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5]&lt;&gt;&quot;&quot;;[.E675]&lt;&gt;&quot;&quot;);&quot;Brak Przerwy&quot;;IF(OR([.D675]&lt;&gt;&quot;&quot;;[.E6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6]&lt;&gt;&quot;&quot;;[.E676]&lt;&gt;&quot;&quot;);&quot;Brak Przerwy&quot;;IF(OR([.D676]&lt;&gt;&quot;&quot;;[.E6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7]&lt;&gt;&quot;&quot;;[.E677]&lt;&gt;&quot;&quot;);&quot;Brak Przerwy&quot;;IF(OR([.D677]&lt;&gt;&quot;&quot;;[.E6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8]&lt;&gt;&quot;&quot;;[.E678]&lt;&gt;&quot;&quot;);&quot;Brak Przerwy&quot;;IF(OR([.D678]&lt;&gt;&quot;&quot;;[.E6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79]&lt;&gt;&quot;&quot;;[.E679]&lt;&gt;&quot;&quot;);&quot;Brak Przerwy&quot;;IF(OR([.D679]&lt;&gt;&quot;&quot;;[.E6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0]&lt;&gt;&quot;&quot;;[.E680]&lt;&gt;&quot;&quot;);&quot;Brak Przerwy&quot;;IF(OR([.D680]&lt;&gt;&quot;&quot;;[.E6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1]&lt;&gt;&quot;&quot;;[.E681]&lt;&gt;&quot;&quot;);&quot;Brak Przerwy&quot;;IF(OR([.D681]&lt;&gt;&quot;&quot;;[.E6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2]&lt;&gt;&quot;&quot;;[.E682]&lt;&gt;&quot;&quot;);&quot;Brak Przerwy&quot;;IF(OR([.D682]&lt;&gt;&quot;&quot;;[.E6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3]&lt;&gt;&quot;&quot;;[.E683]&lt;&gt;&quot;&quot;);&quot;Brak Przerwy&quot;;IF(OR([.D683]&lt;&gt;&quot;&quot;;[.E6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4]&lt;&gt;&quot;&quot;;[.E684]&lt;&gt;&quot;&quot;);&quot;Brak Przerwy&quot;;IF(OR([.D684]&lt;&gt;&quot;&quot;;[.E6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5]&lt;&gt;&quot;&quot;;[.E685]&lt;&gt;&quot;&quot;);&quot;Brak Przerwy&quot;;IF(OR([.D685]&lt;&gt;&quot;&quot;;[.E6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6]&lt;&gt;&quot;&quot;;[.E686]&lt;&gt;&quot;&quot;);&quot;Brak Przerwy&quot;;IF(OR([.D686]&lt;&gt;&quot;&quot;;[.E6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7]&lt;&gt;&quot;&quot;;[.E687]&lt;&gt;&quot;&quot;);&quot;Brak Przerwy&quot;;IF(OR([.D687]&lt;&gt;&quot;&quot;;[.E6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8]&lt;&gt;&quot;&quot;;[.E688]&lt;&gt;&quot;&quot;);&quot;Brak Przerwy&quot;;IF(OR([.D688]&lt;&gt;&quot;&quot;;[.E6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89]&lt;&gt;&quot;&quot;;[.E689]&lt;&gt;&quot;&quot;);&quot;Brak Przerwy&quot;;IF(OR([.D689]&lt;&gt;&quot;&quot;;[.E6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0]&lt;&gt;&quot;&quot;;[.E690]&lt;&gt;&quot;&quot;);&quot;Brak Przerwy&quot;;IF(OR([.D690]&lt;&gt;&quot;&quot;;[.E6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1]&lt;&gt;&quot;&quot;;[.E691]&lt;&gt;&quot;&quot;);&quot;Brak Przerwy&quot;;IF(OR([.D691]&lt;&gt;&quot;&quot;;[.E6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2]&lt;&gt;&quot;&quot;;[.E692]&lt;&gt;&quot;&quot;);&quot;Brak Przerwy&quot;;IF(OR([.D692]&lt;&gt;&quot;&quot;;[.E6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3]&lt;&gt;&quot;&quot;;[.E693]&lt;&gt;&quot;&quot;);&quot;Brak Przerwy&quot;;IF(OR([.D693]&lt;&gt;&quot;&quot;;[.E6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4]&lt;&gt;&quot;&quot;;[.E694]&lt;&gt;&quot;&quot;);&quot;Brak Przerwy&quot;;IF(OR([.D694]&lt;&gt;&quot;&quot;;[.E6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5]&lt;&gt;&quot;&quot;;[.E695]&lt;&gt;&quot;&quot;);&quot;Brak Przerwy&quot;;IF(OR([.D695]&lt;&gt;&quot;&quot;;[.E6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6]&lt;&gt;&quot;&quot;;[.E696]&lt;&gt;&quot;&quot;);&quot;Brak Przerwy&quot;;IF(OR([.D696]&lt;&gt;&quot;&quot;;[.E6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7]&lt;&gt;&quot;&quot;;[.E697]&lt;&gt;&quot;&quot;);&quot;Brak Przerwy&quot;;IF(OR([.D697]&lt;&gt;&quot;&quot;;[.E6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8]&lt;&gt;&quot;&quot;;[.E698]&lt;&gt;&quot;&quot;);&quot;Brak Przerwy&quot;;IF(OR([.D698]&lt;&gt;&quot;&quot;;[.E6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699]&lt;&gt;&quot;&quot;;[.E699]&lt;&gt;&quot;&quot;);&quot;Brak Przerwy&quot;;IF(OR([.D699]&lt;&gt;&quot;&quot;;[.E6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0]&lt;&gt;&quot;&quot;;[.E700]&lt;&gt;&quot;&quot;);&quot;Brak Przerwy&quot;;IF(OR([.D700]&lt;&gt;&quot;&quot;;[.E7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1]&lt;&gt;&quot;&quot;;[.E701]&lt;&gt;&quot;&quot;);&quot;Brak Przerwy&quot;;IF(OR([.D701]&lt;&gt;&quot;&quot;;[.E7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2]&lt;&gt;&quot;&quot;;[.E702]&lt;&gt;&quot;&quot;);&quot;Brak Przerwy&quot;;IF(OR([.D702]&lt;&gt;&quot;&quot;;[.E7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3]&lt;&gt;&quot;&quot;;[.E703]&lt;&gt;&quot;&quot;);&quot;Brak Przerwy&quot;;IF(OR([.D703]&lt;&gt;&quot;&quot;;[.E7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4]&lt;&gt;&quot;&quot;;[.E704]&lt;&gt;&quot;&quot;);&quot;Brak Przerwy&quot;;IF(OR([.D704]&lt;&gt;&quot;&quot;;[.E7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5]&lt;&gt;&quot;&quot;;[.E705]&lt;&gt;&quot;&quot;);&quot;Brak Przerwy&quot;;IF(OR([.D705]&lt;&gt;&quot;&quot;;[.E7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6]&lt;&gt;&quot;&quot;;[.E706]&lt;&gt;&quot;&quot;);&quot;Brak Przerwy&quot;;IF(OR([.D706]&lt;&gt;&quot;&quot;;[.E7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7]&lt;&gt;&quot;&quot;;[.E707]&lt;&gt;&quot;&quot;);&quot;Brak Przerwy&quot;;IF(OR([.D707]&lt;&gt;&quot;&quot;;[.E7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8]&lt;&gt;&quot;&quot;;[.E708]&lt;&gt;&quot;&quot;);&quot;Brak Przerwy&quot;;IF(OR([.D708]&lt;&gt;&quot;&quot;;[.E7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09]&lt;&gt;&quot;&quot;;[.E709]&lt;&gt;&quot;&quot;);&quot;Brak Przerwy&quot;;IF(OR([.D709]&lt;&gt;&quot;&quot;;[.E7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0]&lt;&gt;&quot;&quot;;[.E710]&lt;&gt;&quot;&quot;);&quot;Brak Przerwy&quot;;IF(OR([.D710]&lt;&gt;&quot;&quot;;[.E7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1]&lt;&gt;&quot;&quot;;[.E711]&lt;&gt;&quot;&quot;);&quot;Brak Przerwy&quot;;IF(OR([.D711]&lt;&gt;&quot;&quot;;[.E7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2]&lt;&gt;&quot;&quot;;[.E712]&lt;&gt;&quot;&quot;);&quot;Brak Przerwy&quot;;IF(OR([.D712]&lt;&gt;&quot;&quot;;[.E7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3]&lt;&gt;&quot;&quot;;[.E713]&lt;&gt;&quot;&quot;);&quot;Brak Przerwy&quot;;IF(OR([.D713]&lt;&gt;&quot;&quot;;[.E7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4]&lt;&gt;&quot;&quot;;[.E714]&lt;&gt;&quot;&quot;);&quot;Brak Przerwy&quot;;IF(OR([.D714]&lt;&gt;&quot;&quot;;[.E7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5]&lt;&gt;&quot;&quot;;[.E715]&lt;&gt;&quot;&quot;);&quot;Brak Przerwy&quot;;IF(OR([.D715]&lt;&gt;&quot;&quot;;[.E7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6]&lt;&gt;&quot;&quot;;[.E716]&lt;&gt;&quot;&quot;);&quot;Brak Przerwy&quot;;IF(OR([.D716]&lt;&gt;&quot;&quot;;[.E7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7]&lt;&gt;&quot;&quot;;[.E717]&lt;&gt;&quot;&quot;);&quot;Brak Przerwy&quot;;IF(OR([.D717]&lt;&gt;&quot;&quot;;[.E7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8]&lt;&gt;&quot;&quot;;[.E718]&lt;&gt;&quot;&quot;);&quot;Brak Przerwy&quot;;IF(OR([.D718]&lt;&gt;&quot;&quot;;[.E7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19]&lt;&gt;&quot;&quot;;[.E719]&lt;&gt;&quot;&quot;);&quot;Brak Przerwy&quot;;IF(OR([.D719]&lt;&gt;&quot;&quot;;[.E7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0]&lt;&gt;&quot;&quot;;[.E720]&lt;&gt;&quot;&quot;);&quot;Brak Przerwy&quot;;IF(OR([.D720]&lt;&gt;&quot;&quot;;[.E7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1]&lt;&gt;&quot;&quot;;[.E721]&lt;&gt;&quot;&quot;);&quot;Brak Przerwy&quot;;IF(OR([.D721]&lt;&gt;&quot;&quot;;[.E7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2]&lt;&gt;&quot;&quot;;[.E722]&lt;&gt;&quot;&quot;);&quot;Brak Przerwy&quot;;IF(OR([.D722]&lt;&gt;&quot;&quot;;[.E7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3]&lt;&gt;&quot;&quot;;[.E723]&lt;&gt;&quot;&quot;);&quot;Brak Przerwy&quot;;IF(OR([.D723]&lt;&gt;&quot;&quot;;[.E7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4]&lt;&gt;&quot;&quot;;[.E724]&lt;&gt;&quot;&quot;);&quot;Brak Przerwy&quot;;IF(OR([.D724]&lt;&gt;&quot;&quot;;[.E7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5]&lt;&gt;&quot;&quot;;[.E725]&lt;&gt;&quot;&quot;);&quot;Brak Przerwy&quot;;IF(OR([.D725]&lt;&gt;&quot;&quot;;[.E7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6]&lt;&gt;&quot;&quot;;[.E726]&lt;&gt;&quot;&quot;);&quot;Brak Przerwy&quot;;IF(OR([.D726]&lt;&gt;&quot;&quot;;[.E7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7]&lt;&gt;&quot;&quot;;[.E727]&lt;&gt;&quot;&quot;);&quot;Brak Przerwy&quot;;IF(OR([.D727]&lt;&gt;&quot;&quot;;[.E7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8]&lt;&gt;&quot;&quot;;[.E728]&lt;&gt;&quot;&quot;);&quot;Brak Przerwy&quot;;IF(OR([.D728]&lt;&gt;&quot;&quot;;[.E7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29]&lt;&gt;&quot;&quot;;[.E729]&lt;&gt;&quot;&quot;);&quot;Brak Przerwy&quot;;IF(OR([.D729]&lt;&gt;&quot;&quot;;[.E7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0]&lt;&gt;&quot;&quot;;[.E730]&lt;&gt;&quot;&quot;);&quot;Brak Przerwy&quot;;IF(OR([.D730]&lt;&gt;&quot;&quot;;[.E7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1]&lt;&gt;&quot;&quot;;[.E731]&lt;&gt;&quot;&quot;);&quot;Brak Przerwy&quot;;IF(OR([.D731]&lt;&gt;&quot;&quot;;[.E7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2]&lt;&gt;&quot;&quot;;[.E732]&lt;&gt;&quot;&quot;);&quot;Brak Przerwy&quot;;IF(OR([.D732]&lt;&gt;&quot;&quot;;[.E7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3]&lt;&gt;&quot;&quot;;[.E733]&lt;&gt;&quot;&quot;);&quot;Brak Przerwy&quot;;IF(OR([.D733]&lt;&gt;&quot;&quot;;[.E7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4]&lt;&gt;&quot;&quot;;[.E734]&lt;&gt;&quot;&quot;);&quot;Brak Przerwy&quot;;IF(OR([.D734]&lt;&gt;&quot;&quot;;[.E7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5]&lt;&gt;&quot;&quot;;[.E735]&lt;&gt;&quot;&quot;);&quot;Brak Przerwy&quot;;IF(OR([.D735]&lt;&gt;&quot;&quot;;[.E7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6]&lt;&gt;&quot;&quot;;[.E736]&lt;&gt;&quot;&quot;);&quot;Brak Przerwy&quot;;IF(OR([.D736]&lt;&gt;&quot;&quot;;[.E7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7]&lt;&gt;&quot;&quot;;[.E737]&lt;&gt;&quot;&quot;);&quot;Brak Przerwy&quot;;IF(OR([.D737]&lt;&gt;&quot;&quot;;[.E7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8]&lt;&gt;&quot;&quot;;[.E738]&lt;&gt;&quot;&quot;);&quot;Brak Przerwy&quot;;IF(OR([.D738]&lt;&gt;&quot;&quot;;[.E7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39]&lt;&gt;&quot;&quot;;[.E739]&lt;&gt;&quot;&quot;);&quot;Brak Przerwy&quot;;IF(OR([.D739]&lt;&gt;&quot;&quot;;[.E7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0]&lt;&gt;&quot;&quot;;[.E740]&lt;&gt;&quot;&quot;);&quot;Brak Przerwy&quot;;IF(OR([.D740]&lt;&gt;&quot;&quot;;[.E7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1]&lt;&gt;&quot;&quot;;[.E741]&lt;&gt;&quot;&quot;);&quot;Brak Przerwy&quot;;IF(OR([.D741]&lt;&gt;&quot;&quot;;[.E7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2]&lt;&gt;&quot;&quot;;[.E742]&lt;&gt;&quot;&quot;);&quot;Brak Przerwy&quot;;IF(OR([.D742]&lt;&gt;&quot;&quot;;[.E7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3]&lt;&gt;&quot;&quot;;[.E743]&lt;&gt;&quot;&quot;);&quot;Brak Przerwy&quot;;IF(OR([.D743]&lt;&gt;&quot;&quot;;[.E7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4]&lt;&gt;&quot;&quot;;[.E744]&lt;&gt;&quot;&quot;);&quot;Brak Przerwy&quot;;IF(OR([.D744]&lt;&gt;&quot;&quot;;[.E7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5]&lt;&gt;&quot;&quot;;[.E745]&lt;&gt;&quot;&quot;);&quot;Brak Przerwy&quot;;IF(OR([.D745]&lt;&gt;&quot;&quot;;[.E7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6]&lt;&gt;&quot;&quot;;[.E746]&lt;&gt;&quot;&quot;);&quot;Brak Przerwy&quot;;IF(OR([.D746]&lt;&gt;&quot;&quot;;[.E7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7]&lt;&gt;&quot;&quot;;[.E747]&lt;&gt;&quot;&quot;);&quot;Brak Przerwy&quot;;IF(OR([.D747]&lt;&gt;&quot;&quot;;[.E7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8]&lt;&gt;&quot;&quot;;[.E748]&lt;&gt;&quot;&quot;);&quot;Brak Przerwy&quot;;IF(OR([.D748]&lt;&gt;&quot;&quot;;[.E7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49]&lt;&gt;&quot;&quot;;[.E749]&lt;&gt;&quot;&quot;);&quot;Brak Przerwy&quot;;IF(OR([.D749]&lt;&gt;&quot;&quot;;[.E7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0]&lt;&gt;&quot;&quot;;[.E750]&lt;&gt;&quot;&quot;);&quot;Brak Przerwy&quot;;IF(OR([.D750]&lt;&gt;&quot;&quot;;[.E7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1]&lt;&gt;&quot;&quot;;[.E751]&lt;&gt;&quot;&quot;);&quot;Brak Przerwy&quot;;IF(OR([.D751]&lt;&gt;&quot;&quot;;[.E7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2]&lt;&gt;&quot;&quot;;[.E752]&lt;&gt;&quot;&quot;);&quot;Brak Przerwy&quot;;IF(OR([.D752]&lt;&gt;&quot;&quot;;[.E7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3]&lt;&gt;&quot;&quot;;[.E753]&lt;&gt;&quot;&quot;);&quot;Brak Przerwy&quot;;IF(OR([.D753]&lt;&gt;&quot;&quot;;[.E7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4]&lt;&gt;&quot;&quot;;[.E754]&lt;&gt;&quot;&quot;);&quot;Brak Przerwy&quot;;IF(OR([.D754]&lt;&gt;&quot;&quot;;[.E7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5]&lt;&gt;&quot;&quot;;[.E755]&lt;&gt;&quot;&quot;);&quot;Brak Przerwy&quot;;IF(OR([.D755]&lt;&gt;&quot;&quot;;[.E7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6]&lt;&gt;&quot;&quot;;[.E756]&lt;&gt;&quot;&quot;);&quot;Brak Przerwy&quot;;IF(OR([.D756]&lt;&gt;&quot;&quot;;[.E7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7]&lt;&gt;&quot;&quot;;[.E757]&lt;&gt;&quot;&quot;);&quot;Brak Przerwy&quot;;IF(OR([.D757]&lt;&gt;&quot;&quot;;[.E7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8]&lt;&gt;&quot;&quot;;[.E758]&lt;&gt;&quot;&quot;);&quot;Brak Przerwy&quot;;IF(OR([.D758]&lt;&gt;&quot;&quot;;[.E7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59]&lt;&gt;&quot;&quot;;[.E759]&lt;&gt;&quot;&quot;);&quot;Brak Przerwy&quot;;IF(OR([.D759]&lt;&gt;&quot;&quot;;[.E7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0]&lt;&gt;&quot;&quot;;[.E760]&lt;&gt;&quot;&quot;);&quot;Brak Przerwy&quot;;IF(OR([.D760]&lt;&gt;&quot;&quot;;[.E7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1]&lt;&gt;&quot;&quot;;[.E761]&lt;&gt;&quot;&quot;);&quot;Brak Przerwy&quot;;IF(OR([.D761]&lt;&gt;&quot;&quot;;[.E7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2]&lt;&gt;&quot;&quot;;[.E762]&lt;&gt;&quot;&quot;);&quot;Brak Przerwy&quot;;IF(OR([.D762]&lt;&gt;&quot;&quot;;[.E7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3]&lt;&gt;&quot;&quot;;[.E763]&lt;&gt;&quot;&quot;);&quot;Brak Przerwy&quot;;IF(OR([.D763]&lt;&gt;&quot;&quot;;[.E7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4]&lt;&gt;&quot;&quot;;[.E764]&lt;&gt;&quot;&quot;);&quot;Brak Przerwy&quot;;IF(OR([.D764]&lt;&gt;&quot;&quot;;[.E7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5]&lt;&gt;&quot;&quot;;[.E765]&lt;&gt;&quot;&quot;);&quot;Brak Przerwy&quot;;IF(OR([.D765]&lt;&gt;&quot;&quot;;[.E7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6]&lt;&gt;&quot;&quot;;[.E766]&lt;&gt;&quot;&quot;);&quot;Brak Przerwy&quot;;IF(OR([.D766]&lt;&gt;&quot;&quot;;[.E7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7]&lt;&gt;&quot;&quot;;[.E767]&lt;&gt;&quot;&quot;);&quot;Brak Przerwy&quot;;IF(OR([.D767]&lt;&gt;&quot;&quot;;[.E7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8]&lt;&gt;&quot;&quot;;[.E768]&lt;&gt;&quot;&quot;);&quot;Brak Przerwy&quot;;IF(OR([.D768]&lt;&gt;&quot;&quot;;[.E7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69]&lt;&gt;&quot;&quot;;[.E769]&lt;&gt;&quot;&quot;);&quot;Brak Przerwy&quot;;IF(OR([.D769]&lt;&gt;&quot;&quot;;[.E7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0]&lt;&gt;&quot;&quot;;[.E770]&lt;&gt;&quot;&quot;);&quot;Brak Przerwy&quot;;IF(OR([.D770]&lt;&gt;&quot;&quot;;[.E7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1]&lt;&gt;&quot;&quot;;[.E771]&lt;&gt;&quot;&quot;);&quot;Brak Przerwy&quot;;IF(OR([.D771]&lt;&gt;&quot;&quot;;[.E7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2]&lt;&gt;&quot;&quot;;[.E772]&lt;&gt;&quot;&quot;);&quot;Brak Przerwy&quot;;IF(OR([.D772]&lt;&gt;&quot;&quot;;[.E7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3]&lt;&gt;&quot;&quot;;[.E773]&lt;&gt;&quot;&quot;);&quot;Brak Przerwy&quot;;IF(OR([.D773]&lt;&gt;&quot;&quot;;[.E7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4]&lt;&gt;&quot;&quot;;[.E774]&lt;&gt;&quot;&quot;);&quot;Brak Przerwy&quot;;IF(OR([.D774]&lt;&gt;&quot;&quot;;[.E7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5]&lt;&gt;&quot;&quot;;[.E775]&lt;&gt;&quot;&quot;);&quot;Brak Przerwy&quot;;IF(OR([.D775]&lt;&gt;&quot;&quot;;[.E7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6]&lt;&gt;&quot;&quot;;[.E776]&lt;&gt;&quot;&quot;);&quot;Brak Przerwy&quot;;IF(OR([.D776]&lt;&gt;&quot;&quot;;[.E7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7]&lt;&gt;&quot;&quot;;[.E777]&lt;&gt;&quot;&quot;);&quot;Brak Przerwy&quot;;IF(OR([.D777]&lt;&gt;&quot;&quot;;[.E7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8]&lt;&gt;&quot;&quot;;[.E778]&lt;&gt;&quot;&quot;);&quot;Brak Przerwy&quot;;IF(OR([.D778]&lt;&gt;&quot;&quot;;[.E7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79]&lt;&gt;&quot;&quot;;[.E779]&lt;&gt;&quot;&quot;);&quot;Brak Przerwy&quot;;IF(OR([.D779]&lt;&gt;&quot;&quot;;[.E7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0]&lt;&gt;&quot;&quot;;[.E780]&lt;&gt;&quot;&quot;);&quot;Brak Przerwy&quot;;IF(OR([.D780]&lt;&gt;&quot;&quot;;[.E7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1]&lt;&gt;&quot;&quot;;[.E781]&lt;&gt;&quot;&quot;);&quot;Brak Przerwy&quot;;IF(OR([.D781]&lt;&gt;&quot;&quot;;[.E7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2]&lt;&gt;&quot;&quot;;[.E782]&lt;&gt;&quot;&quot;);&quot;Brak Przerwy&quot;;IF(OR([.D782]&lt;&gt;&quot;&quot;;[.E7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3]&lt;&gt;&quot;&quot;;[.E783]&lt;&gt;&quot;&quot;);&quot;Brak Przerwy&quot;;IF(OR([.D783]&lt;&gt;&quot;&quot;;[.E7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4]&lt;&gt;&quot;&quot;;[.E784]&lt;&gt;&quot;&quot;);&quot;Brak Przerwy&quot;;IF(OR([.D784]&lt;&gt;&quot;&quot;;[.E7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5]&lt;&gt;&quot;&quot;;[.E785]&lt;&gt;&quot;&quot;);&quot;Brak Przerwy&quot;;IF(OR([.D785]&lt;&gt;&quot;&quot;;[.E7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6]&lt;&gt;&quot;&quot;;[.E786]&lt;&gt;&quot;&quot;);&quot;Brak Przerwy&quot;;IF(OR([.D786]&lt;&gt;&quot;&quot;;[.E7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7]&lt;&gt;&quot;&quot;;[.E787]&lt;&gt;&quot;&quot;);&quot;Brak Przerwy&quot;;IF(OR([.D787]&lt;&gt;&quot;&quot;;[.E7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8]&lt;&gt;&quot;&quot;;[.E788]&lt;&gt;&quot;&quot;);&quot;Brak Przerwy&quot;;IF(OR([.D788]&lt;&gt;&quot;&quot;;[.E7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89]&lt;&gt;&quot;&quot;;[.E789]&lt;&gt;&quot;&quot;);&quot;Brak Przerwy&quot;;IF(OR([.D789]&lt;&gt;&quot;&quot;;[.E7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0]&lt;&gt;&quot;&quot;;[.E790]&lt;&gt;&quot;&quot;);&quot;Brak Przerwy&quot;;IF(OR([.D790]&lt;&gt;&quot;&quot;;[.E7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1]&lt;&gt;&quot;&quot;;[.E791]&lt;&gt;&quot;&quot;);&quot;Brak Przerwy&quot;;IF(OR([.D791]&lt;&gt;&quot;&quot;;[.E7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2]&lt;&gt;&quot;&quot;;[.E792]&lt;&gt;&quot;&quot;);&quot;Brak Przerwy&quot;;IF(OR([.D792]&lt;&gt;&quot;&quot;;[.E7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3]&lt;&gt;&quot;&quot;;[.E793]&lt;&gt;&quot;&quot;);&quot;Brak Przerwy&quot;;IF(OR([.D793]&lt;&gt;&quot;&quot;;[.E7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4]&lt;&gt;&quot;&quot;;[.E794]&lt;&gt;&quot;&quot;);&quot;Brak Przerwy&quot;;IF(OR([.D794]&lt;&gt;&quot;&quot;;[.E7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5]&lt;&gt;&quot;&quot;;[.E795]&lt;&gt;&quot;&quot;);&quot;Brak Przerwy&quot;;IF(OR([.D795]&lt;&gt;&quot;&quot;;[.E7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6]&lt;&gt;&quot;&quot;;[.E796]&lt;&gt;&quot;&quot;);&quot;Brak Przerwy&quot;;IF(OR([.D796]&lt;&gt;&quot;&quot;;[.E7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7]&lt;&gt;&quot;&quot;;[.E797]&lt;&gt;&quot;&quot;);&quot;Brak Przerwy&quot;;IF(OR([.D797]&lt;&gt;&quot;&quot;;[.E7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8]&lt;&gt;&quot;&quot;;[.E798]&lt;&gt;&quot;&quot;);&quot;Brak Przerwy&quot;;IF(OR([.D798]&lt;&gt;&quot;&quot;;[.E7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799]&lt;&gt;&quot;&quot;;[.E799]&lt;&gt;&quot;&quot;);&quot;Brak Przerwy&quot;;IF(OR([.D799]&lt;&gt;&quot;&quot;;[.E7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0]&lt;&gt;&quot;&quot;;[.E800]&lt;&gt;&quot;&quot;);&quot;Brak Przerwy&quot;;IF(OR([.D800]&lt;&gt;&quot;&quot;;[.E8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1]&lt;&gt;&quot;&quot;;[.E801]&lt;&gt;&quot;&quot;);&quot;Brak Przerwy&quot;;IF(OR([.D801]&lt;&gt;&quot;&quot;;[.E8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2]&lt;&gt;&quot;&quot;;[.E802]&lt;&gt;&quot;&quot;);&quot;Brak Przerwy&quot;;IF(OR([.D802]&lt;&gt;&quot;&quot;;[.E8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3]&lt;&gt;&quot;&quot;;[.E803]&lt;&gt;&quot;&quot;);&quot;Brak Przerwy&quot;;IF(OR([.D803]&lt;&gt;&quot;&quot;;[.E8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4]&lt;&gt;&quot;&quot;;[.E804]&lt;&gt;&quot;&quot;);&quot;Brak Przerwy&quot;;IF(OR([.D804]&lt;&gt;&quot;&quot;;[.E8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5]&lt;&gt;&quot;&quot;;[.E805]&lt;&gt;&quot;&quot;);&quot;Brak Przerwy&quot;;IF(OR([.D805]&lt;&gt;&quot;&quot;;[.E8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6]&lt;&gt;&quot;&quot;;[.E806]&lt;&gt;&quot;&quot;);&quot;Brak Przerwy&quot;;IF(OR([.D806]&lt;&gt;&quot;&quot;;[.E8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7]&lt;&gt;&quot;&quot;;[.E807]&lt;&gt;&quot;&quot;);&quot;Brak Przerwy&quot;;IF(OR([.D807]&lt;&gt;&quot;&quot;;[.E8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8]&lt;&gt;&quot;&quot;;[.E808]&lt;&gt;&quot;&quot;);&quot;Brak Przerwy&quot;;IF(OR([.D808]&lt;&gt;&quot;&quot;;[.E8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09]&lt;&gt;&quot;&quot;;[.E809]&lt;&gt;&quot;&quot;);&quot;Brak Przerwy&quot;;IF(OR([.D809]&lt;&gt;&quot;&quot;;[.E8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0]&lt;&gt;&quot;&quot;;[.E810]&lt;&gt;&quot;&quot;);&quot;Brak Przerwy&quot;;IF(OR([.D810]&lt;&gt;&quot;&quot;;[.E8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1]&lt;&gt;&quot;&quot;;[.E811]&lt;&gt;&quot;&quot;);&quot;Brak Przerwy&quot;;IF(OR([.D811]&lt;&gt;&quot;&quot;;[.E8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2]&lt;&gt;&quot;&quot;;[.E812]&lt;&gt;&quot;&quot;);&quot;Brak Przerwy&quot;;IF(OR([.D812]&lt;&gt;&quot;&quot;;[.E8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3]&lt;&gt;&quot;&quot;;[.E813]&lt;&gt;&quot;&quot;);&quot;Brak Przerwy&quot;;IF(OR([.D813]&lt;&gt;&quot;&quot;;[.E8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4]&lt;&gt;&quot;&quot;;[.E814]&lt;&gt;&quot;&quot;);&quot;Brak Przerwy&quot;;IF(OR([.D814]&lt;&gt;&quot;&quot;;[.E8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5]&lt;&gt;&quot;&quot;;[.E815]&lt;&gt;&quot;&quot;);&quot;Brak Przerwy&quot;;IF(OR([.D815]&lt;&gt;&quot;&quot;;[.E8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6]&lt;&gt;&quot;&quot;;[.E816]&lt;&gt;&quot;&quot;);&quot;Brak Przerwy&quot;;IF(OR([.D816]&lt;&gt;&quot;&quot;;[.E8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7]&lt;&gt;&quot;&quot;;[.E817]&lt;&gt;&quot;&quot;);&quot;Brak Przerwy&quot;;IF(OR([.D817]&lt;&gt;&quot;&quot;;[.E8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8]&lt;&gt;&quot;&quot;;[.E818]&lt;&gt;&quot;&quot;);&quot;Brak Przerwy&quot;;IF(OR([.D818]&lt;&gt;&quot;&quot;;[.E8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19]&lt;&gt;&quot;&quot;;[.E819]&lt;&gt;&quot;&quot;);&quot;Brak Przerwy&quot;;IF(OR([.D819]&lt;&gt;&quot;&quot;;[.E8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0]&lt;&gt;&quot;&quot;;[.E820]&lt;&gt;&quot;&quot;);&quot;Brak Przerwy&quot;;IF(OR([.D820]&lt;&gt;&quot;&quot;;[.E8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1]&lt;&gt;&quot;&quot;;[.E821]&lt;&gt;&quot;&quot;);&quot;Brak Przerwy&quot;;IF(OR([.D821]&lt;&gt;&quot;&quot;;[.E8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2]&lt;&gt;&quot;&quot;;[.E822]&lt;&gt;&quot;&quot;);&quot;Brak Przerwy&quot;;IF(OR([.D822]&lt;&gt;&quot;&quot;;[.E8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3]&lt;&gt;&quot;&quot;;[.E823]&lt;&gt;&quot;&quot;);&quot;Brak Przerwy&quot;;IF(OR([.D823]&lt;&gt;&quot;&quot;;[.E8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4]&lt;&gt;&quot;&quot;;[.E824]&lt;&gt;&quot;&quot;);&quot;Brak Przerwy&quot;;IF(OR([.D824]&lt;&gt;&quot;&quot;;[.E8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5]&lt;&gt;&quot;&quot;;[.E825]&lt;&gt;&quot;&quot;);&quot;Brak Przerwy&quot;;IF(OR([.D825]&lt;&gt;&quot;&quot;;[.E8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6]&lt;&gt;&quot;&quot;;[.E826]&lt;&gt;&quot;&quot;);&quot;Brak Przerwy&quot;;IF(OR([.D826]&lt;&gt;&quot;&quot;;[.E8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7]&lt;&gt;&quot;&quot;;[.E827]&lt;&gt;&quot;&quot;);&quot;Brak Przerwy&quot;;IF(OR([.D827]&lt;&gt;&quot;&quot;;[.E8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8]&lt;&gt;&quot;&quot;;[.E828]&lt;&gt;&quot;&quot;);&quot;Brak Przerwy&quot;;IF(OR([.D828]&lt;&gt;&quot;&quot;;[.E8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29]&lt;&gt;&quot;&quot;;[.E829]&lt;&gt;&quot;&quot;);&quot;Brak Przerwy&quot;;IF(OR([.D829]&lt;&gt;&quot;&quot;;[.E8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0]&lt;&gt;&quot;&quot;;[.E830]&lt;&gt;&quot;&quot;);&quot;Brak Przerwy&quot;;IF(OR([.D830]&lt;&gt;&quot;&quot;;[.E8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1]&lt;&gt;&quot;&quot;;[.E831]&lt;&gt;&quot;&quot;);&quot;Brak Przerwy&quot;;IF(OR([.D831]&lt;&gt;&quot;&quot;;[.E8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2]&lt;&gt;&quot;&quot;;[.E832]&lt;&gt;&quot;&quot;);&quot;Brak Przerwy&quot;;IF(OR([.D832]&lt;&gt;&quot;&quot;;[.E8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3]&lt;&gt;&quot;&quot;;[.E833]&lt;&gt;&quot;&quot;);&quot;Brak Przerwy&quot;;IF(OR([.D833]&lt;&gt;&quot;&quot;;[.E8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4]&lt;&gt;&quot;&quot;;[.E834]&lt;&gt;&quot;&quot;);&quot;Brak Przerwy&quot;;IF(OR([.D834]&lt;&gt;&quot;&quot;;[.E8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5]&lt;&gt;&quot;&quot;;[.E835]&lt;&gt;&quot;&quot;);&quot;Brak Przerwy&quot;;IF(OR([.D835]&lt;&gt;&quot;&quot;;[.E8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6]&lt;&gt;&quot;&quot;;[.E836]&lt;&gt;&quot;&quot;);&quot;Brak Przerwy&quot;;IF(OR([.D836]&lt;&gt;&quot;&quot;;[.E8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7]&lt;&gt;&quot;&quot;;[.E837]&lt;&gt;&quot;&quot;);&quot;Brak Przerwy&quot;;IF(OR([.D837]&lt;&gt;&quot;&quot;;[.E8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8]&lt;&gt;&quot;&quot;;[.E838]&lt;&gt;&quot;&quot;);&quot;Brak Przerwy&quot;;IF(OR([.D838]&lt;&gt;&quot;&quot;;[.E8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39]&lt;&gt;&quot;&quot;;[.E839]&lt;&gt;&quot;&quot;);&quot;Brak Przerwy&quot;;IF(OR([.D839]&lt;&gt;&quot;&quot;;[.E8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0]&lt;&gt;&quot;&quot;;[.E840]&lt;&gt;&quot;&quot;);&quot;Brak Przerwy&quot;;IF(OR([.D840]&lt;&gt;&quot;&quot;;[.E8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1]&lt;&gt;&quot;&quot;;[.E841]&lt;&gt;&quot;&quot;);&quot;Brak Przerwy&quot;;IF(OR([.D841]&lt;&gt;&quot;&quot;;[.E8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2]&lt;&gt;&quot;&quot;;[.E842]&lt;&gt;&quot;&quot;);&quot;Brak Przerwy&quot;;IF(OR([.D842]&lt;&gt;&quot;&quot;;[.E8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3]&lt;&gt;&quot;&quot;;[.E843]&lt;&gt;&quot;&quot;);&quot;Brak Przerwy&quot;;IF(OR([.D843]&lt;&gt;&quot;&quot;;[.E8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4]&lt;&gt;&quot;&quot;;[.E844]&lt;&gt;&quot;&quot;);&quot;Brak Przerwy&quot;;IF(OR([.D844]&lt;&gt;&quot;&quot;;[.E8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5]&lt;&gt;&quot;&quot;;[.E845]&lt;&gt;&quot;&quot;);&quot;Brak Przerwy&quot;;IF(OR([.D845]&lt;&gt;&quot;&quot;;[.E8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6]&lt;&gt;&quot;&quot;;[.E846]&lt;&gt;&quot;&quot;);&quot;Brak Przerwy&quot;;IF(OR([.D846]&lt;&gt;&quot;&quot;;[.E8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7]&lt;&gt;&quot;&quot;;[.E847]&lt;&gt;&quot;&quot;);&quot;Brak Przerwy&quot;;IF(OR([.D847]&lt;&gt;&quot;&quot;;[.E8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8]&lt;&gt;&quot;&quot;;[.E848]&lt;&gt;&quot;&quot;);&quot;Brak Przerwy&quot;;IF(OR([.D848]&lt;&gt;&quot;&quot;;[.E8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49]&lt;&gt;&quot;&quot;;[.E849]&lt;&gt;&quot;&quot;);&quot;Brak Przerwy&quot;;IF(OR([.D849]&lt;&gt;&quot;&quot;;[.E8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0]&lt;&gt;&quot;&quot;;[.E850]&lt;&gt;&quot;&quot;);&quot;Brak Przerwy&quot;;IF(OR([.D850]&lt;&gt;&quot;&quot;;[.E8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1]&lt;&gt;&quot;&quot;;[.E851]&lt;&gt;&quot;&quot;);&quot;Brak Przerwy&quot;;IF(OR([.D851]&lt;&gt;&quot;&quot;;[.E8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2]&lt;&gt;&quot;&quot;;[.E852]&lt;&gt;&quot;&quot;);&quot;Brak Przerwy&quot;;IF(OR([.D852]&lt;&gt;&quot;&quot;;[.E8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3]&lt;&gt;&quot;&quot;;[.E853]&lt;&gt;&quot;&quot;);&quot;Brak Przerwy&quot;;IF(OR([.D853]&lt;&gt;&quot;&quot;;[.E8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4]&lt;&gt;&quot;&quot;;[.E854]&lt;&gt;&quot;&quot;);&quot;Brak Przerwy&quot;;IF(OR([.D854]&lt;&gt;&quot;&quot;;[.E8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5]&lt;&gt;&quot;&quot;;[.E855]&lt;&gt;&quot;&quot;);&quot;Brak Przerwy&quot;;IF(OR([.D855]&lt;&gt;&quot;&quot;;[.E8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6]&lt;&gt;&quot;&quot;;[.E856]&lt;&gt;&quot;&quot;);&quot;Brak Przerwy&quot;;IF(OR([.D856]&lt;&gt;&quot;&quot;;[.E8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7]&lt;&gt;&quot;&quot;;[.E857]&lt;&gt;&quot;&quot;);&quot;Brak Przerwy&quot;;IF(OR([.D857]&lt;&gt;&quot;&quot;;[.E8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8]&lt;&gt;&quot;&quot;;[.E858]&lt;&gt;&quot;&quot;);&quot;Brak Przerwy&quot;;IF(OR([.D858]&lt;&gt;&quot;&quot;;[.E8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59]&lt;&gt;&quot;&quot;;[.E859]&lt;&gt;&quot;&quot;);&quot;Brak Przerwy&quot;;IF(OR([.D859]&lt;&gt;&quot;&quot;;[.E8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0]&lt;&gt;&quot;&quot;;[.E860]&lt;&gt;&quot;&quot;);&quot;Brak Przerwy&quot;;IF(OR([.D860]&lt;&gt;&quot;&quot;;[.E8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1]&lt;&gt;&quot;&quot;;[.E861]&lt;&gt;&quot;&quot;);&quot;Brak Przerwy&quot;;IF(OR([.D861]&lt;&gt;&quot;&quot;;[.E8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2]&lt;&gt;&quot;&quot;;[.E862]&lt;&gt;&quot;&quot;);&quot;Brak Przerwy&quot;;IF(OR([.D862]&lt;&gt;&quot;&quot;;[.E8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3]&lt;&gt;&quot;&quot;;[.E863]&lt;&gt;&quot;&quot;);&quot;Brak Przerwy&quot;;IF(OR([.D863]&lt;&gt;&quot;&quot;;[.E8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4]&lt;&gt;&quot;&quot;;[.E864]&lt;&gt;&quot;&quot;);&quot;Brak Przerwy&quot;;IF(OR([.D864]&lt;&gt;&quot;&quot;;[.E8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5]&lt;&gt;&quot;&quot;;[.E865]&lt;&gt;&quot;&quot;);&quot;Brak Przerwy&quot;;IF(OR([.D865]&lt;&gt;&quot;&quot;;[.E8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6]&lt;&gt;&quot;&quot;;[.E866]&lt;&gt;&quot;&quot;);&quot;Brak Przerwy&quot;;IF(OR([.D866]&lt;&gt;&quot;&quot;;[.E8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7]&lt;&gt;&quot;&quot;;[.E867]&lt;&gt;&quot;&quot;);&quot;Brak Przerwy&quot;;IF(OR([.D867]&lt;&gt;&quot;&quot;;[.E8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8]&lt;&gt;&quot;&quot;;[.E868]&lt;&gt;&quot;&quot;);&quot;Brak Przerwy&quot;;IF(OR([.D868]&lt;&gt;&quot;&quot;;[.E8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69]&lt;&gt;&quot;&quot;;[.E869]&lt;&gt;&quot;&quot;);&quot;Brak Przerwy&quot;;IF(OR([.D869]&lt;&gt;&quot;&quot;;[.E8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0]&lt;&gt;&quot;&quot;;[.E870]&lt;&gt;&quot;&quot;);&quot;Brak Przerwy&quot;;IF(OR([.D870]&lt;&gt;&quot;&quot;;[.E8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1]&lt;&gt;&quot;&quot;;[.E871]&lt;&gt;&quot;&quot;);&quot;Brak Przerwy&quot;;IF(OR([.D871]&lt;&gt;&quot;&quot;;[.E8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2]&lt;&gt;&quot;&quot;;[.E872]&lt;&gt;&quot;&quot;);&quot;Brak Przerwy&quot;;IF(OR([.D872]&lt;&gt;&quot;&quot;;[.E8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3]&lt;&gt;&quot;&quot;;[.E873]&lt;&gt;&quot;&quot;);&quot;Brak Przerwy&quot;;IF(OR([.D873]&lt;&gt;&quot;&quot;;[.E8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4]&lt;&gt;&quot;&quot;;[.E874]&lt;&gt;&quot;&quot;);&quot;Brak Przerwy&quot;;IF(OR([.D874]&lt;&gt;&quot;&quot;;[.E8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5]&lt;&gt;&quot;&quot;;[.E875]&lt;&gt;&quot;&quot;);&quot;Brak Przerwy&quot;;IF(OR([.D875]&lt;&gt;&quot;&quot;;[.E8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6]&lt;&gt;&quot;&quot;;[.E876]&lt;&gt;&quot;&quot;);&quot;Brak Przerwy&quot;;IF(OR([.D876]&lt;&gt;&quot;&quot;;[.E8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7]&lt;&gt;&quot;&quot;;[.E877]&lt;&gt;&quot;&quot;);&quot;Brak Przerwy&quot;;IF(OR([.D877]&lt;&gt;&quot;&quot;;[.E8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8]&lt;&gt;&quot;&quot;;[.E878]&lt;&gt;&quot;&quot;);&quot;Brak Przerwy&quot;;IF(OR([.D878]&lt;&gt;&quot;&quot;;[.E8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79]&lt;&gt;&quot;&quot;;[.E879]&lt;&gt;&quot;&quot;);&quot;Brak Przerwy&quot;;IF(OR([.D879]&lt;&gt;&quot;&quot;;[.E8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0]&lt;&gt;&quot;&quot;;[.E880]&lt;&gt;&quot;&quot;);&quot;Brak Przerwy&quot;;IF(OR([.D880]&lt;&gt;&quot;&quot;;[.E8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1]&lt;&gt;&quot;&quot;;[.E881]&lt;&gt;&quot;&quot;);&quot;Brak Przerwy&quot;;IF(OR([.D881]&lt;&gt;&quot;&quot;;[.E8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2]&lt;&gt;&quot;&quot;;[.E882]&lt;&gt;&quot;&quot;);&quot;Brak Przerwy&quot;;IF(OR([.D882]&lt;&gt;&quot;&quot;;[.E8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3]&lt;&gt;&quot;&quot;;[.E883]&lt;&gt;&quot;&quot;);&quot;Brak Przerwy&quot;;IF(OR([.D883]&lt;&gt;&quot;&quot;;[.E8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4]&lt;&gt;&quot;&quot;;[.E884]&lt;&gt;&quot;&quot;);&quot;Brak Przerwy&quot;;IF(OR([.D884]&lt;&gt;&quot;&quot;;[.E8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5]&lt;&gt;&quot;&quot;;[.E885]&lt;&gt;&quot;&quot;);&quot;Brak Przerwy&quot;;IF(OR([.D885]&lt;&gt;&quot;&quot;;[.E8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6]&lt;&gt;&quot;&quot;;[.E886]&lt;&gt;&quot;&quot;);&quot;Brak Przerwy&quot;;IF(OR([.D886]&lt;&gt;&quot;&quot;;[.E8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7]&lt;&gt;&quot;&quot;;[.E887]&lt;&gt;&quot;&quot;);&quot;Brak Przerwy&quot;;IF(OR([.D887]&lt;&gt;&quot;&quot;;[.E8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8]&lt;&gt;&quot;&quot;;[.E888]&lt;&gt;&quot;&quot;);&quot;Brak Przerwy&quot;;IF(OR([.D888]&lt;&gt;&quot;&quot;;[.E8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89]&lt;&gt;&quot;&quot;;[.E889]&lt;&gt;&quot;&quot;);&quot;Brak Przerwy&quot;;IF(OR([.D889]&lt;&gt;&quot;&quot;;[.E8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0]&lt;&gt;&quot;&quot;;[.E890]&lt;&gt;&quot;&quot;);&quot;Brak Przerwy&quot;;IF(OR([.D890]&lt;&gt;&quot;&quot;;[.E8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1]&lt;&gt;&quot;&quot;;[.E891]&lt;&gt;&quot;&quot;);&quot;Brak Przerwy&quot;;IF(OR([.D891]&lt;&gt;&quot;&quot;;[.E8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2]&lt;&gt;&quot;&quot;;[.E892]&lt;&gt;&quot;&quot;);&quot;Brak Przerwy&quot;;IF(OR([.D892]&lt;&gt;&quot;&quot;;[.E8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3]&lt;&gt;&quot;&quot;;[.E893]&lt;&gt;&quot;&quot;);&quot;Brak Przerwy&quot;;IF(OR([.D893]&lt;&gt;&quot;&quot;;[.E8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4]&lt;&gt;&quot;&quot;;[.E894]&lt;&gt;&quot;&quot;);&quot;Brak Przerwy&quot;;IF(OR([.D894]&lt;&gt;&quot;&quot;;[.E8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5]&lt;&gt;&quot;&quot;;[.E895]&lt;&gt;&quot;&quot;);&quot;Brak Przerwy&quot;;IF(OR([.D895]&lt;&gt;&quot;&quot;;[.E8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6]&lt;&gt;&quot;&quot;;[.E896]&lt;&gt;&quot;&quot;);&quot;Brak Przerwy&quot;;IF(OR([.D896]&lt;&gt;&quot;&quot;;[.E8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7]&lt;&gt;&quot;&quot;;[.E897]&lt;&gt;&quot;&quot;);&quot;Brak Przerwy&quot;;IF(OR([.D897]&lt;&gt;&quot;&quot;;[.E8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8]&lt;&gt;&quot;&quot;;[.E898]&lt;&gt;&quot;&quot;);&quot;Brak Przerwy&quot;;IF(OR([.D898]&lt;&gt;&quot;&quot;;[.E8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899]&lt;&gt;&quot;&quot;;[.E899]&lt;&gt;&quot;&quot;);&quot;Brak Przerwy&quot;;IF(OR([.D899]&lt;&gt;&quot;&quot;;[.E8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0]&lt;&gt;&quot;&quot;;[.E900]&lt;&gt;&quot;&quot;);&quot;Brak Przerwy&quot;;IF(OR([.D900]&lt;&gt;&quot;&quot;;[.E9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1]&lt;&gt;&quot;&quot;;[.E901]&lt;&gt;&quot;&quot;);&quot;Brak Przerwy&quot;;IF(OR([.D901]&lt;&gt;&quot;&quot;;[.E9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2]&lt;&gt;&quot;&quot;;[.E902]&lt;&gt;&quot;&quot;);&quot;Brak Przerwy&quot;;IF(OR([.D902]&lt;&gt;&quot;&quot;;[.E9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3]&lt;&gt;&quot;&quot;;[.E903]&lt;&gt;&quot;&quot;);&quot;Brak Przerwy&quot;;IF(OR([.D903]&lt;&gt;&quot;&quot;;[.E9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4]&lt;&gt;&quot;&quot;;[.E904]&lt;&gt;&quot;&quot;);&quot;Brak Przerwy&quot;;IF(OR([.D904]&lt;&gt;&quot;&quot;;[.E9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5]&lt;&gt;&quot;&quot;;[.E905]&lt;&gt;&quot;&quot;);&quot;Brak Przerwy&quot;;IF(OR([.D905]&lt;&gt;&quot;&quot;;[.E9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6]&lt;&gt;&quot;&quot;;[.E906]&lt;&gt;&quot;&quot;);&quot;Brak Przerwy&quot;;IF(OR([.D906]&lt;&gt;&quot;&quot;;[.E9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7]&lt;&gt;&quot;&quot;;[.E907]&lt;&gt;&quot;&quot;);&quot;Brak Przerwy&quot;;IF(OR([.D907]&lt;&gt;&quot;&quot;;[.E9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8]&lt;&gt;&quot;&quot;;[.E908]&lt;&gt;&quot;&quot;);&quot;Brak Przerwy&quot;;IF(OR([.D908]&lt;&gt;&quot;&quot;;[.E9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09]&lt;&gt;&quot;&quot;;[.E909]&lt;&gt;&quot;&quot;);&quot;Brak Przerwy&quot;;IF(OR([.D909]&lt;&gt;&quot;&quot;;[.E9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0]&lt;&gt;&quot;&quot;;[.E910]&lt;&gt;&quot;&quot;);&quot;Brak Przerwy&quot;;IF(OR([.D910]&lt;&gt;&quot;&quot;;[.E9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1]&lt;&gt;&quot;&quot;;[.E911]&lt;&gt;&quot;&quot;);&quot;Brak Przerwy&quot;;IF(OR([.D911]&lt;&gt;&quot;&quot;;[.E9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2]&lt;&gt;&quot;&quot;;[.E912]&lt;&gt;&quot;&quot;);&quot;Brak Przerwy&quot;;IF(OR([.D912]&lt;&gt;&quot;&quot;;[.E9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3]&lt;&gt;&quot;&quot;;[.E913]&lt;&gt;&quot;&quot;);&quot;Brak Przerwy&quot;;IF(OR([.D913]&lt;&gt;&quot;&quot;;[.E9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4]&lt;&gt;&quot;&quot;;[.E914]&lt;&gt;&quot;&quot;);&quot;Brak Przerwy&quot;;IF(OR([.D914]&lt;&gt;&quot;&quot;;[.E9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5]&lt;&gt;&quot;&quot;;[.E915]&lt;&gt;&quot;&quot;);&quot;Brak Przerwy&quot;;IF(OR([.D915]&lt;&gt;&quot;&quot;;[.E9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6]&lt;&gt;&quot;&quot;;[.E916]&lt;&gt;&quot;&quot;);&quot;Brak Przerwy&quot;;IF(OR([.D916]&lt;&gt;&quot;&quot;;[.E9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7]&lt;&gt;&quot;&quot;;[.E917]&lt;&gt;&quot;&quot;);&quot;Brak Przerwy&quot;;IF(OR([.D917]&lt;&gt;&quot;&quot;;[.E9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8]&lt;&gt;&quot;&quot;;[.E918]&lt;&gt;&quot;&quot;);&quot;Brak Przerwy&quot;;IF(OR([.D918]&lt;&gt;&quot;&quot;;[.E9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19]&lt;&gt;&quot;&quot;;[.E919]&lt;&gt;&quot;&quot;);&quot;Brak Przerwy&quot;;IF(OR([.D919]&lt;&gt;&quot;&quot;;[.E9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0]&lt;&gt;&quot;&quot;;[.E920]&lt;&gt;&quot;&quot;);&quot;Brak Przerwy&quot;;IF(OR([.D920]&lt;&gt;&quot;&quot;;[.E9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1]&lt;&gt;&quot;&quot;;[.E921]&lt;&gt;&quot;&quot;);&quot;Brak Przerwy&quot;;IF(OR([.D921]&lt;&gt;&quot;&quot;;[.E9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2]&lt;&gt;&quot;&quot;;[.E922]&lt;&gt;&quot;&quot;);&quot;Brak Przerwy&quot;;IF(OR([.D922]&lt;&gt;&quot;&quot;;[.E9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3]&lt;&gt;&quot;&quot;;[.E923]&lt;&gt;&quot;&quot;);&quot;Brak Przerwy&quot;;IF(OR([.D923]&lt;&gt;&quot;&quot;;[.E9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4]&lt;&gt;&quot;&quot;;[.E924]&lt;&gt;&quot;&quot;);&quot;Brak Przerwy&quot;;IF(OR([.D924]&lt;&gt;&quot;&quot;;[.E9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5]&lt;&gt;&quot;&quot;;[.E925]&lt;&gt;&quot;&quot;);&quot;Brak Przerwy&quot;;IF(OR([.D925]&lt;&gt;&quot;&quot;;[.E9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6]&lt;&gt;&quot;&quot;;[.E926]&lt;&gt;&quot;&quot;);&quot;Brak Przerwy&quot;;IF(OR([.D926]&lt;&gt;&quot;&quot;;[.E9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7]&lt;&gt;&quot;&quot;;[.E927]&lt;&gt;&quot;&quot;);&quot;Brak Przerwy&quot;;IF(OR([.D927]&lt;&gt;&quot;&quot;;[.E9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8]&lt;&gt;&quot;&quot;;[.E928]&lt;&gt;&quot;&quot;);&quot;Brak Przerwy&quot;;IF(OR([.D928]&lt;&gt;&quot;&quot;;[.E9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29]&lt;&gt;&quot;&quot;;[.E929]&lt;&gt;&quot;&quot;);&quot;Brak Przerwy&quot;;IF(OR([.D929]&lt;&gt;&quot;&quot;;[.E9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0]&lt;&gt;&quot;&quot;;[.E930]&lt;&gt;&quot;&quot;);&quot;Brak Przerwy&quot;;IF(OR([.D930]&lt;&gt;&quot;&quot;;[.E9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1]&lt;&gt;&quot;&quot;;[.E931]&lt;&gt;&quot;&quot;);&quot;Brak Przerwy&quot;;IF(OR([.D931]&lt;&gt;&quot;&quot;;[.E9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2]&lt;&gt;&quot;&quot;;[.E932]&lt;&gt;&quot;&quot;);&quot;Brak Przerwy&quot;;IF(OR([.D932]&lt;&gt;&quot;&quot;;[.E9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3]&lt;&gt;&quot;&quot;;[.E933]&lt;&gt;&quot;&quot;);&quot;Brak Przerwy&quot;;IF(OR([.D933]&lt;&gt;&quot;&quot;;[.E9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4]&lt;&gt;&quot;&quot;;[.E934]&lt;&gt;&quot;&quot;);&quot;Brak Przerwy&quot;;IF(OR([.D934]&lt;&gt;&quot;&quot;;[.E9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5]&lt;&gt;&quot;&quot;;[.E935]&lt;&gt;&quot;&quot;);&quot;Brak Przerwy&quot;;IF(OR([.D935]&lt;&gt;&quot;&quot;;[.E9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6]&lt;&gt;&quot;&quot;;[.E936]&lt;&gt;&quot;&quot;);&quot;Brak Przerwy&quot;;IF(OR([.D936]&lt;&gt;&quot;&quot;;[.E9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7]&lt;&gt;&quot;&quot;;[.E937]&lt;&gt;&quot;&quot;);&quot;Brak Przerwy&quot;;IF(OR([.D937]&lt;&gt;&quot;&quot;;[.E9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8]&lt;&gt;&quot;&quot;;[.E938]&lt;&gt;&quot;&quot;);&quot;Brak Przerwy&quot;;IF(OR([.D938]&lt;&gt;&quot;&quot;;[.E9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39]&lt;&gt;&quot;&quot;;[.E939]&lt;&gt;&quot;&quot;);&quot;Brak Przerwy&quot;;IF(OR([.D939]&lt;&gt;&quot;&quot;;[.E9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0]&lt;&gt;&quot;&quot;;[.E940]&lt;&gt;&quot;&quot;);&quot;Brak Przerwy&quot;;IF(OR([.D940]&lt;&gt;&quot;&quot;;[.E9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1]&lt;&gt;&quot;&quot;;[.E941]&lt;&gt;&quot;&quot;);&quot;Brak Przerwy&quot;;IF(OR([.D941]&lt;&gt;&quot;&quot;;[.E9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2]&lt;&gt;&quot;&quot;;[.E942]&lt;&gt;&quot;&quot;);&quot;Brak Przerwy&quot;;IF(OR([.D942]&lt;&gt;&quot;&quot;;[.E9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3]&lt;&gt;&quot;&quot;;[.E943]&lt;&gt;&quot;&quot;);&quot;Brak Przerwy&quot;;IF(OR([.D943]&lt;&gt;&quot;&quot;;[.E9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4]&lt;&gt;&quot;&quot;;[.E944]&lt;&gt;&quot;&quot;);&quot;Brak Przerwy&quot;;IF(OR([.D944]&lt;&gt;&quot;&quot;;[.E9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5]&lt;&gt;&quot;&quot;;[.E945]&lt;&gt;&quot;&quot;);&quot;Brak Przerwy&quot;;IF(OR([.D945]&lt;&gt;&quot;&quot;;[.E9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6]&lt;&gt;&quot;&quot;;[.E946]&lt;&gt;&quot;&quot;);&quot;Brak Przerwy&quot;;IF(OR([.D946]&lt;&gt;&quot;&quot;;[.E9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7]&lt;&gt;&quot;&quot;;[.E947]&lt;&gt;&quot;&quot;);&quot;Brak Przerwy&quot;;IF(OR([.D947]&lt;&gt;&quot;&quot;;[.E9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8]&lt;&gt;&quot;&quot;;[.E948]&lt;&gt;&quot;&quot;);&quot;Brak Przerwy&quot;;IF(OR([.D948]&lt;&gt;&quot;&quot;;[.E9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49]&lt;&gt;&quot;&quot;;[.E949]&lt;&gt;&quot;&quot;);&quot;Brak Przerwy&quot;;IF(OR([.D949]&lt;&gt;&quot;&quot;;[.E9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0]&lt;&gt;&quot;&quot;;[.E950]&lt;&gt;&quot;&quot;);&quot;Brak Przerwy&quot;;IF(OR([.D950]&lt;&gt;&quot;&quot;;[.E9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1]&lt;&gt;&quot;&quot;;[.E951]&lt;&gt;&quot;&quot;);&quot;Brak Przerwy&quot;;IF(OR([.D951]&lt;&gt;&quot;&quot;;[.E9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2]&lt;&gt;&quot;&quot;;[.E952]&lt;&gt;&quot;&quot;);&quot;Brak Przerwy&quot;;IF(OR([.D952]&lt;&gt;&quot;&quot;;[.E9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3]&lt;&gt;&quot;&quot;;[.E953]&lt;&gt;&quot;&quot;);&quot;Brak Przerwy&quot;;IF(OR([.D953]&lt;&gt;&quot;&quot;;[.E9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4]&lt;&gt;&quot;&quot;;[.E954]&lt;&gt;&quot;&quot;);&quot;Brak Przerwy&quot;;IF(OR([.D954]&lt;&gt;&quot;&quot;;[.E9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5]&lt;&gt;&quot;&quot;;[.E955]&lt;&gt;&quot;&quot;);&quot;Brak Przerwy&quot;;IF(OR([.D955]&lt;&gt;&quot;&quot;;[.E9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6]&lt;&gt;&quot;&quot;;[.E956]&lt;&gt;&quot;&quot;);&quot;Brak Przerwy&quot;;IF(OR([.D956]&lt;&gt;&quot;&quot;;[.E9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7]&lt;&gt;&quot;&quot;;[.E957]&lt;&gt;&quot;&quot;);&quot;Brak Przerwy&quot;;IF(OR([.D957]&lt;&gt;&quot;&quot;;[.E9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8]&lt;&gt;&quot;&quot;;[.E958]&lt;&gt;&quot;&quot;);&quot;Brak Przerwy&quot;;IF(OR([.D958]&lt;&gt;&quot;&quot;;[.E9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59]&lt;&gt;&quot;&quot;;[.E959]&lt;&gt;&quot;&quot;);&quot;Brak Przerwy&quot;;IF(OR([.D959]&lt;&gt;&quot;&quot;;[.E9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0]&lt;&gt;&quot;&quot;;[.E960]&lt;&gt;&quot;&quot;);&quot;Brak Przerwy&quot;;IF(OR([.D960]&lt;&gt;&quot;&quot;;[.E9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1]&lt;&gt;&quot;&quot;;[.E961]&lt;&gt;&quot;&quot;);&quot;Brak Przerwy&quot;;IF(OR([.D961]&lt;&gt;&quot;&quot;;[.E9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2]&lt;&gt;&quot;&quot;;[.E962]&lt;&gt;&quot;&quot;);&quot;Brak Przerwy&quot;;IF(OR([.D962]&lt;&gt;&quot;&quot;;[.E9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3]&lt;&gt;&quot;&quot;;[.E963]&lt;&gt;&quot;&quot;);&quot;Brak Przerwy&quot;;IF(OR([.D963]&lt;&gt;&quot;&quot;;[.E9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4]&lt;&gt;&quot;&quot;;[.E964]&lt;&gt;&quot;&quot;);&quot;Brak Przerwy&quot;;IF(OR([.D964]&lt;&gt;&quot;&quot;;[.E9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5]&lt;&gt;&quot;&quot;;[.E965]&lt;&gt;&quot;&quot;);&quot;Brak Przerwy&quot;;IF(OR([.D965]&lt;&gt;&quot;&quot;;[.E9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6]&lt;&gt;&quot;&quot;;[.E966]&lt;&gt;&quot;&quot;);&quot;Brak Przerwy&quot;;IF(OR([.D966]&lt;&gt;&quot;&quot;;[.E9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7]&lt;&gt;&quot;&quot;;[.E967]&lt;&gt;&quot;&quot;);&quot;Brak Przerwy&quot;;IF(OR([.D967]&lt;&gt;&quot;&quot;;[.E9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8]&lt;&gt;&quot;&quot;;[.E968]&lt;&gt;&quot;&quot;);&quot;Brak Przerwy&quot;;IF(OR([.D968]&lt;&gt;&quot;&quot;;[.E9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69]&lt;&gt;&quot;&quot;;[.E969]&lt;&gt;&quot;&quot;);&quot;Brak Przerwy&quot;;IF(OR([.D969]&lt;&gt;&quot;&quot;;[.E9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0]&lt;&gt;&quot;&quot;;[.E970]&lt;&gt;&quot;&quot;);&quot;Brak Przerwy&quot;;IF(OR([.D970]&lt;&gt;&quot;&quot;;[.E9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1]&lt;&gt;&quot;&quot;;[.E971]&lt;&gt;&quot;&quot;);&quot;Brak Przerwy&quot;;IF(OR([.D971]&lt;&gt;&quot;&quot;;[.E9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2]&lt;&gt;&quot;&quot;;[.E972]&lt;&gt;&quot;&quot;);&quot;Brak Przerwy&quot;;IF(OR([.D972]&lt;&gt;&quot;&quot;;[.E9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3]&lt;&gt;&quot;&quot;;[.E973]&lt;&gt;&quot;&quot;);&quot;Brak Przerwy&quot;;IF(OR([.D973]&lt;&gt;&quot;&quot;;[.E9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4]&lt;&gt;&quot;&quot;;[.E974]&lt;&gt;&quot;&quot;);&quot;Brak Przerwy&quot;;IF(OR([.D974]&lt;&gt;&quot;&quot;;[.E9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5]&lt;&gt;&quot;&quot;;[.E975]&lt;&gt;&quot;&quot;);&quot;Brak Przerwy&quot;;IF(OR([.D975]&lt;&gt;&quot;&quot;;[.E9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6]&lt;&gt;&quot;&quot;;[.E976]&lt;&gt;&quot;&quot;);&quot;Brak Przerwy&quot;;IF(OR([.D976]&lt;&gt;&quot;&quot;;[.E9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7]&lt;&gt;&quot;&quot;;[.E977]&lt;&gt;&quot;&quot;);&quot;Brak Przerwy&quot;;IF(OR([.D977]&lt;&gt;&quot;&quot;;[.E9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8]&lt;&gt;&quot;&quot;;[.E978]&lt;&gt;&quot;&quot;);&quot;Brak Przerwy&quot;;IF(OR([.D978]&lt;&gt;&quot;&quot;;[.E9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79]&lt;&gt;&quot;&quot;;[.E979]&lt;&gt;&quot;&quot;);&quot;Brak Przerwy&quot;;IF(OR([.D979]&lt;&gt;&quot;&quot;;[.E9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0]&lt;&gt;&quot;&quot;;[.E980]&lt;&gt;&quot;&quot;);&quot;Brak Przerwy&quot;;IF(OR([.D980]&lt;&gt;&quot;&quot;;[.E9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1]&lt;&gt;&quot;&quot;;[.E981]&lt;&gt;&quot;&quot;);&quot;Brak Przerwy&quot;;IF(OR([.D981]&lt;&gt;&quot;&quot;;[.E9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2]&lt;&gt;&quot;&quot;;[.E982]&lt;&gt;&quot;&quot;);&quot;Brak Przerwy&quot;;IF(OR([.D982]&lt;&gt;&quot;&quot;;[.E9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3]&lt;&gt;&quot;&quot;;[.E983]&lt;&gt;&quot;&quot;);&quot;Brak Przerwy&quot;;IF(OR([.D983]&lt;&gt;&quot;&quot;;[.E9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4]&lt;&gt;&quot;&quot;;[.E984]&lt;&gt;&quot;&quot;);&quot;Brak Przerwy&quot;;IF(OR([.D984]&lt;&gt;&quot;&quot;;[.E9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5]&lt;&gt;&quot;&quot;;[.E985]&lt;&gt;&quot;&quot;);&quot;Brak Przerwy&quot;;IF(OR([.D985]&lt;&gt;&quot;&quot;;[.E9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6]&lt;&gt;&quot;&quot;;[.E986]&lt;&gt;&quot;&quot;);&quot;Brak Przerwy&quot;;IF(OR([.D986]&lt;&gt;&quot;&quot;;[.E9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7]&lt;&gt;&quot;&quot;;[.E987]&lt;&gt;&quot;&quot;);&quot;Brak Przerwy&quot;;IF(OR([.D987]&lt;&gt;&quot;&quot;;[.E9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8]&lt;&gt;&quot;&quot;;[.E988]&lt;&gt;&quot;&quot;);&quot;Brak Przerwy&quot;;IF(OR([.D988]&lt;&gt;&quot;&quot;;[.E9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89]&lt;&gt;&quot;&quot;;[.E989]&lt;&gt;&quot;&quot;);&quot;Brak Przerwy&quot;;IF(OR([.D989]&lt;&gt;&quot;&quot;;[.E9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0]&lt;&gt;&quot;&quot;;[.E990]&lt;&gt;&quot;&quot;);&quot;Brak Przerwy&quot;;IF(OR([.D990]&lt;&gt;&quot;&quot;;[.E9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1]&lt;&gt;&quot;&quot;;[.E991]&lt;&gt;&quot;&quot;);&quot;Brak Przerwy&quot;;IF(OR([.D991]&lt;&gt;&quot;&quot;;[.E9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2]&lt;&gt;&quot;&quot;;[.E992]&lt;&gt;&quot;&quot;);&quot;Brak Przerwy&quot;;IF(OR([.D992]&lt;&gt;&quot;&quot;;[.E9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3]&lt;&gt;&quot;&quot;;[.E993]&lt;&gt;&quot;&quot;);&quot;Brak Przerwy&quot;;IF(OR([.D993]&lt;&gt;&quot;&quot;;[.E9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4]&lt;&gt;&quot;&quot;;[.E994]&lt;&gt;&quot;&quot;);&quot;Brak Przerwy&quot;;IF(OR([.D994]&lt;&gt;&quot;&quot;;[.E9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5]&lt;&gt;&quot;&quot;;[.E995]&lt;&gt;&quot;&quot;);&quot;Brak Przerwy&quot;;IF(OR([.D995]&lt;&gt;&quot;&quot;;[.E9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6]&lt;&gt;&quot;&quot;;[.E996]&lt;&gt;&quot;&quot;);&quot;Brak Przerwy&quot;;IF(OR([.D996]&lt;&gt;&quot;&quot;;[.E9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7]&lt;&gt;&quot;&quot;;[.E997]&lt;&gt;&quot;&quot;);&quot;Brak Przerwy&quot;;IF(OR([.D997]&lt;&gt;&quot;&quot;;[.E9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8]&lt;&gt;&quot;&quot;;[.E998]&lt;&gt;&quot;&quot;);&quot;Brak Przerwy&quot;;IF(OR([.D998]&lt;&gt;&quot;&quot;;[.E9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999]&lt;&gt;&quot;&quot;;[.E999]&lt;&gt;&quot;&quot;);&quot;Brak Przerwy&quot;;IF(OR([.D999]&lt;&gt;&quot;&quot;;[.E9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0]&lt;&gt;&quot;&quot;;[.E1000]&lt;&gt;&quot;&quot;);&quot;Brak Przerwy&quot;;IF(OR([.D1000]&lt;&gt;&quot;&quot;;[.E10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1]&lt;&gt;&quot;&quot;;[.E1001]&lt;&gt;&quot;&quot;);&quot;Brak Przerwy&quot;;IF(OR([.D1001]&lt;&gt;&quot;&quot;;[.E10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2]&lt;&gt;&quot;&quot;;[.E1002]&lt;&gt;&quot;&quot;);&quot;Brak Przerwy&quot;;IF(OR([.D1002]&lt;&gt;&quot;&quot;;[.E10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3]&lt;&gt;&quot;&quot;;[.E1003]&lt;&gt;&quot;&quot;);&quot;Brak Przerwy&quot;;IF(OR([.D1003]&lt;&gt;&quot;&quot;;[.E10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4]&lt;&gt;&quot;&quot;;[.E1004]&lt;&gt;&quot;&quot;);&quot;Brak Przerwy&quot;;IF(OR([.D1004]&lt;&gt;&quot;&quot;;[.E10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5]&lt;&gt;&quot;&quot;;[.E1005]&lt;&gt;&quot;&quot;);&quot;Brak Przerwy&quot;;IF(OR([.D1005]&lt;&gt;&quot;&quot;;[.E10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6]&lt;&gt;&quot;&quot;;[.E1006]&lt;&gt;&quot;&quot;);&quot;Brak Przerwy&quot;;IF(OR([.D1006]&lt;&gt;&quot;&quot;;[.E10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7]&lt;&gt;&quot;&quot;;[.E1007]&lt;&gt;&quot;&quot;);&quot;Brak Przerwy&quot;;IF(OR([.D1007]&lt;&gt;&quot;&quot;;[.E10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8]&lt;&gt;&quot;&quot;;[.E1008]&lt;&gt;&quot;&quot;);&quot;Brak Przerwy&quot;;IF(OR([.D1008]&lt;&gt;&quot;&quot;;[.E10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09]&lt;&gt;&quot;&quot;;[.E1009]&lt;&gt;&quot;&quot;);&quot;Brak Przerwy&quot;;IF(OR([.D1009]&lt;&gt;&quot;&quot;;[.E10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0]&lt;&gt;&quot;&quot;;[.E1010]&lt;&gt;&quot;&quot;);&quot;Brak Przerwy&quot;;IF(OR([.D1010]&lt;&gt;&quot;&quot;;[.E10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1]&lt;&gt;&quot;&quot;;[.E1011]&lt;&gt;&quot;&quot;);&quot;Brak Przerwy&quot;;IF(OR([.D1011]&lt;&gt;&quot;&quot;;[.E10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2]&lt;&gt;&quot;&quot;;[.E1012]&lt;&gt;&quot;&quot;);&quot;Brak Przerwy&quot;;IF(OR([.D1012]&lt;&gt;&quot;&quot;;[.E10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3]&lt;&gt;&quot;&quot;;[.E1013]&lt;&gt;&quot;&quot;);&quot;Brak Przerwy&quot;;IF(OR([.D1013]&lt;&gt;&quot;&quot;;[.E10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4]&lt;&gt;&quot;&quot;;[.E1014]&lt;&gt;&quot;&quot;);&quot;Brak Przerwy&quot;;IF(OR([.D1014]&lt;&gt;&quot;&quot;;[.E10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5]&lt;&gt;&quot;&quot;;[.E1015]&lt;&gt;&quot;&quot;);&quot;Brak Przerwy&quot;;IF(OR([.D1015]&lt;&gt;&quot;&quot;;[.E10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6]&lt;&gt;&quot;&quot;;[.E1016]&lt;&gt;&quot;&quot;);&quot;Brak Przerwy&quot;;IF(OR([.D1016]&lt;&gt;&quot;&quot;;[.E10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7]&lt;&gt;&quot;&quot;;[.E1017]&lt;&gt;&quot;&quot;);&quot;Brak Przerwy&quot;;IF(OR([.D1017]&lt;&gt;&quot;&quot;;[.E10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8]&lt;&gt;&quot;&quot;;[.E1018]&lt;&gt;&quot;&quot;);&quot;Brak Przerwy&quot;;IF(OR([.D1018]&lt;&gt;&quot;&quot;;[.E10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19]&lt;&gt;&quot;&quot;;[.E1019]&lt;&gt;&quot;&quot;);&quot;Brak Przerwy&quot;;IF(OR([.D1019]&lt;&gt;&quot;&quot;;[.E10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0]&lt;&gt;&quot;&quot;;[.E1020]&lt;&gt;&quot;&quot;);&quot;Brak Przerwy&quot;;IF(OR([.D1020]&lt;&gt;&quot;&quot;;[.E10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1]&lt;&gt;&quot;&quot;;[.E1021]&lt;&gt;&quot;&quot;);&quot;Brak Przerwy&quot;;IF(OR([.D1021]&lt;&gt;&quot;&quot;;[.E10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2]&lt;&gt;&quot;&quot;;[.E1022]&lt;&gt;&quot;&quot;);&quot;Brak Przerwy&quot;;IF(OR([.D1022]&lt;&gt;&quot;&quot;;[.E10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3]&lt;&gt;&quot;&quot;;[.E1023]&lt;&gt;&quot;&quot;);&quot;Brak Przerwy&quot;;IF(OR([.D1023]&lt;&gt;&quot;&quot;;[.E10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4]&lt;&gt;&quot;&quot;;[.E1024]&lt;&gt;&quot;&quot;);&quot;Brak Przerwy&quot;;IF(OR([.D1024]&lt;&gt;&quot;&quot;;[.E10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5]&lt;&gt;&quot;&quot;;[.E1025]&lt;&gt;&quot;&quot;);&quot;Brak Przerwy&quot;;IF(OR([.D1025]&lt;&gt;&quot;&quot;;[.E10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6]&lt;&gt;&quot;&quot;;[.E1026]&lt;&gt;&quot;&quot;);&quot;Brak Przerwy&quot;;IF(OR([.D1026]&lt;&gt;&quot;&quot;;[.E10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7]&lt;&gt;&quot;&quot;;[.E1027]&lt;&gt;&quot;&quot;);&quot;Brak Przerwy&quot;;IF(OR([.D1027]&lt;&gt;&quot;&quot;;[.E10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8]&lt;&gt;&quot;&quot;;[.E1028]&lt;&gt;&quot;&quot;);&quot;Brak Przerwy&quot;;IF(OR([.D1028]&lt;&gt;&quot;&quot;;[.E10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29]&lt;&gt;&quot;&quot;;[.E1029]&lt;&gt;&quot;&quot;);&quot;Brak Przerwy&quot;;IF(OR([.D1029]&lt;&gt;&quot;&quot;;[.E10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0]&lt;&gt;&quot;&quot;;[.E1030]&lt;&gt;&quot;&quot;);&quot;Brak Przerwy&quot;;IF(OR([.D1030]&lt;&gt;&quot;&quot;;[.E10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1]&lt;&gt;&quot;&quot;;[.E1031]&lt;&gt;&quot;&quot;);&quot;Brak Przerwy&quot;;IF(OR([.D1031]&lt;&gt;&quot;&quot;;[.E10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2]&lt;&gt;&quot;&quot;;[.E1032]&lt;&gt;&quot;&quot;);&quot;Brak Przerwy&quot;;IF(OR([.D1032]&lt;&gt;&quot;&quot;;[.E10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3]&lt;&gt;&quot;&quot;;[.E1033]&lt;&gt;&quot;&quot;);&quot;Brak Przerwy&quot;;IF(OR([.D1033]&lt;&gt;&quot;&quot;;[.E10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4]&lt;&gt;&quot;&quot;;[.E1034]&lt;&gt;&quot;&quot;);&quot;Brak Przerwy&quot;;IF(OR([.D1034]&lt;&gt;&quot;&quot;;[.E10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5]&lt;&gt;&quot;&quot;;[.E1035]&lt;&gt;&quot;&quot;);&quot;Brak Przerwy&quot;;IF(OR([.D1035]&lt;&gt;&quot;&quot;;[.E10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6]&lt;&gt;&quot;&quot;;[.E1036]&lt;&gt;&quot;&quot;);&quot;Brak Przerwy&quot;;IF(OR([.D1036]&lt;&gt;&quot;&quot;;[.E10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7]&lt;&gt;&quot;&quot;;[.E1037]&lt;&gt;&quot;&quot;);&quot;Brak Przerwy&quot;;IF(OR([.D1037]&lt;&gt;&quot;&quot;;[.E10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8]&lt;&gt;&quot;&quot;;[.E1038]&lt;&gt;&quot;&quot;);&quot;Brak Przerwy&quot;;IF(OR([.D1038]&lt;&gt;&quot;&quot;;[.E10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39]&lt;&gt;&quot;&quot;;[.E1039]&lt;&gt;&quot;&quot;);&quot;Brak Przerwy&quot;;IF(OR([.D1039]&lt;&gt;&quot;&quot;;[.E10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0]&lt;&gt;&quot;&quot;;[.E1040]&lt;&gt;&quot;&quot;);&quot;Brak Przerwy&quot;;IF(OR([.D1040]&lt;&gt;&quot;&quot;;[.E10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1]&lt;&gt;&quot;&quot;;[.E1041]&lt;&gt;&quot;&quot;);&quot;Brak Przerwy&quot;;IF(OR([.D1041]&lt;&gt;&quot;&quot;;[.E10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2]&lt;&gt;&quot;&quot;;[.E1042]&lt;&gt;&quot;&quot;);&quot;Brak Przerwy&quot;;IF(OR([.D1042]&lt;&gt;&quot;&quot;;[.E10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3]&lt;&gt;&quot;&quot;;[.E1043]&lt;&gt;&quot;&quot;);&quot;Brak Przerwy&quot;;IF(OR([.D1043]&lt;&gt;&quot;&quot;;[.E10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4]&lt;&gt;&quot;&quot;;[.E1044]&lt;&gt;&quot;&quot;);&quot;Brak Przerwy&quot;;IF(OR([.D1044]&lt;&gt;&quot;&quot;;[.E10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5]&lt;&gt;&quot;&quot;;[.E1045]&lt;&gt;&quot;&quot;);&quot;Brak Przerwy&quot;;IF(OR([.D1045]&lt;&gt;&quot;&quot;;[.E10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6]&lt;&gt;&quot;&quot;;[.E1046]&lt;&gt;&quot;&quot;);&quot;Brak Przerwy&quot;;IF(OR([.D1046]&lt;&gt;&quot;&quot;;[.E10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7]&lt;&gt;&quot;&quot;;[.E1047]&lt;&gt;&quot;&quot;);&quot;Brak Przerwy&quot;;IF(OR([.D1047]&lt;&gt;&quot;&quot;;[.E10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8]&lt;&gt;&quot;&quot;;[.E1048]&lt;&gt;&quot;&quot;);&quot;Brak Przerwy&quot;;IF(OR([.D1048]&lt;&gt;&quot;&quot;;[.E10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49]&lt;&gt;&quot;&quot;;[.E1049]&lt;&gt;&quot;&quot;);&quot;Brak Przerwy&quot;;IF(OR([.D1049]&lt;&gt;&quot;&quot;;[.E10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0]&lt;&gt;&quot;&quot;;[.E1050]&lt;&gt;&quot;&quot;);&quot;Brak Przerwy&quot;;IF(OR([.D1050]&lt;&gt;&quot;&quot;;[.E10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1]&lt;&gt;&quot;&quot;;[.E1051]&lt;&gt;&quot;&quot;);&quot;Brak Przerwy&quot;;IF(OR([.D1051]&lt;&gt;&quot;&quot;;[.E10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2]&lt;&gt;&quot;&quot;;[.E1052]&lt;&gt;&quot;&quot;);&quot;Brak Przerwy&quot;;IF(OR([.D1052]&lt;&gt;&quot;&quot;;[.E10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3]&lt;&gt;&quot;&quot;;[.E1053]&lt;&gt;&quot;&quot;);&quot;Brak Przerwy&quot;;IF(OR([.D1053]&lt;&gt;&quot;&quot;;[.E10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4]&lt;&gt;&quot;&quot;;[.E1054]&lt;&gt;&quot;&quot;);&quot;Brak Przerwy&quot;;IF(OR([.D1054]&lt;&gt;&quot;&quot;;[.E10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5]&lt;&gt;&quot;&quot;;[.E1055]&lt;&gt;&quot;&quot;);&quot;Brak Przerwy&quot;;IF(OR([.D1055]&lt;&gt;&quot;&quot;;[.E10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6]&lt;&gt;&quot;&quot;;[.E1056]&lt;&gt;&quot;&quot;);&quot;Brak Przerwy&quot;;IF(OR([.D1056]&lt;&gt;&quot;&quot;;[.E10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7]&lt;&gt;&quot;&quot;;[.E1057]&lt;&gt;&quot;&quot;);&quot;Brak Przerwy&quot;;IF(OR([.D1057]&lt;&gt;&quot;&quot;;[.E10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8]&lt;&gt;&quot;&quot;;[.E1058]&lt;&gt;&quot;&quot;);&quot;Brak Przerwy&quot;;IF(OR([.D1058]&lt;&gt;&quot;&quot;;[.E10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59]&lt;&gt;&quot;&quot;;[.E1059]&lt;&gt;&quot;&quot;);&quot;Brak Przerwy&quot;;IF(OR([.D1059]&lt;&gt;&quot;&quot;;[.E10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0]&lt;&gt;&quot;&quot;;[.E1060]&lt;&gt;&quot;&quot;);&quot;Brak Przerwy&quot;;IF(OR([.D1060]&lt;&gt;&quot;&quot;;[.E10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1]&lt;&gt;&quot;&quot;;[.E1061]&lt;&gt;&quot;&quot;);&quot;Brak Przerwy&quot;;IF(OR([.D1061]&lt;&gt;&quot;&quot;;[.E10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2]&lt;&gt;&quot;&quot;;[.E1062]&lt;&gt;&quot;&quot;);&quot;Brak Przerwy&quot;;IF(OR([.D1062]&lt;&gt;&quot;&quot;;[.E10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3]&lt;&gt;&quot;&quot;;[.E1063]&lt;&gt;&quot;&quot;);&quot;Brak Przerwy&quot;;IF(OR([.D1063]&lt;&gt;&quot;&quot;;[.E10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4]&lt;&gt;&quot;&quot;;[.E1064]&lt;&gt;&quot;&quot;);&quot;Brak Przerwy&quot;;IF(OR([.D1064]&lt;&gt;&quot;&quot;;[.E10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5]&lt;&gt;&quot;&quot;;[.E1065]&lt;&gt;&quot;&quot;);&quot;Brak Przerwy&quot;;IF(OR([.D1065]&lt;&gt;&quot;&quot;;[.E10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6]&lt;&gt;&quot;&quot;;[.E1066]&lt;&gt;&quot;&quot;);&quot;Brak Przerwy&quot;;IF(OR([.D1066]&lt;&gt;&quot;&quot;;[.E10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7]&lt;&gt;&quot;&quot;;[.E1067]&lt;&gt;&quot;&quot;);&quot;Brak Przerwy&quot;;IF(OR([.D1067]&lt;&gt;&quot;&quot;;[.E10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8]&lt;&gt;&quot;&quot;;[.E1068]&lt;&gt;&quot;&quot;);&quot;Brak Przerwy&quot;;IF(OR([.D1068]&lt;&gt;&quot;&quot;;[.E10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69]&lt;&gt;&quot;&quot;;[.E1069]&lt;&gt;&quot;&quot;);&quot;Brak Przerwy&quot;;IF(OR([.D1069]&lt;&gt;&quot;&quot;;[.E10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0]&lt;&gt;&quot;&quot;;[.E1070]&lt;&gt;&quot;&quot;);&quot;Brak Przerwy&quot;;IF(OR([.D1070]&lt;&gt;&quot;&quot;;[.E10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1]&lt;&gt;&quot;&quot;;[.E1071]&lt;&gt;&quot;&quot;);&quot;Brak Przerwy&quot;;IF(OR([.D1071]&lt;&gt;&quot;&quot;;[.E10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2]&lt;&gt;&quot;&quot;;[.E1072]&lt;&gt;&quot;&quot;);&quot;Brak Przerwy&quot;;IF(OR([.D1072]&lt;&gt;&quot;&quot;;[.E10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3]&lt;&gt;&quot;&quot;;[.E1073]&lt;&gt;&quot;&quot;);&quot;Brak Przerwy&quot;;IF(OR([.D1073]&lt;&gt;&quot;&quot;;[.E10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4]&lt;&gt;&quot;&quot;;[.E1074]&lt;&gt;&quot;&quot;);&quot;Brak Przerwy&quot;;IF(OR([.D1074]&lt;&gt;&quot;&quot;;[.E10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5]&lt;&gt;&quot;&quot;;[.E1075]&lt;&gt;&quot;&quot;);&quot;Brak Przerwy&quot;;IF(OR([.D1075]&lt;&gt;&quot;&quot;;[.E10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6]&lt;&gt;&quot;&quot;;[.E1076]&lt;&gt;&quot;&quot;);&quot;Brak Przerwy&quot;;IF(OR([.D1076]&lt;&gt;&quot;&quot;;[.E10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7]&lt;&gt;&quot;&quot;;[.E1077]&lt;&gt;&quot;&quot;);&quot;Brak Przerwy&quot;;IF(OR([.D1077]&lt;&gt;&quot;&quot;;[.E10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8]&lt;&gt;&quot;&quot;;[.E1078]&lt;&gt;&quot;&quot;);&quot;Brak Przerwy&quot;;IF(OR([.D1078]&lt;&gt;&quot;&quot;;[.E10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79]&lt;&gt;&quot;&quot;;[.E1079]&lt;&gt;&quot;&quot;);&quot;Brak Przerwy&quot;;IF(OR([.D1079]&lt;&gt;&quot;&quot;;[.E10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0]&lt;&gt;&quot;&quot;;[.E1080]&lt;&gt;&quot;&quot;);&quot;Brak Przerwy&quot;;IF(OR([.D1080]&lt;&gt;&quot;&quot;;[.E10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1]&lt;&gt;&quot;&quot;;[.E1081]&lt;&gt;&quot;&quot;);&quot;Brak Przerwy&quot;;IF(OR([.D1081]&lt;&gt;&quot;&quot;;[.E10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2]&lt;&gt;&quot;&quot;;[.E1082]&lt;&gt;&quot;&quot;);&quot;Brak Przerwy&quot;;IF(OR([.D1082]&lt;&gt;&quot;&quot;;[.E10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3]&lt;&gt;&quot;&quot;;[.E1083]&lt;&gt;&quot;&quot;);&quot;Brak Przerwy&quot;;IF(OR([.D1083]&lt;&gt;&quot;&quot;;[.E10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4]&lt;&gt;&quot;&quot;;[.E1084]&lt;&gt;&quot;&quot;);&quot;Brak Przerwy&quot;;IF(OR([.D1084]&lt;&gt;&quot;&quot;;[.E10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5]&lt;&gt;&quot;&quot;;[.E1085]&lt;&gt;&quot;&quot;);&quot;Brak Przerwy&quot;;IF(OR([.D1085]&lt;&gt;&quot;&quot;;[.E10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6]&lt;&gt;&quot;&quot;;[.E1086]&lt;&gt;&quot;&quot;);&quot;Brak Przerwy&quot;;IF(OR([.D1086]&lt;&gt;&quot;&quot;;[.E10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7]&lt;&gt;&quot;&quot;;[.E1087]&lt;&gt;&quot;&quot;);&quot;Brak Przerwy&quot;;IF(OR([.D1087]&lt;&gt;&quot;&quot;;[.E10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8]&lt;&gt;&quot;&quot;;[.E1088]&lt;&gt;&quot;&quot;);&quot;Brak Przerwy&quot;;IF(OR([.D1088]&lt;&gt;&quot;&quot;;[.E10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89]&lt;&gt;&quot;&quot;;[.E1089]&lt;&gt;&quot;&quot;);&quot;Brak Przerwy&quot;;IF(OR([.D1089]&lt;&gt;&quot;&quot;;[.E10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0]&lt;&gt;&quot;&quot;;[.E1090]&lt;&gt;&quot;&quot;);&quot;Brak Przerwy&quot;;IF(OR([.D1090]&lt;&gt;&quot;&quot;;[.E10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1]&lt;&gt;&quot;&quot;;[.E1091]&lt;&gt;&quot;&quot;);&quot;Brak Przerwy&quot;;IF(OR([.D1091]&lt;&gt;&quot;&quot;;[.E10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2]&lt;&gt;&quot;&quot;;[.E1092]&lt;&gt;&quot;&quot;);&quot;Brak Przerwy&quot;;IF(OR([.D1092]&lt;&gt;&quot;&quot;;[.E10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3]&lt;&gt;&quot;&quot;;[.E1093]&lt;&gt;&quot;&quot;);&quot;Brak Przerwy&quot;;IF(OR([.D1093]&lt;&gt;&quot;&quot;;[.E10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4]&lt;&gt;&quot;&quot;;[.E1094]&lt;&gt;&quot;&quot;);&quot;Brak Przerwy&quot;;IF(OR([.D1094]&lt;&gt;&quot;&quot;;[.E10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5]&lt;&gt;&quot;&quot;;[.E1095]&lt;&gt;&quot;&quot;);&quot;Brak Przerwy&quot;;IF(OR([.D1095]&lt;&gt;&quot;&quot;;[.E10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6]&lt;&gt;&quot;&quot;;[.E1096]&lt;&gt;&quot;&quot;);&quot;Brak Przerwy&quot;;IF(OR([.D1096]&lt;&gt;&quot;&quot;;[.E10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7]&lt;&gt;&quot;&quot;;[.E1097]&lt;&gt;&quot;&quot;);&quot;Brak Przerwy&quot;;IF(OR([.D1097]&lt;&gt;&quot;&quot;;[.E10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8]&lt;&gt;&quot;&quot;;[.E1098]&lt;&gt;&quot;&quot;);&quot;Brak Przerwy&quot;;IF(OR([.D1098]&lt;&gt;&quot;&quot;;[.E10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099]&lt;&gt;&quot;&quot;;[.E1099]&lt;&gt;&quot;&quot;);&quot;Brak Przerwy&quot;;IF(OR([.D1099]&lt;&gt;&quot;&quot;;[.E10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0]&lt;&gt;&quot;&quot;;[.E1100]&lt;&gt;&quot;&quot;);&quot;Brak Przerwy&quot;;IF(OR([.D1100]&lt;&gt;&quot;&quot;;[.E11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1]&lt;&gt;&quot;&quot;;[.E1101]&lt;&gt;&quot;&quot;);&quot;Brak Przerwy&quot;;IF(OR([.D1101]&lt;&gt;&quot;&quot;;[.E11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2]&lt;&gt;&quot;&quot;;[.E1102]&lt;&gt;&quot;&quot;);&quot;Brak Przerwy&quot;;IF(OR([.D1102]&lt;&gt;&quot;&quot;;[.E11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3]&lt;&gt;&quot;&quot;;[.E1103]&lt;&gt;&quot;&quot;);&quot;Brak Przerwy&quot;;IF(OR([.D1103]&lt;&gt;&quot;&quot;;[.E11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4]&lt;&gt;&quot;&quot;;[.E1104]&lt;&gt;&quot;&quot;);&quot;Brak Przerwy&quot;;IF(OR([.D1104]&lt;&gt;&quot;&quot;;[.E11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5]&lt;&gt;&quot;&quot;;[.E1105]&lt;&gt;&quot;&quot;);&quot;Brak Przerwy&quot;;IF(OR([.D1105]&lt;&gt;&quot;&quot;;[.E11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6]&lt;&gt;&quot;&quot;;[.E1106]&lt;&gt;&quot;&quot;);&quot;Brak Przerwy&quot;;IF(OR([.D1106]&lt;&gt;&quot;&quot;;[.E11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7]&lt;&gt;&quot;&quot;;[.E1107]&lt;&gt;&quot;&quot;);&quot;Brak Przerwy&quot;;IF(OR([.D1107]&lt;&gt;&quot;&quot;;[.E11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8]&lt;&gt;&quot;&quot;;[.E1108]&lt;&gt;&quot;&quot;);&quot;Brak Przerwy&quot;;IF(OR([.D1108]&lt;&gt;&quot;&quot;;[.E11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09]&lt;&gt;&quot;&quot;;[.E1109]&lt;&gt;&quot;&quot;);&quot;Brak Przerwy&quot;;IF(OR([.D1109]&lt;&gt;&quot;&quot;;[.E11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0]&lt;&gt;&quot;&quot;;[.E1110]&lt;&gt;&quot;&quot;);&quot;Brak Przerwy&quot;;IF(OR([.D1110]&lt;&gt;&quot;&quot;;[.E11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1]&lt;&gt;&quot;&quot;;[.E1111]&lt;&gt;&quot;&quot;);&quot;Brak Przerwy&quot;;IF(OR([.D1111]&lt;&gt;&quot;&quot;;[.E11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2]&lt;&gt;&quot;&quot;;[.E1112]&lt;&gt;&quot;&quot;);&quot;Brak Przerwy&quot;;IF(OR([.D1112]&lt;&gt;&quot;&quot;;[.E11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3]&lt;&gt;&quot;&quot;;[.E1113]&lt;&gt;&quot;&quot;);&quot;Brak Przerwy&quot;;IF(OR([.D1113]&lt;&gt;&quot;&quot;;[.E11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4]&lt;&gt;&quot;&quot;;[.E1114]&lt;&gt;&quot;&quot;);&quot;Brak Przerwy&quot;;IF(OR([.D1114]&lt;&gt;&quot;&quot;;[.E11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5]&lt;&gt;&quot;&quot;;[.E1115]&lt;&gt;&quot;&quot;);&quot;Brak Przerwy&quot;;IF(OR([.D1115]&lt;&gt;&quot;&quot;;[.E11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6]&lt;&gt;&quot;&quot;;[.E1116]&lt;&gt;&quot;&quot;);&quot;Brak Przerwy&quot;;IF(OR([.D1116]&lt;&gt;&quot;&quot;;[.E11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7]&lt;&gt;&quot;&quot;;[.E1117]&lt;&gt;&quot;&quot;);&quot;Brak Przerwy&quot;;IF(OR([.D1117]&lt;&gt;&quot;&quot;;[.E11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8]&lt;&gt;&quot;&quot;;[.E1118]&lt;&gt;&quot;&quot;);&quot;Brak Przerwy&quot;;IF(OR([.D1118]&lt;&gt;&quot;&quot;;[.E11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19]&lt;&gt;&quot;&quot;;[.E1119]&lt;&gt;&quot;&quot;);&quot;Brak Przerwy&quot;;IF(OR([.D1119]&lt;&gt;&quot;&quot;;[.E11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0]&lt;&gt;&quot;&quot;;[.E1120]&lt;&gt;&quot;&quot;);&quot;Brak Przerwy&quot;;IF(OR([.D1120]&lt;&gt;&quot;&quot;;[.E11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1]&lt;&gt;&quot;&quot;;[.E1121]&lt;&gt;&quot;&quot;);&quot;Brak Przerwy&quot;;IF(OR([.D1121]&lt;&gt;&quot;&quot;;[.E11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2]&lt;&gt;&quot;&quot;;[.E1122]&lt;&gt;&quot;&quot;);&quot;Brak Przerwy&quot;;IF(OR([.D1122]&lt;&gt;&quot;&quot;;[.E11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3]&lt;&gt;&quot;&quot;;[.E1123]&lt;&gt;&quot;&quot;);&quot;Brak Przerwy&quot;;IF(OR([.D1123]&lt;&gt;&quot;&quot;;[.E11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4]&lt;&gt;&quot;&quot;;[.E1124]&lt;&gt;&quot;&quot;);&quot;Brak Przerwy&quot;;IF(OR([.D1124]&lt;&gt;&quot;&quot;;[.E11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5]&lt;&gt;&quot;&quot;;[.E1125]&lt;&gt;&quot;&quot;);&quot;Brak Przerwy&quot;;IF(OR([.D1125]&lt;&gt;&quot;&quot;;[.E11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6]&lt;&gt;&quot;&quot;;[.E1126]&lt;&gt;&quot;&quot;);&quot;Brak Przerwy&quot;;IF(OR([.D1126]&lt;&gt;&quot;&quot;;[.E11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7]&lt;&gt;&quot;&quot;;[.E1127]&lt;&gt;&quot;&quot;);&quot;Brak Przerwy&quot;;IF(OR([.D1127]&lt;&gt;&quot;&quot;;[.E11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8]&lt;&gt;&quot;&quot;;[.E1128]&lt;&gt;&quot;&quot;);&quot;Brak Przerwy&quot;;IF(OR([.D1128]&lt;&gt;&quot;&quot;;[.E11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29]&lt;&gt;&quot;&quot;;[.E1129]&lt;&gt;&quot;&quot;);&quot;Brak Przerwy&quot;;IF(OR([.D1129]&lt;&gt;&quot;&quot;;[.E11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0]&lt;&gt;&quot;&quot;;[.E1130]&lt;&gt;&quot;&quot;);&quot;Brak Przerwy&quot;;IF(OR([.D1130]&lt;&gt;&quot;&quot;;[.E11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1]&lt;&gt;&quot;&quot;;[.E1131]&lt;&gt;&quot;&quot;);&quot;Brak Przerwy&quot;;IF(OR([.D1131]&lt;&gt;&quot;&quot;;[.E11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2]&lt;&gt;&quot;&quot;;[.E1132]&lt;&gt;&quot;&quot;);&quot;Brak Przerwy&quot;;IF(OR([.D1132]&lt;&gt;&quot;&quot;;[.E11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3]&lt;&gt;&quot;&quot;;[.E1133]&lt;&gt;&quot;&quot;);&quot;Brak Przerwy&quot;;IF(OR([.D1133]&lt;&gt;&quot;&quot;;[.E11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4]&lt;&gt;&quot;&quot;;[.E1134]&lt;&gt;&quot;&quot;);&quot;Brak Przerwy&quot;;IF(OR([.D1134]&lt;&gt;&quot;&quot;;[.E11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5]&lt;&gt;&quot;&quot;;[.E1135]&lt;&gt;&quot;&quot;);&quot;Brak Przerwy&quot;;IF(OR([.D1135]&lt;&gt;&quot;&quot;;[.E11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6]&lt;&gt;&quot;&quot;;[.E1136]&lt;&gt;&quot;&quot;);&quot;Brak Przerwy&quot;;IF(OR([.D1136]&lt;&gt;&quot;&quot;;[.E11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7]&lt;&gt;&quot;&quot;;[.E1137]&lt;&gt;&quot;&quot;);&quot;Brak Przerwy&quot;;IF(OR([.D1137]&lt;&gt;&quot;&quot;;[.E11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8]&lt;&gt;&quot;&quot;;[.E1138]&lt;&gt;&quot;&quot;);&quot;Brak Przerwy&quot;;IF(OR([.D1138]&lt;&gt;&quot;&quot;;[.E11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39]&lt;&gt;&quot;&quot;;[.E1139]&lt;&gt;&quot;&quot;);&quot;Brak Przerwy&quot;;IF(OR([.D1139]&lt;&gt;&quot;&quot;;[.E11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0]&lt;&gt;&quot;&quot;;[.E1140]&lt;&gt;&quot;&quot;);&quot;Brak Przerwy&quot;;IF(OR([.D1140]&lt;&gt;&quot;&quot;;[.E11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1]&lt;&gt;&quot;&quot;;[.E1141]&lt;&gt;&quot;&quot;);&quot;Brak Przerwy&quot;;IF(OR([.D1141]&lt;&gt;&quot;&quot;;[.E11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2]&lt;&gt;&quot;&quot;;[.E1142]&lt;&gt;&quot;&quot;);&quot;Brak Przerwy&quot;;IF(OR([.D1142]&lt;&gt;&quot;&quot;;[.E11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3]&lt;&gt;&quot;&quot;;[.E1143]&lt;&gt;&quot;&quot;);&quot;Brak Przerwy&quot;;IF(OR([.D1143]&lt;&gt;&quot;&quot;;[.E11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4]&lt;&gt;&quot;&quot;;[.E1144]&lt;&gt;&quot;&quot;);&quot;Brak Przerwy&quot;;IF(OR([.D1144]&lt;&gt;&quot;&quot;;[.E11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5]&lt;&gt;&quot;&quot;;[.E1145]&lt;&gt;&quot;&quot;);&quot;Brak Przerwy&quot;;IF(OR([.D1145]&lt;&gt;&quot;&quot;;[.E11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6]&lt;&gt;&quot;&quot;;[.E1146]&lt;&gt;&quot;&quot;);&quot;Brak Przerwy&quot;;IF(OR([.D1146]&lt;&gt;&quot;&quot;;[.E11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7]&lt;&gt;&quot;&quot;;[.E1147]&lt;&gt;&quot;&quot;);&quot;Brak Przerwy&quot;;IF(OR([.D1147]&lt;&gt;&quot;&quot;;[.E11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8]&lt;&gt;&quot;&quot;;[.E1148]&lt;&gt;&quot;&quot;);&quot;Brak Przerwy&quot;;IF(OR([.D1148]&lt;&gt;&quot;&quot;;[.E11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49]&lt;&gt;&quot;&quot;;[.E1149]&lt;&gt;&quot;&quot;);&quot;Brak Przerwy&quot;;IF(OR([.D1149]&lt;&gt;&quot;&quot;;[.E11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0]&lt;&gt;&quot;&quot;;[.E1150]&lt;&gt;&quot;&quot;);&quot;Brak Przerwy&quot;;IF(OR([.D1150]&lt;&gt;&quot;&quot;;[.E11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1]&lt;&gt;&quot;&quot;;[.E1151]&lt;&gt;&quot;&quot;);&quot;Brak Przerwy&quot;;IF(OR([.D1151]&lt;&gt;&quot;&quot;;[.E11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2]&lt;&gt;&quot;&quot;;[.E1152]&lt;&gt;&quot;&quot;);&quot;Brak Przerwy&quot;;IF(OR([.D1152]&lt;&gt;&quot;&quot;;[.E11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3]&lt;&gt;&quot;&quot;;[.E1153]&lt;&gt;&quot;&quot;);&quot;Brak Przerwy&quot;;IF(OR([.D1153]&lt;&gt;&quot;&quot;;[.E11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4]&lt;&gt;&quot;&quot;;[.E1154]&lt;&gt;&quot;&quot;);&quot;Brak Przerwy&quot;;IF(OR([.D1154]&lt;&gt;&quot;&quot;;[.E11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5]&lt;&gt;&quot;&quot;;[.E1155]&lt;&gt;&quot;&quot;);&quot;Brak Przerwy&quot;;IF(OR([.D1155]&lt;&gt;&quot;&quot;;[.E11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6]&lt;&gt;&quot;&quot;;[.E1156]&lt;&gt;&quot;&quot;);&quot;Brak Przerwy&quot;;IF(OR([.D1156]&lt;&gt;&quot;&quot;;[.E11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7]&lt;&gt;&quot;&quot;;[.E1157]&lt;&gt;&quot;&quot;);&quot;Brak Przerwy&quot;;IF(OR([.D1157]&lt;&gt;&quot;&quot;;[.E11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8]&lt;&gt;&quot;&quot;;[.E1158]&lt;&gt;&quot;&quot;);&quot;Brak Przerwy&quot;;IF(OR([.D1158]&lt;&gt;&quot;&quot;;[.E11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59]&lt;&gt;&quot;&quot;;[.E1159]&lt;&gt;&quot;&quot;);&quot;Brak Przerwy&quot;;IF(OR([.D1159]&lt;&gt;&quot;&quot;;[.E11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0]&lt;&gt;&quot;&quot;;[.E1160]&lt;&gt;&quot;&quot;);&quot;Brak Przerwy&quot;;IF(OR([.D1160]&lt;&gt;&quot;&quot;;[.E11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1]&lt;&gt;&quot;&quot;;[.E1161]&lt;&gt;&quot;&quot;);&quot;Brak Przerwy&quot;;IF(OR([.D1161]&lt;&gt;&quot;&quot;;[.E11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2]&lt;&gt;&quot;&quot;;[.E1162]&lt;&gt;&quot;&quot;);&quot;Brak Przerwy&quot;;IF(OR([.D1162]&lt;&gt;&quot;&quot;;[.E11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3]&lt;&gt;&quot;&quot;;[.E1163]&lt;&gt;&quot;&quot;);&quot;Brak Przerwy&quot;;IF(OR([.D1163]&lt;&gt;&quot;&quot;;[.E11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4]&lt;&gt;&quot;&quot;;[.E1164]&lt;&gt;&quot;&quot;);&quot;Brak Przerwy&quot;;IF(OR([.D1164]&lt;&gt;&quot;&quot;;[.E11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5]&lt;&gt;&quot;&quot;;[.E1165]&lt;&gt;&quot;&quot;);&quot;Brak Przerwy&quot;;IF(OR([.D1165]&lt;&gt;&quot;&quot;;[.E11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6]&lt;&gt;&quot;&quot;;[.E1166]&lt;&gt;&quot;&quot;);&quot;Brak Przerwy&quot;;IF(OR([.D1166]&lt;&gt;&quot;&quot;;[.E11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7]&lt;&gt;&quot;&quot;;[.E1167]&lt;&gt;&quot;&quot;);&quot;Brak Przerwy&quot;;IF(OR([.D1167]&lt;&gt;&quot;&quot;;[.E11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8]&lt;&gt;&quot;&quot;;[.E1168]&lt;&gt;&quot;&quot;);&quot;Brak Przerwy&quot;;IF(OR([.D1168]&lt;&gt;&quot;&quot;;[.E11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69]&lt;&gt;&quot;&quot;;[.E1169]&lt;&gt;&quot;&quot;);&quot;Brak Przerwy&quot;;IF(OR([.D1169]&lt;&gt;&quot;&quot;;[.E11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0]&lt;&gt;&quot;&quot;;[.E1170]&lt;&gt;&quot;&quot;);&quot;Brak Przerwy&quot;;IF(OR([.D1170]&lt;&gt;&quot;&quot;;[.E11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1]&lt;&gt;&quot;&quot;;[.E1171]&lt;&gt;&quot;&quot;);&quot;Brak Przerwy&quot;;IF(OR([.D1171]&lt;&gt;&quot;&quot;;[.E11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2]&lt;&gt;&quot;&quot;;[.E1172]&lt;&gt;&quot;&quot;);&quot;Brak Przerwy&quot;;IF(OR([.D1172]&lt;&gt;&quot;&quot;;[.E11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3]&lt;&gt;&quot;&quot;;[.E1173]&lt;&gt;&quot;&quot;);&quot;Brak Przerwy&quot;;IF(OR([.D1173]&lt;&gt;&quot;&quot;;[.E11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4]&lt;&gt;&quot;&quot;;[.E1174]&lt;&gt;&quot;&quot;);&quot;Brak Przerwy&quot;;IF(OR([.D1174]&lt;&gt;&quot;&quot;;[.E11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5]&lt;&gt;&quot;&quot;;[.E1175]&lt;&gt;&quot;&quot;);&quot;Brak Przerwy&quot;;IF(OR([.D1175]&lt;&gt;&quot;&quot;;[.E11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6]&lt;&gt;&quot;&quot;;[.E1176]&lt;&gt;&quot;&quot;);&quot;Brak Przerwy&quot;;IF(OR([.D1176]&lt;&gt;&quot;&quot;;[.E11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7]&lt;&gt;&quot;&quot;;[.E1177]&lt;&gt;&quot;&quot;);&quot;Brak Przerwy&quot;;IF(OR([.D1177]&lt;&gt;&quot;&quot;;[.E11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8]&lt;&gt;&quot;&quot;;[.E1178]&lt;&gt;&quot;&quot;);&quot;Brak Przerwy&quot;;IF(OR([.D1178]&lt;&gt;&quot;&quot;;[.E11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79]&lt;&gt;&quot;&quot;;[.E1179]&lt;&gt;&quot;&quot;);&quot;Brak Przerwy&quot;;IF(OR([.D1179]&lt;&gt;&quot;&quot;;[.E11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0]&lt;&gt;&quot;&quot;;[.E1180]&lt;&gt;&quot;&quot;);&quot;Brak Przerwy&quot;;IF(OR([.D1180]&lt;&gt;&quot;&quot;;[.E11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1]&lt;&gt;&quot;&quot;;[.E1181]&lt;&gt;&quot;&quot;);&quot;Brak Przerwy&quot;;IF(OR([.D1181]&lt;&gt;&quot;&quot;;[.E11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2]&lt;&gt;&quot;&quot;;[.E1182]&lt;&gt;&quot;&quot;);&quot;Brak Przerwy&quot;;IF(OR([.D1182]&lt;&gt;&quot;&quot;;[.E11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3]&lt;&gt;&quot;&quot;;[.E1183]&lt;&gt;&quot;&quot;);&quot;Brak Przerwy&quot;;IF(OR([.D1183]&lt;&gt;&quot;&quot;;[.E11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4]&lt;&gt;&quot;&quot;;[.E1184]&lt;&gt;&quot;&quot;);&quot;Brak Przerwy&quot;;IF(OR([.D1184]&lt;&gt;&quot;&quot;;[.E11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5]&lt;&gt;&quot;&quot;;[.E1185]&lt;&gt;&quot;&quot;);&quot;Brak Przerwy&quot;;IF(OR([.D1185]&lt;&gt;&quot;&quot;;[.E11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6]&lt;&gt;&quot;&quot;;[.E1186]&lt;&gt;&quot;&quot;);&quot;Brak Przerwy&quot;;IF(OR([.D1186]&lt;&gt;&quot;&quot;;[.E11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7]&lt;&gt;&quot;&quot;;[.E1187]&lt;&gt;&quot;&quot;);&quot;Brak Przerwy&quot;;IF(OR([.D1187]&lt;&gt;&quot;&quot;;[.E11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8]&lt;&gt;&quot;&quot;;[.E1188]&lt;&gt;&quot;&quot;);&quot;Brak Przerwy&quot;;IF(OR([.D1188]&lt;&gt;&quot;&quot;;[.E11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89]&lt;&gt;&quot;&quot;;[.E1189]&lt;&gt;&quot;&quot;);&quot;Brak Przerwy&quot;;IF(OR([.D1189]&lt;&gt;&quot;&quot;;[.E11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0]&lt;&gt;&quot;&quot;;[.E1190]&lt;&gt;&quot;&quot;);&quot;Brak Przerwy&quot;;IF(OR([.D1190]&lt;&gt;&quot;&quot;;[.E11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1]&lt;&gt;&quot;&quot;;[.E1191]&lt;&gt;&quot;&quot;);&quot;Brak Przerwy&quot;;IF(OR([.D1191]&lt;&gt;&quot;&quot;;[.E11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2]&lt;&gt;&quot;&quot;;[.E1192]&lt;&gt;&quot;&quot;);&quot;Brak Przerwy&quot;;IF(OR([.D1192]&lt;&gt;&quot;&quot;;[.E11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3]&lt;&gt;&quot;&quot;;[.E1193]&lt;&gt;&quot;&quot;);&quot;Brak Przerwy&quot;;IF(OR([.D1193]&lt;&gt;&quot;&quot;;[.E11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4]&lt;&gt;&quot;&quot;;[.E1194]&lt;&gt;&quot;&quot;);&quot;Brak Przerwy&quot;;IF(OR([.D1194]&lt;&gt;&quot;&quot;;[.E11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5]&lt;&gt;&quot;&quot;;[.E1195]&lt;&gt;&quot;&quot;);&quot;Brak Przerwy&quot;;IF(OR([.D1195]&lt;&gt;&quot;&quot;;[.E11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6]&lt;&gt;&quot;&quot;;[.E1196]&lt;&gt;&quot;&quot;);&quot;Brak Przerwy&quot;;IF(OR([.D1196]&lt;&gt;&quot;&quot;;[.E11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7]&lt;&gt;&quot;&quot;;[.E1197]&lt;&gt;&quot;&quot;);&quot;Brak Przerwy&quot;;IF(OR([.D1197]&lt;&gt;&quot;&quot;;[.E11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8]&lt;&gt;&quot;&quot;;[.E1198]&lt;&gt;&quot;&quot;);&quot;Brak Przerwy&quot;;IF(OR([.D1198]&lt;&gt;&quot;&quot;;[.E11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199]&lt;&gt;&quot;&quot;;[.E1199]&lt;&gt;&quot;&quot;);&quot;Brak Przerwy&quot;;IF(OR([.D1199]&lt;&gt;&quot;&quot;;[.E11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0]&lt;&gt;&quot;&quot;;[.E1200]&lt;&gt;&quot;&quot;);&quot;Brak Przerwy&quot;;IF(OR([.D1200]&lt;&gt;&quot;&quot;;[.E12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1]&lt;&gt;&quot;&quot;;[.E1201]&lt;&gt;&quot;&quot;);&quot;Brak Przerwy&quot;;IF(OR([.D1201]&lt;&gt;&quot;&quot;;[.E12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2]&lt;&gt;&quot;&quot;;[.E1202]&lt;&gt;&quot;&quot;);&quot;Brak Przerwy&quot;;IF(OR([.D1202]&lt;&gt;&quot;&quot;;[.E12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3]&lt;&gt;&quot;&quot;;[.E1203]&lt;&gt;&quot;&quot;);&quot;Brak Przerwy&quot;;IF(OR([.D1203]&lt;&gt;&quot;&quot;;[.E12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4]&lt;&gt;&quot;&quot;;[.E1204]&lt;&gt;&quot;&quot;);&quot;Brak Przerwy&quot;;IF(OR([.D1204]&lt;&gt;&quot;&quot;;[.E12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5]&lt;&gt;&quot;&quot;;[.E1205]&lt;&gt;&quot;&quot;);&quot;Brak Przerwy&quot;;IF(OR([.D1205]&lt;&gt;&quot;&quot;;[.E12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6]&lt;&gt;&quot;&quot;;[.E1206]&lt;&gt;&quot;&quot;);&quot;Brak Przerwy&quot;;IF(OR([.D1206]&lt;&gt;&quot;&quot;;[.E12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7]&lt;&gt;&quot;&quot;;[.E1207]&lt;&gt;&quot;&quot;);&quot;Brak Przerwy&quot;;IF(OR([.D1207]&lt;&gt;&quot;&quot;;[.E12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8]&lt;&gt;&quot;&quot;;[.E1208]&lt;&gt;&quot;&quot;);&quot;Brak Przerwy&quot;;IF(OR([.D1208]&lt;&gt;&quot;&quot;;[.E12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09]&lt;&gt;&quot;&quot;;[.E1209]&lt;&gt;&quot;&quot;);&quot;Brak Przerwy&quot;;IF(OR([.D1209]&lt;&gt;&quot;&quot;;[.E12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0]&lt;&gt;&quot;&quot;;[.E1210]&lt;&gt;&quot;&quot;);&quot;Brak Przerwy&quot;;IF(OR([.D1210]&lt;&gt;&quot;&quot;;[.E12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1]&lt;&gt;&quot;&quot;;[.E1211]&lt;&gt;&quot;&quot;);&quot;Brak Przerwy&quot;;IF(OR([.D1211]&lt;&gt;&quot;&quot;;[.E12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2]&lt;&gt;&quot;&quot;;[.E1212]&lt;&gt;&quot;&quot;);&quot;Brak Przerwy&quot;;IF(OR([.D1212]&lt;&gt;&quot;&quot;;[.E12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3]&lt;&gt;&quot;&quot;;[.E1213]&lt;&gt;&quot;&quot;);&quot;Brak Przerwy&quot;;IF(OR([.D1213]&lt;&gt;&quot;&quot;;[.E12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4]&lt;&gt;&quot;&quot;;[.E1214]&lt;&gt;&quot;&quot;);&quot;Brak Przerwy&quot;;IF(OR([.D1214]&lt;&gt;&quot;&quot;;[.E12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5]&lt;&gt;&quot;&quot;;[.E1215]&lt;&gt;&quot;&quot;);&quot;Brak Przerwy&quot;;IF(OR([.D1215]&lt;&gt;&quot;&quot;;[.E12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6]&lt;&gt;&quot;&quot;;[.E1216]&lt;&gt;&quot;&quot;);&quot;Brak Przerwy&quot;;IF(OR([.D1216]&lt;&gt;&quot;&quot;;[.E12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7]&lt;&gt;&quot;&quot;;[.E1217]&lt;&gt;&quot;&quot;);&quot;Brak Przerwy&quot;;IF(OR([.D1217]&lt;&gt;&quot;&quot;;[.E12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8]&lt;&gt;&quot;&quot;;[.E1218]&lt;&gt;&quot;&quot;);&quot;Brak Przerwy&quot;;IF(OR([.D1218]&lt;&gt;&quot;&quot;;[.E12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19]&lt;&gt;&quot;&quot;;[.E1219]&lt;&gt;&quot;&quot;);&quot;Brak Przerwy&quot;;IF(OR([.D1219]&lt;&gt;&quot;&quot;;[.E12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0]&lt;&gt;&quot;&quot;;[.E1220]&lt;&gt;&quot;&quot;);&quot;Brak Przerwy&quot;;IF(OR([.D1220]&lt;&gt;&quot;&quot;;[.E12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1]&lt;&gt;&quot;&quot;;[.E1221]&lt;&gt;&quot;&quot;);&quot;Brak Przerwy&quot;;IF(OR([.D1221]&lt;&gt;&quot;&quot;;[.E12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2]&lt;&gt;&quot;&quot;;[.E1222]&lt;&gt;&quot;&quot;);&quot;Brak Przerwy&quot;;IF(OR([.D1222]&lt;&gt;&quot;&quot;;[.E12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3]&lt;&gt;&quot;&quot;;[.E1223]&lt;&gt;&quot;&quot;);&quot;Brak Przerwy&quot;;IF(OR([.D1223]&lt;&gt;&quot;&quot;;[.E12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4]&lt;&gt;&quot;&quot;;[.E1224]&lt;&gt;&quot;&quot;);&quot;Brak Przerwy&quot;;IF(OR([.D1224]&lt;&gt;&quot;&quot;;[.E12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5]&lt;&gt;&quot;&quot;;[.E1225]&lt;&gt;&quot;&quot;);&quot;Brak Przerwy&quot;;IF(OR([.D1225]&lt;&gt;&quot;&quot;;[.E12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6]&lt;&gt;&quot;&quot;;[.E1226]&lt;&gt;&quot;&quot;);&quot;Brak Przerwy&quot;;IF(OR([.D1226]&lt;&gt;&quot;&quot;;[.E12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7]&lt;&gt;&quot;&quot;;[.E1227]&lt;&gt;&quot;&quot;);&quot;Brak Przerwy&quot;;IF(OR([.D1227]&lt;&gt;&quot;&quot;;[.E12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8]&lt;&gt;&quot;&quot;;[.E1228]&lt;&gt;&quot;&quot;);&quot;Brak Przerwy&quot;;IF(OR([.D1228]&lt;&gt;&quot;&quot;;[.E12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29]&lt;&gt;&quot;&quot;;[.E1229]&lt;&gt;&quot;&quot;);&quot;Brak Przerwy&quot;;IF(OR([.D1229]&lt;&gt;&quot;&quot;;[.E12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0]&lt;&gt;&quot;&quot;;[.E1230]&lt;&gt;&quot;&quot;);&quot;Brak Przerwy&quot;;IF(OR([.D1230]&lt;&gt;&quot;&quot;;[.E12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1]&lt;&gt;&quot;&quot;;[.E1231]&lt;&gt;&quot;&quot;);&quot;Brak Przerwy&quot;;IF(OR([.D1231]&lt;&gt;&quot;&quot;;[.E12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2]&lt;&gt;&quot;&quot;;[.E1232]&lt;&gt;&quot;&quot;);&quot;Brak Przerwy&quot;;IF(OR([.D1232]&lt;&gt;&quot;&quot;;[.E12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3]&lt;&gt;&quot;&quot;;[.E1233]&lt;&gt;&quot;&quot;);&quot;Brak Przerwy&quot;;IF(OR([.D1233]&lt;&gt;&quot;&quot;;[.E12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4]&lt;&gt;&quot;&quot;;[.E1234]&lt;&gt;&quot;&quot;);&quot;Brak Przerwy&quot;;IF(OR([.D1234]&lt;&gt;&quot;&quot;;[.E12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5]&lt;&gt;&quot;&quot;;[.E1235]&lt;&gt;&quot;&quot;);&quot;Brak Przerwy&quot;;IF(OR([.D1235]&lt;&gt;&quot;&quot;;[.E12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6]&lt;&gt;&quot;&quot;;[.E1236]&lt;&gt;&quot;&quot;);&quot;Brak Przerwy&quot;;IF(OR([.D1236]&lt;&gt;&quot;&quot;;[.E12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7]&lt;&gt;&quot;&quot;;[.E1237]&lt;&gt;&quot;&quot;);&quot;Brak Przerwy&quot;;IF(OR([.D1237]&lt;&gt;&quot;&quot;;[.E12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8]&lt;&gt;&quot;&quot;;[.E1238]&lt;&gt;&quot;&quot;);&quot;Brak Przerwy&quot;;IF(OR([.D1238]&lt;&gt;&quot;&quot;;[.E12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39]&lt;&gt;&quot;&quot;;[.E1239]&lt;&gt;&quot;&quot;);&quot;Brak Przerwy&quot;;IF(OR([.D1239]&lt;&gt;&quot;&quot;;[.E12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0]&lt;&gt;&quot;&quot;;[.E1240]&lt;&gt;&quot;&quot;);&quot;Brak Przerwy&quot;;IF(OR([.D1240]&lt;&gt;&quot;&quot;;[.E12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1]&lt;&gt;&quot;&quot;;[.E1241]&lt;&gt;&quot;&quot;);&quot;Brak Przerwy&quot;;IF(OR([.D1241]&lt;&gt;&quot;&quot;;[.E12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2]&lt;&gt;&quot;&quot;;[.E1242]&lt;&gt;&quot;&quot;);&quot;Brak Przerwy&quot;;IF(OR([.D1242]&lt;&gt;&quot;&quot;;[.E12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3]&lt;&gt;&quot;&quot;;[.E1243]&lt;&gt;&quot;&quot;);&quot;Brak Przerwy&quot;;IF(OR([.D1243]&lt;&gt;&quot;&quot;;[.E12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4]&lt;&gt;&quot;&quot;;[.E1244]&lt;&gt;&quot;&quot;);&quot;Brak Przerwy&quot;;IF(OR([.D1244]&lt;&gt;&quot;&quot;;[.E12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5]&lt;&gt;&quot;&quot;;[.E1245]&lt;&gt;&quot;&quot;);&quot;Brak Przerwy&quot;;IF(OR([.D1245]&lt;&gt;&quot;&quot;;[.E12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6]&lt;&gt;&quot;&quot;;[.E1246]&lt;&gt;&quot;&quot;);&quot;Brak Przerwy&quot;;IF(OR([.D1246]&lt;&gt;&quot;&quot;;[.E12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7]&lt;&gt;&quot;&quot;;[.E1247]&lt;&gt;&quot;&quot;);&quot;Brak Przerwy&quot;;IF(OR([.D1247]&lt;&gt;&quot;&quot;;[.E12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8]&lt;&gt;&quot;&quot;;[.E1248]&lt;&gt;&quot;&quot;);&quot;Brak Przerwy&quot;;IF(OR([.D1248]&lt;&gt;&quot;&quot;;[.E12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49]&lt;&gt;&quot;&quot;;[.E1249]&lt;&gt;&quot;&quot;);&quot;Brak Przerwy&quot;;IF(OR([.D1249]&lt;&gt;&quot;&quot;;[.E12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0]&lt;&gt;&quot;&quot;;[.E1250]&lt;&gt;&quot;&quot;);&quot;Brak Przerwy&quot;;IF(OR([.D1250]&lt;&gt;&quot;&quot;;[.E12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1]&lt;&gt;&quot;&quot;;[.E1251]&lt;&gt;&quot;&quot;);&quot;Brak Przerwy&quot;;IF(OR([.D1251]&lt;&gt;&quot;&quot;;[.E12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2]&lt;&gt;&quot;&quot;;[.E1252]&lt;&gt;&quot;&quot;);&quot;Brak Przerwy&quot;;IF(OR([.D1252]&lt;&gt;&quot;&quot;;[.E12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3]&lt;&gt;&quot;&quot;;[.E1253]&lt;&gt;&quot;&quot;);&quot;Brak Przerwy&quot;;IF(OR([.D1253]&lt;&gt;&quot;&quot;;[.E12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4]&lt;&gt;&quot;&quot;;[.E1254]&lt;&gt;&quot;&quot;);&quot;Brak Przerwy&quot;;IF(OR([.D1254]&lt;&gt;&quot;&quot;;[.E12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5]&lt;&gt;&quot;&quot;;[.E1255]&lt;&gt;&quot;&quot;);&quot;Brak Przerwy&quot;;IF(OR([.D1255]&lt;&gt;&quot;&quot;;[.E12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6]&lt;&gt;&quot;&quot;;[.E1256]&lt;&gt;&quot;&quot;);&quot;Brak Przerwy&quot;;IF(OR([.D1256]&lt;&gt;&quot;&quot;;[.E12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7]&lt;&gt;&quot;&quot;;[.E1257]&lt;&gt;&quot;&quot;);&quot;Brak Przerwy&quot;;IF(OR([.D1257]&lt;&gt;&quot;&quot;;[.E12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8]&lt;&gt;&quot;&quot;;[.E1258]&lt;&gt;&quot;&quot;);&quot;Brak Przerwy&quot;;IF(OR([.D1258]&lt;&gt;&quot;&quot;;[.E12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59]&lt;&gt;&quot;&quot;;[.E1259]&lt;&gt;&quot;&quot;);&quot;Brak Przerwy&quot;;IF(OR([.D1259]&lt;&gt;&quot;&quot;;[.E12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0]&lt;&gt;&quot;&quot;;[.E1260]&lt;&gt;&quot;&quot;);&quot;Brak Przerwy&quot;;IF(OR([.D1260]&lt;&gt;&quot;&quot;;[.E12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1]&lt;&gt;&quot;&quot;;[.E1261]&lt;&gt;&quot;&quot;);&quot;Brak Przerwy&quot;;IF(OR([.D1261]&lt;&gt;&quot;&quot;;[.E12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2]&lt;&gt;&quot;&quot;;[.E1262]&lt;&gt;&quot;&quot;);&quot;Brak Przerwy&quot;;IF(OR([.D1262]&lt;&gt;&quot;&quot;;[.E12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3]&lt;&gt;&quot;&quot;;[.E1263]&lt;&gt;&quot;&quot;);&quot;Brak Przerwy&quot;;IF(OR([.D1263]&lt;&gt;&quot;&quot;;[.E12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4]&lt;&gt;&quot;&quot;;[.E1264]&lt;&gt;&quot;&quot;);&quot;Brak Przerwy&quot;;IF(OR([.D1264]&lt;&gt;&quot;&quot;;[.E12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5]&lt;&gt;&quot;&quot;;[.E1265]&lt;&gt;&quot;&quot;);&quot;Brak Przerwy&quot;;IF(OR([.D1265]&lt;&gt;&quot;&quot;;[.E12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6]&lt;&gt;&quot;&quot;;[.E1266]&lt;&gt;&quot;&quot;);&quot;Brak Przerwy&quot;;IF(OR([.D1266]&lt;&gt;&quot;&quot;;[.E12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7]&lt;&gt;&quot;&quot;;[.E1267]&lt;&gt;&quot;&quot;);&quot;Brak Przerwy&quot;;IF(OR([.D1267]&lt;&gt;&quot;&quot;;[.E12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8]&lt;&gt;&quot;&quot;;[.E1268]&lt;&gt;&quot;&quot;);&quot;Brak Przerwy&quot;;IF(OR([.D1268]&lt;&gt;&quot;&quot;;[.E12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69]&lt;&gt;&quot;&quot;;[.E1269]&lt;&gt;&quot;&quot;);&quot;Brak Przerwy&quot;;IF(OR([.D1269]&lt;&gt;&quot;&quot;;[.E12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0]&lt;&gt;&quot;&quot;;[.E1270]&lt;&gt;&quot;&quot;);&quot;Brak Przerwy&quot;;IF(OR([.D1270]&lt;&gt;&quot;&quot;;[.E12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1]&lt;&gt;&quot;&quot;;[.E1271]&lt;&gt;&quot;&quot;);&quot;Brak Przerwy&quot;;IF(OR([.D1271]&lt;&gt;&quot;&quot;;[.E12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2]&lt;&gt;&quot;&quot;;[.E1272]&lt;&gt;&quot;&quot;);&quot;Brak Przerwy&quot;;IF(OR([.D1272]&lt;&gt;&quot;&quot;;[.E12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3]&lt;&gt;&quot;&quot;;[.E1273]&lt;&gt;&quot;&quot;);&quot;Brak Przerwy&quot;;IF(OR([.D1273]&lt;&gt;&quot;&quot;;[.E12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4]&lt;&gt;&quot;&quot;;[.E1274]&lt;&gt;&quot;&quot;);&quot;Brak Przerwy&quot;;IF(OR([.D1274]&lt;&gt;&quot;&quot;;[.E12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5]&lt;&gt;&quot;&quot;;[.E1275]&lt;&gt;&quot;&quot;);&quot;Brak Przerwy&quot;;IF(OR([.D1275]&lt;&gt;&quot;&quot;;[.E12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6]&lt;&gt;&quot;&quot;;[.E1276]&lt;&gt;&quot;&quot;);&quot;Brak Przerwy&quot;;IF(OR([.D1276]&lt;&gt;&quot;&quot;;[.E12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7]&lt;&gt;&quot;&quot;;[.E1277]&lt;&gt;&quot;&quot;);&quot;Brak Przerwy&quot;;IF(OR([.D1277]&lt;&gt;&quot;&quot;;[.E12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8]&lt;&gt;&quot;&quot;;[.E1278]&lt;&gt;&quot;&quot;);&quot;Brak Przerwy&quot;;IF(OR([.D1278]&lt;&gt;&quot;&quot;;[.E12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79]&lt;&gt;&quot;&quot;;[.E1279]&lt;&gt;&quot;&quot;);&quot;Brak Przerwy&quot;;IF(OR([.D1279]&lt;&gt;&quot;&quot;;[.E12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0]&lt;&gt;&quot;&quot;;[.E1280]&lt;&gt;&quot;&quot;);&quot;Brak Przerwy&quot;;IF(OR([.D1280]&lt;&gt;&quot;&quot;;[.E12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1]&lt;&gt;&quot;&quot;;[.E1281]&lt;&gt;&quot;&quot;);&quot;Brak Przerwy&quot;;IF(OR([.D1281]&lt;&gt;&quot;&quot;;[.E12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2]&lt;&gt;&quot;&quot;;[.E1282]&lt;&gt;&quot;&quot;);&quot;Brak Przerwy&quot;;IF(OR([.D1282]&lt;&gt;&quot;&quot;;[.E12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3]&lt;&gt;&quot;&quot;;[.E1283]&lt;&gt;&quot;&quot;);&quot;Brak Przerwy&quot;;IF(OR([.D1283]&lt;&gt;&quot;&quot;;[.E12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4]&lt;&gt;&quot;&quot;;[.E1284]&lt;&gt;&quot;&quot;);&quot;Brak Przerwy&quot;;IF(OR([.D1284]&lt;&gt;&quot;&quot;;[.E12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5]&lt;&gt;&quot;&quot;;[.E1285]&lt;&gt;&quot;&quot;);&quot;Brak Przerwy&quot;;IF(OR([.D1285]&lt;&gt;&quot;&quot;;[.E12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6]&lt;&gt;&quot;&quot;;[.E1286]&lt;&gt;&quot;&quot;);&quot;Brak Przerwy&quot;;IF(OR([.D1286]&lt;&gt;&quot;&quot;;[.E12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7]&lt;&gt;&quot;&quot;;[.E1287]&lt;&gt;&quot;&quot;);&quot;Brak Przerwy&quot;;IF(OR([.D1287]&lt;&gt;&quot;&quot;;[.E12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8]&lt;&gt;&quot;&quot;;[.E1288]&lt;&gt;&quot;&quot;);&quot;Brak Przerwy&quot;;IF(OR([.D1288]&lt;&gt;&quot;&quot;;[.E12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89]&lt;&gt;&quot;&quot;;[.E1289]&lt;&gt;&quot;&quot;);&quot;Brak Przerwy&quot;;IF(OR([.D1289]&lt;&gt;&quot;&quot;;[.E12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0]&lt;&gt;&quot;&quot;;[.E1290]&lt;&gt;&quot;&quot;);&quot;Brak Przerwy&quot;;IF(OR([.D1290]&lt;&gt;&quot;&quot;;[.E12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1]&lt;&gt;&quot;&quot;;[.E1291]&lt;&gt;&quot;&quot;);&quot;Brak Przerwy&quot;;IF(OR([.D1291]&lt;&gt;&quot;&quot;;[.E12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2]&lt;&gt;&quot;&quot;;[.E1292]&lt;&gt;&quot;&quot;);&quot;Brak Przerwy&quot;;IF(OR([.D1292]&lt;&gt;&quot;&quot;;[.E12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3]&lt;&gt;&quot;&quot;;[.E1293]&lt;&gt;&quot;&quot;);&quot;Brak Przerwy&quot;;IF(OR([.D1293]&lt;&gt;&quot;&quot;;[.E12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4]&lt;&gt;&quot;&quot;;[.E1294]&lt;&gt;&quot;&quot;);&quot;Brak Przerwy&quot;;IF(OR([.D1294]&lt;&gt;&quot;&quot;;[.E12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5]&lt;&gt;&quot;&quot;;[.E1295]&lt;&gt;&quot;&quot;);&quot;Brak Przerwy&quot;;IF(OR([.D1295]&lt;&gt;&quot;&quot;;[.E12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6]&lt;&gt;&quot;&quot;;[.E1296]&lt;&gt;&quot;&quot;);&quot;Brak Przerwy&quot;;IF(OR([.D1296]&lt;&gt;&quot;&quot;;[.E12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7]&lt;&gt;&quot;&quot;;[.E1297]&lt;&gt;&quot;&quot;);&quot;Brak Przerwy&quot;;IF(OR([.D1297]&lt;&gt;&quot;&quot;;[.E12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8]&lt;&gt;&quot;&quot;;[.E1298]&lt;&gt;&quot;&quot;);&quot;Brak Przerwy&quot;;IF(OR([.D1298]&lt;&gt;&quot;&quot;;[.E12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299]&lt;&gt;&quot;&quot;;[.E1299]&lt;&gt;&quot;&quot;);&quot;Brak Przerwy&quot;;IF(OR([.D1299]&lt;&gt;&quot;&quot;;[.E12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0]&lt;&gt;&quot;&quot;;[.E1300]&lt;&gt;&quot;&quot;);&quot;Brak Przerwy&quot;;IF(OR([.D1300]&lt;&gt;&quot;&quot;;[.E13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1]&lt;&gt;&quot;&quot;;[.E1301]&lt;&gt;&quot;&quot;);&quot;Brak Przerwy&quot;;IF(OR([.D1301]&lt;&gt;&quot;&quot;;[.E13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2]&lt;&gt;&quot;&quot;;[.E1302]&lt;&gt;&quot;&quot;);&quot;Brak Przerwy&quot;;IF(OR([.D1302]&lt;&gt;&quot;&quot;;[.E13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3]&lt;&gt;&quot;&quot;;[.E1303]&lt;&gt;&quot;&quot;);&quot;Brak Przerwy&quot;;IF(OR([.D1303]&lt;&gt;&quot;&quot;;[.E13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4]&lt;&gt;&quot;&quot;;[.E1304]&lt;&gt;&quot;&quot;);&quot;Brak Przerwy&quot;;IF(OR([.D1304]&lt;&gt;&quot;&quot;;[.E13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5]&lt;&gt;&quot;&quot;;[.E1305]&lt;&gt;&quot;&quot;);&quot;Brak Przerwy&quot;;IF(OR([.D1305]&lt;&gt;&quot;&quot;;[.E13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6]&lt;&gt;&quot;&quot;;[.E1306]&lt;&gt;&quot;&quot;);&quot;Brak Przerwy&quot;;IF(OR([.D1306]&lt;&gt;&quot;&quot;;[.E13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7]&lt;&gt;&quot;&quot;;[.E1307]&lt;&gt;&quot;&quot;);&quot;Brak Przerwy&quot;;IF(OR([.D1307]&lt;&gt;&quot;&quot;;[.E13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8]&lt;&gt;&quot;&quot;;[.E1308]&lt;&gt;&quot;&quot;);&quot;Brak Przerwy&quot;;IF(OR([.D1308]&lt;&gt;&quot;&quot;;[.E13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09]&lt;&gt;&quot;&quot;;[.E1309]&lt;&gt;&quot;&quot;);&quot;Brak Przerwy&quot;;IF(OR([.D1309]&lt;&gt;&quot;&quot;;[.E13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0]&lt;&gt;&quot;&quot;;[.E1310]&lt;&gt;&quot;&quot;);&quot;Brak Przerwy&quot;;IF(OR([.D1310]&lt;&gt;&quot;&quot;;[.E13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1]&lt;&gt;&quot;&quot;;[.E1311]&lt;&gt;&quot;&quot;);&quot;Brak Przerwy&quot;;IF(OR([.D1311]&lt;&gt;&quot;&quot;;[.E13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2]&lt;&gt;&quot;&quot;;[.E1312]&lt;&gt;&quot;&quot;);&quot;Brak Przerwy&quot;;IF(OR([.D1312]&lt;&gt;&quot;&quot;;[.E13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3]&lt;&gt;&quot;&quot;;[.E1313]&lt;&gt;&quot;&quot;);&quot;Brak Przerwy&quot;;IF(OR([.D1313]&lt;&gt;&quot;&quot;;[.E13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4]&lt;&gt;&quot;&quot;;[.E1314]&lt;&gt;&quot;&quot;);&quot;Brak Przerwy&quot;;IF(OR([.D1314]&lt;&gt;&quot;&quot;;[.E13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5]&lt;&gt;&quot;&quot;;[.E1315]&lt;&gt;&quot;&quot;);&quot;Brak Przerwy&quot;;IF(OR([.D1315]&lt;&gt;&quot;&quot;;[.E13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6]&lt;&gt;&quot;&quot;;[.E1316]&lt;&gt;&quot;&quot;);&quot;Brak Przerwy&quot;;IF(OR([.D1316]&lt;&gt;&quot;&quot;;[.E13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7]&lt;&gt;&quot;&quot;;[.E1317]&lt;&gt;&quot;&quot;);&quot;Brak Przerwy&quot;;IF(OR([.D1317]&lt;&gt;&quot;&quot;;[.E13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8]&lt;&gt;&quot;&quot;;[.E1318]&lt;&gt;&quot;&quot;);&quot;Brak Przerwy&quot;;IF(OR([.D1318]&lt;&gt;&quot;&quot;;[.E13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19]&lt;&gt;&quot;&quot;;[.E1319]&lt;&gt;&quot;&quot;);&quot;Brak Przerwy&quot;;IF(OR([.D1319]&lt;&gt;&quot;&quot;;[.E13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0]&lt;&gt;&quot;&quot;;[.E1320]&lt;&gt;&quot;&quot;);&quot;Brak Przerwy&quot;;IF(OR([.D1320]&lt;&gt;&quot;&quot;;[.E13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1]&lt;&gt;&quot;&quot;;[.E1321]&lt;&gt;&quot;&quot;);&quot;Brak Przerwy&quot;;IF(OR([.D1321]&lt;&gt;&quot;&quot;;[.E13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2]&lt;&gt;&quot;&quot;;[.E1322]&lt;&gt;&quot;&quot;);&quot;Brak Przerwy&quot;;IF(OR([.D1322]&lt;&gt;&quot;&quot;;[.E13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3]&lt;&gt;&quot;&quot;;[.E1323]&lt;&gt;&quot;&quot;);&quot;Brak Przerwy&quot;;IF(OR([.D1323]&lt;&gt;&quot;&quot;;[.E13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4]&lt;&gt;&quot;&quot;;[.E1324]&lt;&gt;&quot;&quot;);&quot;Brak Przerwy&quot;;IF(OR([.D1324]&lt;&gt;&quot;&quot;;[.E13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5]&lt;&gt;&quot;&quot;;[.E1325]&lt;&gt;&quot;&quot;);&quot;Brak Przerwy&quot;;IF(OR([.D1325]&lt;&gt;&quot;&quot;;[.E13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6]&lt;&gt;&quot;&quot;;[.E1326]&lt;&gt;&quot;&quot;);&quot;Brak Przerwy&quot;;IF(OR([.D1326]&lt;&gt;&quot;&quot;;[.E13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7]&lt;&gt;&quot;&quot;;[.E1327]&lt;&gt;&quot;&quot;);&quot;Brak Przerwy&quot;;IF(OR([.D1327]&lt;&gt;&quot;&quot;;[.E13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8]&lt;&gt;&quot;&quot;;[.E1328]&lt;&gt;&quot;&quot;);&quot;Brak Przerwy&quot;;IF(OR([.D1328]&lt;&gt;&quot;&quot;;[.E13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29]&lt;&gt;&quot;&quot;;[.E1329]&lt;&gt;&quot;&quot;);&quot;Brak Przerwy&quot;;IF(OR([.D1329]&lt;&gt;&quot;&quot;;[.E13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0]&lt;&gt;&quot;&quot;;[.E1330]&lt;&gt;&quot;&quot;);&quot;Brak Przerwy&quot;;IF(OR([.D1330]&lt;&gt;&quot;&quot;;[.E13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1]&lt;&gt;&quot;&quot;;[.E1331]&lt;&gt;&quot;&quot;);&quot;Brak Przerwy&quot;;IF(OR([.D1331]&lt;&gt;&quot;&quot;;[.E13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2]&lt;&gt;&quot;&quot;;[.E1332]&lt;&gt;&quot;&quot;);&quot;Brak Przerwy&quot;;IF(OR([.D1332]&lt;&gt;&quot;&quot;;[.E13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3]&lt;&gt;&quot;&quot;;[.E1333]&lt;&gt;&quot;&quot;);&quot;Brak Przerwy&quot;;IF(OR([.D1333]&lt;&gt;&quot;&quot;;[.E13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4]&lt;&gt;&quot;&quot;;[.E1334]&lt;&gt;&quot;&quot;);&quot;Brak Przerwy&quot;;IF(OR([.D1334]&lt;&gt;&quot;&quot;;[.E13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5]&lt;&gt;&quot;&quot;;[.E1335]&lt;&gt;&quot;&quot;);&quot;Brak Przerwy&quot;;IF(OR([.D1335]&lt;&gt;&quot;&quot;;[.E13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6]&lt;&gt;&quot;&quot;;[.E1336]&lt;&gt;&quot;&quot;);&quot;Brak Przerwy&quot;;IF(OR([.D1336]&lt;&gt;&quot;&quot;;[.E13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7]&lt;&gt;&quot;&quot;;[.E1337]&lt;&gt;&quot;&quot;);&quot;Brak Przerwy&quot;;IF(OR([.D1337]&lt;&gt;&quot;&quot;;[.E133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8]&lt;&gt;&quot;&quot;;[.E1338]&lt;&gt;&quot;&quot;);&quot;Brak Przerwy&quot;;IF(OR([.D1338]&lt;&gt;&quot;&quot;;[.E133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39]&lt;&gt;&quot;&quot;;[.E1339]&lt;&gt;&quot;&quot;);&quot;Brak Przerwy&quot;;IF(OR([.D1339]&lt;&gt;&quot;&quot;;[.E133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0]&lt;&gt;&quot;&quot;;[.E1340]&lt;&gt;&quot;&quot;);&quot;Brak Przerwy&quot;;IF(OR([.D1340]&lt;&gt;&quot;&quot;;[.E134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1]&lt;&gt;&quot;&quot;;[.E1341]&lt;&gt;&quot;&quot;);&quot;Brak Przerwy&quot;;IF(OR([.D1341]&lt;&gt;&quot;&quot;;[.E134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2]&lt;&gt;&quot;&quot;;[.E1342]&lt;&gt;&quot;&quot;);&quot;Brak Przerwy&quot;;IF(OR([.D1342]&lt;&gt;&quot;&quot;;[.E134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3]&lt;&gt;&quot;&quot;;[.E1343]&lt;&gt;&quot;&quot;);&quot;Brak Przerwy&quot;;IF(OR([.D1343]&lt;&gt;&quot;&quot;;[.E134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4]&lt;&gt;&quot;&quot;;[.E1344]&lt;&gt;&quot;&quot;);&quot;Brak Przerwy&quot;;IF(OR([.D1344]&lt;&gt;&quot;&quot;;[.E134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5]&lt;&gt;&quot;&quot;;[.E1345]&lt;&gt;&quot;&quot;);&quot;Brak Przerwy&quot;;IF(OR([.D1345]&lt;&gt;&quot;&quot;;[.E134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6]&lt;&gt;&quot;&quot;;[.E1346]&lt;&gt;&quot;&quot;);&quot;Brak Przerwy&quot;;IF(OR([.D1346]&lt;&gt;&quot;&quot;;[.E134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7]&lt;&gt;&quot;&quot;;[.E1347]&lt;&gt;&quot;&quot;);&quot;Brak Przerwy&quot;;IF(OR([.D1347]&lt;&gt;&quot;&quot;;[.E134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8]&lt;&gt;&quot;&quot;;[.E1348]&lt;&gt;&quot;&quot;);&quot;Brak Przerwy&quot;;IF(OR([.D1348]&lt;&gt;&quot;&quot;;[.E134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49]&lt;&gt;&quot;&quot;;[.E1349]&lt;&gt;&quot;&quot;);&quot;Brak Przerwy&quot;;IF(OR([.D1349]&lt;&gt;&quot;&quot;;[.E134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0]&lt;&gt;&quot;&quot;;[.E1350]&lt;&gt;&quot;&quot;);&quot;Brak Przerwy&quot;;IF(OR([.D1350]&lt;&gt;&quot;&quot;;[.E135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1]&lt;&gt;&quot;&quot;;[.E1351]&lt;&gt;&quot;&quot;);&quot;Brak Przerwy&quot;;IF(OR([.D1351]&lt;&gt;&quot;&quot;;[.E135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2]&lt;&gt;&quot;&quot;;[.E1352]&lt;&gt;&quot;&quot;);&quot;Brak Przerwy&quot;;IF(OR([.D1352]&lt;&gt;&quot;&quot;;[.E135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3]&lt;&gt;&quot;&quot;;[.E1353]&lt;&gt;&quot;&quot;);&quot;Brak Przerwy&quot;;IF(OR([.D1353]&lt;&gt;&quot;&quot;;[.E135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4]&lt;&gt;&quot;&quot;;[.E1354]&lt;&gt;&quot;&quot;);&quot;Brak Przerwy&quot;;IF(OR([.D1354]&lt;&gt;&quot;&quot;;[.E135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5]&lt;&gt;&quot;&quot;;[.E1355]&lt;&gt;&quot;&quot;);&quot;Brak Przerwy&quot;;IF(OR([.D1355]&lt;&gt;&quot;&quot;;[.E135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6]&lt;&gt;&quot;&quot;;[.E1356]&lt;&gt;&quot;&quot;);&quot;Brak Przerwy&quot;;IF(OR([.D1356]&lt;&gt;&quot;&quot;;[.E135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7]&lt;&gt;&quot;&quot;;[.E1357]&lt;&gt;&quot;&quot;);&quot;Brak Przerwy&quot;;IF(OR([.D1357]&lt;&gt;&quot;&quot;;[.E135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8]&lt;&gt;&quot;&quot;;[.E1358]&lt;&gt;&quot;&quot;);&quot;Brak Przerwy&quot;;IF(OR([.D1358]&lt;&gt;&quot;&quot;;[.E135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59]&lt;&gt;&quot;&quot;;[.E1359]&lt;&gt;&quot;&quot;);&quot;Brak Przerwy&quot;;IF(OR([.D1359]&lt;&gt;&quot;&quot;;[.E135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0]&lt;&gt;&quot;&quot;;[.E1360]&lt;&gt;&quot;&quot;);&quot;Brak Przerwy&quot;;IF(OR([.D1360]&lt;&gt;&quot;&quot;;[.E136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1]&lt;&gt;&quot;&quot;;[.E1361]&lt;&gt;&quot;&quot;);&quot;Brak Przerwy&quot;;IF(OR([.D1361]&lt;&gt;&quot;&quot;;[.E136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2]&lt;&gt;&quot;&quot;;[.E1362]&lt;&gt;&quot;&quot;);&quot;Brak Przerwy&quot;;IF(OR([.D1362]&lt;&gt;&quot;&quot;;[.E136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3]&lt;&gt;&quot;&quot;;[.E1363]&lt;&gt;&quot;&quot;);&quot;Brak Przerwy&quot;;IF(OR([.D1363]&lt;&gt;&quot;&quot;;[.E136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4]&lt;&gt;&quot;&quot;;[.E1364]&lt;&gt;&quot;&quot;);&quot;Brak Przerwy&quot;;IF(OR([.D1364]&lt;&gt;&quot;&quot;;[.E136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5]&lt;&gt;&quot;&quot;;[.E1365]&lt;&gt;&quot;&quot;);&quot;Brak Przerwy&quot;;IF(OR([.D1365]&lt;&gt;&quot;&quot;;[.E136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6]&lt;&gt;&quot;&quot;;[.E1366]&lt;&gt;&quot;&quot;);&quot;Brak Przerwy&quot;;IF(OR([.D1366]&lt;&gt;&quot;&quot;;[.E136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7]&lt;&gt;&quot;&quot;;[.E1367]&lt;&gt;&quot;&quot;);&quot;Brak Przerwy&quot;;IF(OR([.D1367]&lt;&gt;&quot;&quot;;[.E136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8]&lt;&gt;&quot;&quot;;[.E1368]&lt;&gt;&quot;&quot;);&quot;Brak Przerwy&quot;;IF(OR([.D1368]&lt;&gt;&quot;&quot;;[.E136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69]&lt;&gt;&quot;&quot;;[.E1369]&lt;&gt;&quot;&quot;);&quot;Brak Przerwy&quot;;IF(OR([.D1369]&lt;&gt;&quot;&quot;;[.E136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0]&lt;&gt;&quot;&quot;;[.E1370]&lt;&gt;&quot;&quot;);&quot;Brak Przerwy&quot;;IF(OR([.D1370]&lt;&gt;&quot;&quot;;[.E137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1]&lt;&gt;&quot;&quot;;[.E1371]&lt;&gt;&quot;&quot;);&quot;Brak Przerwy&quot;;IF(OR([.D1371]&lt;&gt;&quot;&quot;;[.E137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2]&lt;&gt;&quot;&quot;;[.E1372]&lt;&gt;&quot;&quot;);&quot;Brak Przerwy&quot;;IF(OR([.D1372]&lt;&gt;&quot;&quot;;[.E137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3]&lt;&gt;&quot;&quot;;[.E1373]&lt;&gt;&quot;&quot;);&quot;Brak Przerwy&quot;;IF(OR([.D1373]&lt;&gt;&quot;&quot;;[.E137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4]&lt;&gt;&quot;&quot;;[.E1374]&lt;&gt;&quot;&quot;);&quot;Brak Przerwy&quot;;IF(OR([.D1374]&lt;&gt;&quot;&quot;;[.E137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5]&lt;&gt;&quot;&quot;;[.E1375]&lt;&gt;&quot;&quot;);&quot;Brak Przerwy&quot;;IF(OR([.D1375]&lt;&gt;&quot;&quot;;[.E137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6]&lt;&gt;&quot;&quot;;[.E1376]&lt;&gt;&quot;&quot;);&quot;Brak Przerwy&quot;;IF(OR([.D1376]&lt;&gt;&quot;&quot;;[.E137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7]&lt;&gt;&quot;&quot;;[.E1377]&lt;&gt;&quot;&quot;);&quot;Brak Przerwy&quot;;IF(OR([.D1377]&lt;&gt;&quot;&quot;;[.E137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8]&lt;&gt;&quot;&quot;;[.E1378]&lt;&gt;&quot;&quot;);&quot;Brak Przerwy&quot;;IF(OR([.D1378]&lt;&gt;&quot;&quot;;[.E137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79]&lt;&gt;&quot;&quot;;[.E1379]&lt;&gt;&quot;&quot;);&quot;Brak Przerwy&quot;;IF(OR([.D1379]&lt;&gt;&quot;&quot;;[.E137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0]&lt;&gt;&quot;&quot;;[.E1380]&lt;&gt;&quot;&quot;);&quot;Brak Przerwy&quot;;IF(OR([.D1380]&lt;&gt;&quot;&quot;;[.E138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1]&lt;&gt;&quot;&quot;;[.E1381]&lt;&gt;&quot;&quot;);&quot;Brak Przerwy&quot;;IF(OR([.D1381]&lt;&gt;&quot;&quot;;[.E138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2]&lt;&gt;&quot;&quot;;[.E1382]&lt;&gt;&quot;&quot;);&quot;Brak Przerwy&quot;;IF(OR([.D1382]&lt;&gt;&quot;&quot;;[.E138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3]&lt;&gt;&quot;&quot;;[.E1383]&lt;&gt;&quot;&quot;);&quot;Brak Przerwy&quot;;IF(OR([.D1383]&lt;&gt;&quot;&quot;;[.E138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4]&lt;&gt;&quot;&quot;;[.E1384]&lt;&gt;&quot;&quot;);&quot;Brak Przerwy&quot;;IF(OR([.D1384]&lt;&gt;&quot;&quot;;[.E138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5]&lt;&gt;&quot;&quot;;[.E1385]&lt;&gt;&quot;&quot;);&quot;Brak Przerwy&quot;;IF(OR([.D1385]&lt;&gt;&quot;&quot;;[.E138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6]&lt;&gt;&quot;&quot;;[.E1386]&lt;&gt;&quot;&quot;);&quot;Brak Przerwy&quot;;IF(OR([.D1386]&lt;&gt;&quot;&quot;;[.E138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7]&lt;&gt;&quot;&quot;;[.E1387]&lt;&gt;&quot;&quot;);&quot;Brak Przerwy&quot;;IF(OR([.D1387]&lt;&gt;&quot;&quot;;[.E138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8]&lt;&gt;&quot;&quot;;[.E1388]&lt;&gt;&quot;&quot;);&quot;Brak Przerwy&quot;;IF(OR([.D1388]&lt;&gt;&quot;&quot;;[.E138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89]&lt;&gt;&quot;&quot;;[.E1389]&lt;&gt;&quot;&quot;);&quot;Brak Przerwy&quot;;IF(OR([.D1389]&lt;&gt;&quot;&quot;;[.E138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0]&lt;&gt;&quot;&quot;;[.E1390]&lt;&gt;&quot;&quot;);&quot;Brak Przerwy&quot;;IF(OR([.D1390]&lt;&gt;&quot;&quot;;[.E139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1]&lt;&gt;&quot;&quot;;[.E1391]&lt;&gt;&quot;&quot;);&quot;Brak Przerwy&quot;;IF(OR([.D1391]&lt;&gt;&quot;&quot;;[.E139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2]&lt;&gt;&quot;&quot;;[.E1392]&lt;&gt;&quot;&quot;);&quot;Brak Przerwy&quot;;IF(OR([.D1392]&lt;&gt;&quot;&quot;;[.E139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3]&lt;&gt;&quot;&quot;;[.E1393]&lt;&gt;&quot;&quot;);&quot;Brak Przerwy&quot;;IF(OR([.D1393]&lt;&gt;&quot;&quot;;[.E139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4]&lt;&gt;&quot;&quot;;[.E1394]&lt;&gt;&quot;&quot;);&quot;Brak Przerwy&quot;;IF(OR([.D1394]&lt;&gt;&quot;&quot;;[.E139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5]&lt;&gt;&quot;&quot;;[.E1395]&lt;&gt;&quot;&quot;);&quot;Brak Przerwy&quot;;IF(OR([.D1395]&lt;&gt;&quot;&quot;;[.E139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6]&lt;&gt;&quot;&quot;;[.E1396]&lt;&gt;&quot;&quot;);&quot;Brak Przerwy&quot;;IF(OR([.D1396]&lt;&gt;&quot;&quot;;[.E139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7]&lt;&gt;&quot;&quot;;[.E1397]&lt;&gt;&quot;&quot;);&quot;Brak Przerwy&quot;;IF(OR([.D1397]&lt;&gt;&quot;&quot;;[.E139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8]&lt;&gt;&quot;&quot;;[.E1398]&lt;&gt;&quot;&quot;);&quot;Brak Przerwy&quot;;IF(OR([.D1398]&lt;&gt;&quot;&quot;;[.E139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399]&lt;&gt;&quot;&quot;;[.E1399]&lt;&gt;&quot;&quot;);&quot;Brak Przerwy&quot;;IF(OR([.D1399]&lt;&gt;&quot;&quot;;[.E139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0]&lt;&gt;&quot;&quot;;[.E1400]&lt;&gt;&quot;&quot;);&quot;Brak Przerwy&quot;;IF(OR([.D1400]&lt;&gt;&quot;&quot;;[.E140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1]&lt;&gt;&quot;&quot;;[.E1401]&lt;&gt;&quot;&quot;);&quot;Brak Przerwy&quot;;IF(OR([.D1401]&lt;&gt;&quot;&quot;;[.E140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2]&lt;&gt;&quot;&quot;;[.E1402]&lt;&gt;&quot;&quot;);&quot;Brak Przerwy&quot;;IF(OR([.D1402]&lt;&gt;&quot;&quot;;[.E140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3]&lt;&gt;&quot;&quot;;[.E1403]&lt;&gt;&quot;&quot;);&quot;Brak Przerwy&quot;;IF(OR([.D1403]&lt;&gt;&quot;&quot;;[.E140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4]&lt;&gt;&quot;&quot;;[.E1404]&lt;&gt;&quot;&quot;);&quot;Brak Przerwy&quot;;IF(OR([.D1404]&lt;&gt;&quot;&quot;;[.E140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5]&lt;&gt;&quot;&quot;;[.E1405]&lt;&gt;&quot;&quot;);&quot;Brak Przerwy&quot;;IF(OR([.D1405]&lt;&gt;&quot;&quot;;[.E140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6]&lt;&gt;&quot;&quot;;[.E1406]&lt;&gt;&quot;&quot;);&quot;Brak Przerwy&quot;;IF(OR([.D1406]&lt;&gt;&quot;&quot;;[.E140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7]&lt;&gt;&quot;&quot;;[.E1407]&lt;&gt;&quot;&quot;);&quot;Brak Przerwy&quot;;IF(OR([.D1407]&lt;&gt;&quot;&quot;;[.E140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8]&lt;&gt;&quot;&quot;;[.E1408]&lt;&gt;&quot;&quot;);&quot;Brak Przerwy&quot;;IF(OR([.D1408]&lt;&gt;&quot;&quot;;[.E140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09]&lt;&gt;&quot;&quot;;[.E1409]&lt;&gt;&quot;&quot;);&quot;Brak Przerwy&quot;;IF(OR([.D1409]&lt;&gt;&quot;&quot;;[.E140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0]&lt;&gt;&quot;&quot;;[.E1410]&lt;&gt;&quot;&quot;);&quot;Brak Przerwy&quot;;IF(OR([.D1410]&lt;&gt;&quot;&quot;;[.E141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1]&lt;&gt;&quot;&quot;;[.E1411]&lt;&gt;&quot;&quot;);&quot;Brak Przerwy&quot;;IF(OR([.D1411]&lt;&gt;&quot;&quot;;[.E141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2]&lt;&gt;&quot;&quot;;[.E1412]&lt;&gt;&quot;&quot;);&quot;Brak Przerwy&quot;;IF(OR([.D1412]&lt;&gt;&quot;&quot;;[.E141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3]&lt;&gt;&quot;&quot;;[.E1413]&lt;&gt;&quot;&quot;);&quot;Brak Przerwy&quot;;IF(OR([.D1413]&lt;&gt;&quot;&quot;;[.E141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4]&lt;&gt;&quot;&quot;;[.E1414]&lt;&gt;&quot;&quot;);&quot;Brak Przerwy&quot;;IF(OR([.D1414]&lt;&gt;&quot;&quot;;[.E141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5]&lt;&gt;&quot;&quot;;[.E1415]&lt;&gt;&quot;&quot;);&quot;Brak Przerwy&quot;;IF(OR([.D1415]&lt;&gt;&quot;&quot;;[.E141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6]&lt;&gt;&quot;&quot;;[.E1416]&lt;&gt;&quot;&quot;);&quot;Brak Przerwy&quot;;IF(OR([.D1416]&lt;&gt;&quot;&quot;;[.E141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7]&lt;&gt;&quot;&quot;;[.E1417]&lt;&gt;&quot;&quot;);&quot;Brak Przerwy&quot;;IF(OR([.D1417]&lt;&gt;&quot;&quot;;[.E141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8]&lt;&gt;&quot;&quot;;[.E1418]&lt;&gt;&quot;&quot;);&quot;Brak Przerwy&quot;;IF(OR([.D1418]&lt;&gt;&quot;&quot;;[.E141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19]&lt;&gt;&quot;&quot;;[.E1419]&lt;&gt;&quot;&quot;);&quot;Brak Przerwy&quot;;IF(OR([.D1419]&lt;&gt;&quot;&quot;;[.E141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0]&lt;&gt;&quot;&quot;;[.E1420]&lt;&gt;&quot;&quot;);&quot;Brak Przerwy&quot;;IF(OR([.D1420]&lt;&gt;&quot;&quot;;[.E142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1]&lt;&gt;&quot;&quot;;[.E1421]&lt;&gt;&quot;&quot;);&quot;Brak Przerwy&quot;;IF(OR([.D1421]&lt;&gt;&quot;&quot;;[.E142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2]&lt;&gt;&quot;&quot;;[.E1422]&lt;&gt;&quot;&quot;);&quot;Brak Przerwy&quot;;IF(OR([.D1422]&lt;&gt;&quot;&quot;;[.E142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3]&lt;&gt;&quot;&quot;;[.E1423]&lt;&gt;&quot;&quot;);&quot;Brak Przerwy&quot;;IF(OR([.D1423]&lt;&gt;&quot;&quot;;[.E142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4]&lt;&gt;&quot;&quot;;[.E1424]&lt;&gt;&quot;&quot;);&quot;Brak Przerwy&quot;;IF(OR([.D1424]&lt;&gt;&quot;&quot;;[.E142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5]&lt;&gt;&quot;&quot;;[.E1425]&lt;&gt;&quot;&quot;);&quot;Brak Przerwy&quot;;IF(OR([.D1425]&lt;&gt;&quot;&quot;;[.E142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6]&lt;&gt;&quot;&quot;;[.E1426]&lt;&gt;&quot;&quot;);&quot;Brak Przerwy&quot;;IF(OR([.D1426]&lt;&gt;&quot;&quot;;[.E142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7]&lt;&gt;&quot;&quot;;[.E1427]&lt;&gt;&quot;&quot;);&quot;Brak Przerwy&quot;;IF(OR([.D1427]&lt;&gt;&quot;&quot;;[.E1427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8]&lt;&gt;&quot;&quot;;[.E1428]&lt;&gt;&quot;&quot;);&quot;Brak Przerwy&quot;;IF(OR([.D1428]&lt;&gt;&quot;&quot;;[.E1428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29]&lt;&gt;&quot;&quot;;[.E1429]&lt;&gt;&quot;&quot;);&quot;Brak Przerwy&quot;;IF(OR([.D1429]&lt;&gt;&quot;&quot;;[.E1429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30]&lt;&gt;&quot;&quot;;[.E1430]&lt;&gt;&quot;&quot;);&quot;Brak Przerwy&quot;;IF(OR([.D1430]&lt;&gt;&quot;&quot;;[.E1430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31]&lt;&gt;&quot;&quot;;[.E1431]&lt;&gt;&quot;&quot;);&quot;Brak Przerwy&quot;;IF(OR([.D1431]&lt;&gt;&quot;&quot;;[.E1431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32]&lt;&gt;&quot;&quot;;[.E1432]&lt;&gt;&quot;&quot;);&quot;Brak Przerwy&quot;;IF(OR([.D1432]&lt;&gt;&quot;&quot;;[.E1432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33]&lt;&gt;&quot;&quot;;[.E1433]&lt;&gt;&quot;&quot;);&quot;Brak Przerwy&quot;;IF(OR([.D1433]&lt;&gt;&quot;&quot;;[.E1433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34]&lt;&gt;&quot;&quot;;[.E1434]&lt;&gt;&quot;&quot;);&quot;Brak Przerwy&quot;;IF(OR([.D1434]&lt;&gt;&quot;&quot;;[.E1434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35]&lt;&gt;&quot;&quot;;[.E1435]&lt;&gt;&quot;&quot;);&quot;Brak Przerwy&quot;;IF(OR([.D1435]&lt;&gt;&quot;&quot;;[.E1435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content-validation-name="val3" table:style-name="ce2"/>
          <table:table-cell office:value-type="string" office:string-value="" table:formula="of:=IF(AND([.D1436]&lt;&gt;&quot;&quot;;[.E1436]&lt;&gt;&quot;&quot;);&quot;Brak Przerwy&quot;;IF(OR([.D1436]&lt;&gt;&quot;&quot;;[.E1436]&lt;&gt;&quot;&quot;);&quot;Przerwa&quot;;&quot;&quot;))" table:style-name="ce2"/>
          <table:table-cell table:content-validation-name="val2" table:style-name="ce12"/>
          <table:table-cell table:content-validation-name="val1" table:style-name="ce15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1"/>
          <table:table-cell table:content-validation-name="val3" table:style-name="ce1"/>
          <table:table-cell office:value-type="string" office:string-value="" table:formula="of:=IF(AND([.D1437]&lt;&gt;&quot;&quot;;[.E1437]&lt;&gt;&quot;&quot;);&quot;Brak Przerwy&quot;;IF(OR([.D1437]&lt;&gt;&quot;&quot;;[.E143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 table:style-name="ce1"/>
        </table:table-row>
        <table:table-row table:style-name="ro1">
          <table:table-cell table:style-name="ce1"/>
          <table:table-cell table:content-validation-name="val3" table:style-name="ce1"/>
          <table:table-cell office:value-type="string" office:string-value="" table:formula="of:=IF(AND([.D1438]&lt;&gt;&quot;&quot;;[.E1438]&lt;&gt;&quot;&quot;);&quot;Brak Przerwy&quot;;IF(OR([.D1438]&lt;&gt;&quot;&quot;;[.E143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 table:style-name="ce1"/>
        </table:table-row>
        <table:table-row table:style-name="ro1">
          <table:table-cell table:style-name="ce1"/>
          <table:table-cell table:content-validation-name="val3" table:style-name="ce1"/>
          <table:table-cell office:value-type="string" office:string-value="" table:formula="of:=IF(AND([.D1439]&lt;&gt;&quot;&quot;;[.E1439]&lt;&gt;&quot;&quot;);&quot;Brak Przerwy&quot;;IF(OR([.D1439]&lt;&gt;&quot;&quot;;[.E143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 table:style-name="ce1"/>
        </table:table-row>
        <table:table-row table:style-name="ro1">
          <table:table-cell table:style-name="ce1"/>
          <table:table-cell table:content-validation-name="val3" table:style-name="ce1"/>
          <table:table-cell office:value-type="string" office:string-value="" table:formula="of:=IF(AND([.D1440]&lt;&gt;&quot;&quot;;[.E1440]&lt;&gt;&quot;&quot;);&quot;Brak Przerwy&quot;;IF(OR([.D1440]&lt;&gt;&quot;&quot;;[.E144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 table:style-name="ce1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1]&lt;&gt;&quot;&quot;;[.E1441]&lt;&gt;&quot;&quot;);&quot;Brak Przerwy&quot;;IF(OR([.D1441]&lt;&gt;&quot;&quot;;[.E144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2]&lt;&gt;&quot;&quot;;[.E1442]&lt;&gt;&quot;&quot;);&quot;Brak Przerwy&quot;;IF(OR([.D1442]&lt;&gt;&quot;&quot;;[.E144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3]&lt;&gt;&quot;&quot;;[.E1443]&lt;&gt;&quot;&quot;);&quot;Brak Przerwy&quot;;IF(OR([.D1443]&lt;&gt;&quot;&quot;;[.E144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4]&lt;&gt;&quot;&quot;;[.E1444]&lt;&gt;&quot;&quot;);&quot;Brak Przerwy&quot;;IF(OR([.D1444]&lt;&gt;&quot;&quot;;[.E144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5]&lt;&gt;&quot;&quot;;[.E1445]&lt;&gt;&quot;&quot;);&quot;Brak Przerwy&quot;;IF(OR([.D1445]&lt;&gt;&quot;&quot;;[.E144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6]&lt;&gt;&quot;&quot;;[.E1446]&lt;&gt;&quot;&quot;);&quot;Brak Przerwy&quot;;IF(OR([.D1446]&lt;&gt;&quot;&quot;;[.E144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7]&lt;&gt;&quot;&quot;;[.E1447]&lt;&gt;&quot;&quot;);&quot;Brak Przerwy&quot;;IF(OR([.D1447]&lt;&gt;&quot;&quot;;[.E144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8]&lt;&gt;&quot;&quot;;[.E1448]&lt;&gt;&quot;&quot;);&quot;Brak Przerwy&quot;;IF(OR([.D1448]&lt;&gt;&quot;&quot;;[.E144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49]&lt;&gt;&quot;&quot;;[.E1449]&lt;&gt;&quot;&quot;);&quot;Brak Przerwy&quot;;IF(OR([.D1449]&lt;&gt;&quot;&quot;;[.E144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0]&lt;&gt;&quot;&quot;;[.E1450]&lt;&gt;&quot;&quot;);&quot;Brak Przerwy&quot;;IF(OR([.D1450]&lt;&gt;&quot;&quot;;[.E145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1]&lt;&gt;&quot;&quot;;[.E1451]&lt;&gt;&quot;&quot;);&quot;Brak Przerwy&quot;;IF(OR([.D1451]&lt;&gt;&quot;&quot;;[.E145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2]&lt;&gt;&quot;&quot;;[.E1452]&lt;&gt;&quot;&quot;);&quot;Brak Przerwy&quot;;IF(OR([.D1452]&lt;&gt;&quot;&quot;;[.E145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3]&lt;&gt;&quot;&quot;;[.E1453]&lt;&gt;&quot;&quot;);&quot;Brak Przerwy&quot;;IF(OR([.D1453]&lt;&gt;&quot;&quot;;[.E145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4]&lt;&gt;&quot;&quot;;[.E1454]&lt;&gt;&quot;&quot;);&quot;Brak Przerwy&quot;;IF(OR([.D1454]&lt;&gt;&quot;&quot;;[.E145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5]&lt;&gt;&quot;&quot;;[.E1455]&lt;&gt;&quot;&quot;);&quot;Brak Przerwy&quot;;IF(OR([.D1455]&lt;&gt;&quot;&quot;;[.E145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6]&lt;&gt;&quot;&quot;;[.E1456]&lt;&gt;&quot;&quot;);&quot;Brak Przerwy&quot;;IF(OR([.D1456]&lt;&gt;&quot;&quot;;[.E145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7]&lt;&gt;&quot;&quot;;[.E1457]&lt;&gt;&quot;&quot;);&quot;Brak Przerwy&quot;;IF(OR([.D1457]&lt;&gt;&quot;&quot;;[.E145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8]&lt;&gt;&quot;&quot;;[.E1458]&lt;&gt;&quot;&quot;);&quot;Brak Przerwy&quot;;IF(OR([.D1458]&lt;&gt;&quot;&quot;;[.E145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59]&lt;&gt;&quot;&quot;;[.E1459]&lt;&gt;&quot;&quot;);&quot;Brak Przerwy&quot;;IF(OR([.D1459]&lt;&gt;&quot;&quot;;[.E145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0]&lt;&gt;&quot;&quot;;[.E1460]&lt;&gt;&quot;&quot;);&quot;Brak Przerwy&quot;;IF(OR([.D1460]&lt;&gt;&quot;&quot;;[.E146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1]&lt;&gt;&quot;&quot;;[.E1461]&lt;&gt;&quot;&quot;);&quot;Brak Przerwy&quot;;IF(OR([.D1461]&lt;&gt;&quot;&quot;;[.E146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2]&lt;&gt;&quot;&quot;;[.E1462]&lt;&gt;&quot;&quot;);&quot;Brak Przerwy&quot;;IF(OR([.D1462]&lt;&gt;&quot;&quot;;[.E146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3]&lt;&gt;&quot;&quot;;[.E1463]&lt;&gt;&quot;&quot;);&quot;Brak Przerwy&quot;;IF(OR([.D1463]&lt;&gt;&quot;&quot;;[.E146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4]&lt;&gt;&quot;&quot;;[.E1464]&lt;&gt;&quot;&quot;);&quot;Brak Przerwy&quot;;IF(OR([.D1464]&lt;&gt;&quot;&quot;;[.E146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5]&lt;&gt;&quot;&quot;;[.E1465]&lt;&gt;&quot;&quot;);&quot;Brak Przerwy&quot;;IF(OR([.D1465]&lt;&gt;&quot;&quot;;[.E146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6]&lt;&gt;&quot;&quot;;[.E1466]&lt;&gt;&quot;&quot;);&quot;Brak Przerwy&quot;;IF(OR([.D1466]&lt;&gt;&quot;&quot;;[.E146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7]&lt;&gt;&quot;&quot;;[.E1467]&lt;&gt;&quot;&quot;);&quot;Brak Przerwy&quot;;IF(OR([.D1467]&lt;&gt;&quot;&quot;;[.E146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8]&lt;&gt;&quot;&quot;;[.E1468]&lt;&gt;&quot;&quot;);&quot;Brak Przerwy&quot;;IF(OR([.D1468]&lt;&gt;&quot;&quot;;[.E146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69]&lt;&gt;&quot;&quot;;[.E1469]&lt;&gt;&quot;&quot;);&quot;Brak Przerwy&quot;;IF(OR([.D1469]&lt;&gt;&quot;&quot;;[.E146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0]&lt;&gt;&quot;&quot;;[.E1470]&lt;&gt;&quot;&quot;);&quot;Brak Przerwy&quot;;IF(OR([.D1470]&lt;&gt;&quot;&quot;;[.E147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1]&lt;&gt;&quot;&quot;;[.E1471]&lt;&gt;&quot;&quot;);&quot;Brak Przerwy&quot;;IF(OR([.D1471]&lt;&gt;&quot;&quot;;[.E147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2]&lt;&gt;&quot;&quot;;[.E1472]&lt;&gt;&quot;&quot;);&quot;Brak Przerwy&quot;;IF(OR([.D1472]&lt;&gt;&quot;&quot;;[.E147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3]&lt;&gt;&quot;&quot;;[.E1473]&lt;&gt;&quot;&quot;);&quot;Brak Przerwy&quot;;IF(OR([.D1473]&lt;&gt;&quot;&quot;;[.E147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4]&lt;&gt;&quot;&quot;;[.E1474]&lt;&gt;&quot;&quot;);&quot;Brak Przerwy&quot;;IF(OR([.D1474]&lt;&gt;&quot;&quot;;[.E147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5]&lt;&gt;&quot;&quot;;[.E1475]&lt;&gt;&quot;&quot;);&quot;Brak Przerwy&quot;;IF(OR([.D1475]&lt;&gt;&quot;&quot;;[.E147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6]&lt;&gt;&quot;&quot;;[.E1476]&lt;&gt;&quot;&quot;);&quot;Brak Przerwy&quot;;IF(OR([.D1476]&lt;&gt;&quot;&quot;;[.E147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7]&lt;&gt;&quot;&quot;;[.E1477]&lt;&gt;&quot;&quot;);&quot;Brak Przerwy&quot;;IF(OR([.D1477]&lt;&gt;&quot;&quot;;[.E147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8]&lt;&gt;&quot;&quot;;[.E1478]&lt;&gt;&quot;&quot;);&quot;Brak Przerwy&quot;;IF(OR([.D1478]&lt;&gt;&quot;&quot;;[.E147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79]&lt;&gt;&quot;&quot;;[.E1479]&lt;&gt;&quot;&quot;);&quot;Brak Przerwy&quot;;IF(OR([.D1479]&lt;&gt;&quot;&quot;;[.E147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0]&lt;&gt;&quot;&quot;;[.E1480]&lt;&gt;&quot;&quot;);&quot;Brak Przerwy&quot;;IF(OR([.D1480]&lt;&gt;&quot;&quot;;[.E148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1]&lt;&gt;&quot;&quot;;[.E1481]&lt;&gt;&quot;&quot;);&quot;Brak Przerwy&quot;;IF(OR([.D1481]&lt;&gt;&quot;&quot;;[.E148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2]&lt;&gt;&quot;&quot;;[.E1482]&lt;&gt;&quot;&quot;);&quot;Brak Przerwy&quot;;IF(OR([.D1482]&lt;&gt;&quot;&quot;;[.E148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3]&lt;&gt;&quot;&quot;;[.E1483]&lt;&gt;&quot;&quot;);&quot;Brak Przerwy&quot;;IF(OR([.D1483]&lt;&gt;&quot;&quot;;[.E148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4]&lt;&gt;&quot;&quot;;[.E1484]&lt;&gt;&quot;&quot;);&quot;Brak Przerwy&quot;;IF(OR([.D1484]&lt;&gt;&quot;&quot;;[.E148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5]&lt;&gt;&quot;&quot;;[.E1485]&lt;&gt;&quot;&quot;);&quot;Brak Przerwy&quot;;IF(OR([.D1485]&lt;&gt;&quot;&quot;;[.E148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6]&lt;&gt;&quot;&quot;;[.E1486]&lt;&gt;&quot;&quot;);&quot;Brak Przerwy&quot;;IF(OR([.D1486]&lt;&gt;&quot;&quot;;[.E148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7]&lt;&gt;&quot;&quot;;[.E1487]&lt;&gt;&quot;&quot;);&quot;Brak Przerwy&quot;;IF(OR([.D1487]&lt;&gt;&quot;&quot;;[.E148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8]&lt;&gt;&quot;&quot;;[.E1488]&lt;&gt;&quot;&quot;);&quot;Brak Przerwy&quot;;IF(OR([.D1488]&lt;&gt;&quot;&quot;;[.E148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89]&lt;&gt;&quot;&quot;;[.E1489]&lt;&gt;&quot;&quot;);&quot;Brak Przerwy&quot;;IF(OR([.D1489]&lt;&gt;&quot;&quot;;[.E148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0]&lt;&gt;&quot;&quot;;[.E1490]&lt;&gt;&quot;&quot;);&quot;Brak Przerwy&quot;;IF(OR([.D1490]&lt;&gt;&quot;&quot;;[.E149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1]&lt;&gt;&quot;&quot;;[.E1491]&lt;&gt;&quot;&quot;);&quot;Brak Przerwy&quot;;IF(OR([.D1491]&lt;&gt;&quot;&quot;;[.E149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2]&lt;&gt;&quot;&quot;;[.E1492]&lt;&gt;&quot;&quot;);&quot;Brak Przerwy&quot;;IF(OR([.D1492]&lt;&gt;&quot;&quot;;[.E149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3]&lt;&gt;&quot;&quot;;[.E1493]&lt;&gt;&quot;&quot;);&quot;Brak Przerwy&quot;;IF(OR([.D1493]&lt;&gt;&quot;&quot;;[.E149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4]&lt;&gt;&quot;&quot;;[.E1494]&lt;&gt;&quot;&quot;);&quot;Brak Przerwy&quot;;IF(OR([.D1494]&lt;&gt;&quot;&quot;;[.E149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5]&lt;&gt;&quot;&quot;;[.E1495]&lt;&gt;&quot;&quot;);&quot;Brak Przerwy&quot;;IF(OR([.D1495]&lt;&gt;&quot;&quot;;[.E149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6]&lt;&gt;&quot;&quot;;[.E1496]&lt;&gt;&quot;&quot;);&quot;Brak Przerwy&quot;;IF(OR([.D1496]&lt;&gt;&quot;&quot;;[.E149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7]&lt;&gt;&quot;&quot;;[.E1497]&lt;&gt;&quot;&quot;);&quot;Brak Przerwy&quot;;IF(OR([.D1497]&lt;&gt;&quot;&quot;;[.E149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8]&lt;&gt;&quot;&quot;;[.E1498]&lt;&gt;&quot;&quot;);&quot;Brak Przerwy&quot;;IF(OR([.D1498]&lt;&gt;&quot;&quot;;[.E149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499]&lt;&gt;&quot;&quot;;[.E1499]&lt;&gt;&quot;&quot;);&quot;Brak Przerwy&quot;;IF(OR([.D1499]&lt;&gt;&quot;&quot;;[.E149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0]&lt;&gt;&quot;&quot;;[.E1500]&lt;&gt;&quot;&quot;);&quot;Brak Przerwy&quot;;IF(OR([.D1500]&lt;&gt;&quot;&quot;;[.E150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1]&lt;&gt;&quot;&quot;;[.E1501]&lt;&gt;&quot;&quot;);&quot;Brak Przerwy&quot;;IF(OR([.D1501]&lt;&gt;&quot;&quot;;[.E150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2]&lt;&gt;&quot;&quot;;[.E1502]&lt;&gt;&quot;&quot;);&quot;Brak Przerwy&quot;;IF(OR([.D1502]&lt;&gt;&quot;&quot;;[.E150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3]&lt;&gt;&quot;&quot;;[.E1503]&lt;&gt;&quot;&quot;);&quot;Brak Przerwy&quot;;IF(OR([.D1503]&lt;&gt;&quot;&quot;;[.E150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4]&lt;&gt;&quot;&quot;;[.E1504]&lt;&gt;&quot;&quot;);&quot;Brak Przerwy&quot;;IF(OR([.D1504]&lt;&gt;&quot;&quot;;[.E150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5]&lt;&gt;&quot;&quot;;[.E1505]&lt;&gt;&quot;&quot;);&quot;Brak Przerwy&quot;;IF(OR([.D1505]&lt;&gt;&quot;&quot;;[.E150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6]&lt;&gt;&quot;&quot;;[.E1506]&lt;&gt;&quot;&quot;);&quot;Brak Przerwy&quot;;IF(OR([.D1506]&lt;&gt;&quot;&quot;;[.E150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7]&lt;&gt;&quot;&quot;;[.E1507]&lt;&gt;&quot;&quot;);&quot;Brak Przerwy&quot;;IF(OR([.D1507]&lt;&gt;&quot;&quot;;[.E150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8]&lt;&gt;&quot;&quot;;[.E1508]&lt;&gt;&quot;&quot;);&quot;Brak Przerwy&quot;;IF(OR([.D1508]&lt;&gt;&quot;&quot;;[.E150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09]&lt;&gt;&quot;&quot;;[.E1509]&lt;&gt;&quot;&quot;);&quot;Brak Przerwy&quot;;IF(OR([.D1509]&lt;&gt;&quot;&quot;;[.E150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0]&lt;&gt;&quot;&quot;;[.E1510]&lt;&gt;&quot;&quot;);&quot;Brak Przerwy&quot;;IF(OR([.D1510]&lt;&gt;&quot;&quot;;[.E151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1]&lt;&gt;&quot;&quot;;[.E1511]&lt;&gt;&quot;&quot;);&quot;Brak Przerwy&quot;;IF(OR([.D1511]&lt;&gt;&quot;&quot;;[.E151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2]&lt;&gt;&quot;&quot;;[.E1512]&lt;&gt;&quot;&quot;);&quot;Brak Przerwy&quot;;IF(OR([.D1512]&lt;&gt;&quot;&quot;;[.E151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3]&lt;&gt;&quot;&quot;;[.E1513]&lt;&gt;&quot;&quot;);&quot;Brak Przerwy&quot;;IF(OR([.D1513]&lt;&gt;&quot;&quot;;[.E151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4]&lt;&gt;&quot;&quot;;[.E1514]&lt;&gt;&quot;&quot;);&quot;Brak Przerwy&quot;;IF(OR([.D1514]&lt;&gt;&quot;&quot;;[.E151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5]&lt;&gt;&quot;&quot;;[.E1515]&lt;&gt;&quot;&quot;);&quot;Brak Przerwy&quot;;IF(OR([.D1515]&lt;&gt;&quot;&quot;;[.E151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6]&lt;&gt;&quot;&quot;;[.E1516]&lt;&gt;&quot;&quot;);&quot;Brak Przerwy&quot;;IF(OR([.D1516]&lt;&gt;&quot;&quot;;[.E151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7]&lt;&gt;&quot;&quot;;[.E1517]&lt;&gt;&quot;&quot;);&quot;Brak Przerwy&quot;;IF(OR([.D1517]&lt;&gt;&quot;&quot;;[.E151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8]&lt;&gt;&quot;&quot;;[.E1518]&lt;&gt;&quot;&quot;);&quot;Brak Przerwy&quot;;IF(OR([.D1518]&lt;&gt;&quot;&quot;;[.E151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19]&lt;&gt;&quot;&quot;;[.E1519]&lt;&gt;&quot;&quot;);&quot;Brak Przerwy&quot;;IF(OR([.D1519]&lt;&gt;&quot;&quot;;[.E151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0]&lt;&gt;&quot;&quot;;[.E1520]&lt;&gt;&quot;&quot;);&quot;Brak Przerwy&quot;;IF(OR([.D1520]&lt;&gt;&quot;&quot;;[.E152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1]&lt;&gt;&quot;&quot;;[.E1521]&lt;&gt;&quot;&quot;);&quot;Brak Przerwy&quot;;IF(OR([.D1521]&lt;&gt;&quot;&quot;;[.E152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2]&lt;&gt;&quot;&quot;;[.E1522]&lt;&gt;&quot;&quot;);&quot;Brak Przerwy&quot;;IF(OR([.D1522]&lt;&gt;&quot;&quot;;[.E152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3]&lt;&gt;&quot;&quot;;[.E1523]&lt;&gt;&quot;&quot;);&quot;Brak Przerwy&quot;;IF(OR([.D1523]&lt;&gt;&quot;&quot;;[.E152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4]&lt;&gt;&quot;&quot;;[.E1524]&lt;&gt;&quot;&quot;);&quot;Brak Przerwy&quot;;IF(OR([.D1524]&lt;&gt;&quot;&quot;;[.E152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5]&lt;&gt;&quot;&quot;;[.E1525]&lt;&gt;&quot;&quot;);&quot;Brak Przerwy&quot;;IF(OR([.D1525]&lt;&gt;&quot;&quot;;[.E152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6]&lt;&gt;&quot;&quot;;[.E1526]&lt;&gt;&quot;&quot;);&quot;Brak Przerwy&quot;;IF(OR([.D1526]&lt;&gt;&quot;&quot;;[.E152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7]&lt;&gt;&quot;&quot;;[.E1527]&lt;&gt;&quot;&quot;);&quot;Brak Przerwy&quot;;IF(OR([.D1527]&lt;&gt;&quot;&quot;;[.E152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8]&lt;&gt;&quot;&quot;;[.E1528]&lt;&gt;&quot;&quot;);&quot;Brak Przerwy&quot;;IF(OR([.D1528]&lt;&gt;&quot;&quot;;[.E152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29]&lt;&gt;&quot;&quot;;[.E1529]&lt;&gt;&quot;&quot;);&quot;Brak Przerwy&quot;;IF(OR([.D1529]&lt;&gt;&quot;&quot;;[.E152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0]&lt;&gt;&quot;&quot;;[.E1530]&lt;&gt;&quot;&quot;);&quot;Brak Przerwy&quot;;IF(OR([.D1530]&lt;&gt;&quot;&quot;;[.E153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1]&lt;&gt;&quot;&quot;;[.E1531]&lt;&gt;&quot;&quot;);&quot;Brak Przerwy&quot;;IF(OR([.D1531]&lt;&gt;&quot;&quot;;[.E153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2]&lt;&gt;&quot;&quot;;[.E1532]&lt;&gt;&quot;&quot;);&quot;Brak Przerwy&quot;;IF(OR([.D1532]&lt;&gt;&quot;&quot;;[.E153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3]&lt;&gt;&quot;&quot;;[.E1533]&lt;&gt;&quot;&quot;);&quot;Brak Przerwy&quot;;IF(OR([.D1533]&lt;&gt;&quot;&quot;;[.E153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4]&lt;&gt;&quot;&quot;;[.E1534]&lt;&gt;&quot;&quot;);&quot;Brak Przerwy&quot;;IF(OR([.D1534]&lt;&gt;&quot;&quot;;[.E153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5]&lt;&gt;&quot;&quot;;[.E1535]&lt;&gt;&quot;&quot;);&quot;Brak Przerwy&quot;;IF(OR([.D1535]&lt;&gt;&quot;&quot;;[.E153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6]&lt;&gt;&quot;&quot;;[.E1536]&lt;&gt;&quot;&quot;);&quot;Brak Przerwy&quot;;IF(OR([.D1536]&lt;&gt;&quot;&quot;;[.E153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7]&lt;&gt;&quot;&quot;;[.E1537]&lt;&gt;&quot;&quot;);&quot;Brak Przerwy&quot;;IF(OR([.D1537]&lt;&gt;&quot;&quot;;[.E153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8]&lt;&gt;&quot;&quot;;[.E1538]&lt;&gt;&quot;&quot;);&quot;Brak Przerwy&quot;;IF(OR([.D1538]&lt;&gt;&quot;&quot;;[.E153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39]&lt;&gt;&quot;&quot;;[.E1539]&lt;&gt;&quot;&quot;);&quot;Brak Przerwy&quot;;IF(OR([.D1539]&lt;&gt;&quot;&quot;;[.E153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0]&lt;&gt;&quot;&quot;;[.E1540]&lt;&gt;&quot;&quot;);&quot;Brak Przerwy&quot;;IF(OR([.D1540]&lt;&gt;&quot;&quot;;[.E154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1]&lt;&gt;&quot;&quot;;[.E1541]&lt;&gt;&quot;&quot;);&quot;Brak Przerwy&quot;;IF(OR([.D1541]&lt;&gt;&quot;&quot;;[.E154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2]&lt;&gt;&quot;&quot;;[.E1542]&lt;&gt;&quot;&quot;);&quot;Brak Przerwy&quot;;IF(OR([.D1542]&lt;&gt;&quot;&quot;;[.E154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3]&lt;&gt;&quot;&quot;;[.E1543]&lt;&gt;&quot;&quot;);&quot;Brak Przerwy&quot;;IF(OR([.D1543]&lt;&gt;&quot;&quot;;[.E154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4]&lt;&gt;&quot;&quot;;[.E1544]&lt;&gt;&quot;&quot;);&quot;Brak Przerwy&quot;;IF(OR([.D1544]&lt;&gt;&quot;&quot;;[.E154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5]&lt;&gt;&quot;&quot;;[.E1545]&lt;&gt;&quot;&quot;);&quot;Brak Przerwy&quot;;IF(OR([.D1545]&lt;&gt;&quot;&quot;;[.E154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6]&lt;&gt;&quot;&quot;;[.E1546]&lt;&gt;&quot;&quot;);&quot;Brak Przerwy&quot;;IF(OR([.D1546]&lt;&gt;&quot;&quot;;[.E154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7]&lt;&gt;&quot;&quot;;[.E1547]&lt;&gt;&quot;&quot;);&quot;Brak Przerwy&quot;;IF(OR([.D1547]&lt;&gt;&quot;&quot;;[.E154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8]&lt;&gt;&quot;&quot;;[.E1548]&lt;&gt;&quot;&quot;);&quot;Brak Przerwy&quot;;IF(OR([.D1548]&lt;&gt;&quot;&quot;;[.E154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49]&lt;&gt;&quot;&quot;;[.E1549]&lt;&gt;&quot;&quot;);&quot;Brak Przerwy&quot;;IF(OR([.D1549]&lt;&gt;&quot;&quot;;[.E154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0]&lt;&gt;&quot;&quot;;[.E1550]&lt;&gt;&quot;&quot;);&quot;Brak Przerwy&quot;;IF(OR([.D1550]&lt;&gt;&quot;&quot;;[.E155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1]&lt;&gt;&quot;&quot;;[.E1551]&lt;&gt;&quot;&quot;);&quot;Brak Przerwy&quot;;IF(OR([.D1551]&lt;&gt;&quot;&quot;;[.E155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2]&lt;&gt;&quot;&quot;;[.E1552]&lt;&gt;&quot;&quot;);&quot;Brak Przerwy&quot;;IF(OR([.D1552]&lt;&gt;&quot;&quot;;[.E155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3]&lt;&gt;&quot;&quot;;[.E1553]&lt;&gt;&quot;&quot;);&quot;Brak Przerwy&quot;;IF(OR([.D1553]&lt;&gt;&quot;&quot;;[.E155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4]&lt;&gt;&quot;&quot;;[.E1554]&lt;&gt;&quot;&quot;);&quot;Brak Przerwy&quot;;IF(OR([.D1554]&lt;&gt;&quot;&quot;;[.E155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5]&lt;&gt;&quot;&quot;;[.E1555]&lt;&gt;&quot;&quot;);&quot;Brak Przerwy&quot;;IF(OR([.D1555]&lt;&gt;&quot;&quot;;[.E155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6]&lt;&gt;&quot;&quot;;[.E1556]&lt;&gt;&quot;&quot;);&quot;Brak Przerwy&quot;;IF(OR([.D1556]&lt;&gt;&quot;&quot;;[.E155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7]&lt;&gt;&quot;&quot;;[.E1557]&lt;&gt;&quot;&quot;);&quot;Brak Przerwy&quot;;IF(OR([.D1557]&lt;&gt;&quot;&quot;;[.E155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8]&lt;&gt;&quot;&quot;;[.E1558]&lt;&gt;&quot;&quot;);&quot;Brak Przerwy&quot;;IF(OR([.D1558]&lt;&gt;&quot;&quot;;[.E155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59]&lt;&gt;&quot;&quot;;[.E1559]&lt;&gt;&quot;&quot;);&quot;Brak Przerwy&quot;;IF(OR([.D1559]&lt;&gt;&quot;&quot;;[.E155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0]&lt;&gt;&quot;&quot;;[.E1560]&lt;&gt;&quot;&quot;);&quot;Brak Przerwy&quot;;IF(OR([.D1560]&lt;&gt;&quot;&quot;;[.E156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1]&lt;&gt;&quot;&quot;;[.E1561]&lt;&gt;&quot;&quot;);&quot;Brak Przerwy&quot;;IF(OR([.D1561]&lt;&gt;&quot;&quot;;[.E156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2]&lt;&gt;&quot;&quot;;[.E1562]&lt;&gt;&quot;&quot;);&quot;Brak Przerwy&quot;;IF(OR([.D1562]&lt;&gt;&quot;&quot;;[.E156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3]&lt;&gt;&quot;&quot;;[.E1563]&lt;&gt;&quot;&quot;);&quot;Brak Przerwy&quot;;IF(OR([.D1563]&lt;&gt;&quot;&quot;;[.E156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4]&lt;&gt;&quot;&quot;;[.E1564]&lt;&gt;&quot;&quot;);&quot;Brak Przerwy&quot;;IF(OR([.D1564]&lt;&gt;&quot;&quot;;[.E156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5]&lt;&gt;&quot;&quot;;[.E1565]&lt;&gt;&quot;&quot;);&quot;Brak Przerwy&quot;;IF(OR([.D1565]&lt;&gt;&quot;&quot;;[.E156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6]&lt;&gt;&quot;&quot;;[.E1566]&lt;&gt;&quot;&quot;);&quot;Brak Przerwy&quot;;IF(OR([.D1566]&lt;&gt;&quot;&quot;;[.E156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7]&lt;&gt;&quot;&quot;;[.E1567]&lt;&gt;&quot;&quot;);&quot;Brak Przerwy&quot;;IF(OR([.D1567]&lt;&gt;&quot;&quot;;[.E156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8]&lt;&gt;&quot;&quot;;[.E1568]&lt;&gt;&quot;&quot;);&quot;Brak Przerwy&quot;;IF(OR([.D1568]&lt;&gt;&quot;&quot;;[.E156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69]&lt;&gt;&quot;&quot;;[.E1569]&lt;&gt;&quot;&quot;);&quot;Brak Przerwy&quot;;IF(OR([.D1569]&lt;&gt;&quot;&quot;;[.E156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0]&lt;&gt;&quot;&quot;;[.E1570]&lt;&gt;&quot;&quot;);&quot;Brak Przerwy&quot;;IF(OR([.D1570]&lt;&gt;&quot;&quot;;[.E157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1]&lt;&gt;&quot;&quot;;[.E1571]&lt;&gt;&quot;&quot;);&quot;Brak Przerwy&quot;;IF(OR([.D1571]&lt;&gt;&quot;&quot;;[.E157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2]&lt;&gt;&quot;&quot;;[.E1572]&lt;&gt;&quot;&quot;);&quot;Brak Przerwy&quot;;IF(OR([.D1572]&lt;&gt;&quot;&quot;;[.E157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3]&lt;&gt;&quot;&quot;;[.E1573]&lt;&gt;&quot;&quot;);&quot;Brak Przerwy&quot;;IF(OR([.D1573]&lt;&gt;&quot;&quot;;[.E157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4]&lt;&gt;&quot;&quot;;[.E1574]&lt;&gt;&quot;&quot;);&quot;Brak Przerwy&quot;;IF(OR([.D1574]&lt;&gt;&quot;&quot;;[.E157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5]&lt;&gt;&quot;&quot;;[.E1575]&lt;&gt;&quot;&quot;);&quot;Brak Przerwy&quot;;IF(OR([.D1575]&lt;&gt;&quot;&quot;;[.E157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6]&lt;&gt;&quot;&quot;;[.E1576]&lt;&gt;&quot;&quot;);&quot;Brak Przerwy&quot;;IF(OR([.D1576]&lt;&gt;&quot;&quot;;[.E157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7]&lt;&gt;&quot;&quot;;[.E1577]&lt;&gt;&quot;&quot;);&quot;Brak Przerwy&quot;;IF(OR([.D1577]&lt;&gt;&quot;&quot;;[.E157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8]&lt;&gt;&quot;&quot;;[.E1578]&lt;&gt;&quot;&quot;);&quot;Brak Przerwy&quot;;IF(OR([.D1578]&lt;&gt;&quot;&quot;;[.E157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79]&lt;&gt;&quot;&quot;;[.E1579]&lt;&gt;&quot;&quot;);&quot;Brak Przerwy&quot;;IF(OR([.D1579]&lt;&gt;&quot;&quot;;[.E157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0]&lt;&gt;&quot;&quot;;[.E1580]&lt;&gt;&quot;&quot;);&quot;Brak Przerwy&quot;;IF(OR([.D1580]&lt;&gt;&quot;&quot;;[.E158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1]&lt;&gt;&quot;&quot;;[.E1581]&lt;&gt;&quot;&quot;);&quot;Brak Przerwy&quot;;IF(OR([.D1581]&lt;&gt;&quot;&quot;;[.E158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2]&lt;&gt;&quot;&quot;;[.E1582]&lt;&gt;&quot;&quot;);&quot;Brak Przerwy&quot;;IF(OR([.D1582]&lt;&gt;&quot;&quot;;[.E158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3]&lt;&gt;&quot;&quot;;[.E1583]&lt;&gt;&quot;&quot;);&quot;Brak Przerwy&quot;;IF(OR([.D1583]&lt;&gt;&quot;&quot;;[.E158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4]&lt;&gt;&quot;&quot;;[.E1584]&lt;&gt;&quot;&quot;);&quot;Brak Przerwy&quot;;IF(OR([.D1584]&lt;&gt;&quot;&quot;;[.E158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5]&lt;&gt;&quot;&quot;;[.E1585]&lt;&gt;&quot;&quot;);&quot;Brak Przerwy&quot;;IF(OR([.D1585]&lt;&gt;&quot;&quot;;[.E158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6]&lt;&gt;&quot;&quot;;[.E1586]&lt;&gt;&quot;&quot;);&quot;Brak Przerwy&quot;;IF(OR([.D1586]&lt;&gt;&quot;&quot;;[.E158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7]&lt;&gt;&quot;&quot;;[.E1587]&lt;&gt;&quot;&quot;);&quot;Brak Przerwy&quot;;IF(OR([.D1587]&lt;&gt;&quot;&quot;;[.E158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8]&lt;&gt;&quot;&quot;;[.E1588]&lt;&gt;&quot;&quot;);&quot;Brak Przerwy&quot;;IF(OR([.D1588]&lt;&gt;&quot;&quot;;[.E158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89]&lt;&gt;&quot;&quot;;[.E1589]&lt;&gt;&quot;&quot;);&quot;Brak Przerwy&quot;;IF(OR([.D1589]&lt;&gt;&quot;&quot;;[.E158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0]&lt;&gt;&quot;&quot;;[.E1590]&lt;&gt;&quot;&quot;);&quot;Brak Przerwy&quot;;IF(OR([.D1590]&lt;&gt;&quot;&quot;;[.E159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1]&lt;&gt;&quot;&quot;;[.E1591]&lt;&gt;&quot;&quot;);&quot;Brak Przerwy&quot;;IF(OR([.D1591]&lt;&gt;&quot;&quot;;[.E159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2]&lt;&gt;&quot;&quot;;[.E1592]&lt;&gt;&quot;&quot;);&quot;Brak Przerwy&quot;;IF(OR([.D1592]&lt;&gt;&quot;&quot;;[.E159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3]&lt;&gt;&quot;&quot;;[.E1593]&lt;&gt;&quot;&quot;);&quot;Brak Przerwy&quot;;IF(OR([.D1593]&lt;&gt;&quot;&quot;;[.E159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4]&lt;&gt;&quot;&quot;;[.E1594]&lt;&gt;&quot;&quot;);&quot;Brak Przerwy&quot;;IF(OR([.D1594]&lt;&gt;&quot;&quot;;[.E159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5]&lt;&gt;&quot;&quot;;[.E1595]&lt;&gt;&quot;&quot;);&quot;Brak Przerwy&quot;;IF(OR([.D1595]&lt;&gt;&quot;&quot;;[.E159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6]&lt;&gt;&quot;&quot;;[.E1596]&lt;&gt;&quot;&quot;);&quot;Brak Przerwy&quot;;IF(OR([.D1596]&lt;&gt;&quot;&quot;;[.E159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7]&lt;&gt;&quot;&quot;;[.E1597]&lt;&gt;&quot;&quot;);&quot;Brak Przerwy&quot;;IF(OR([.D1597]&lt;&gt;&quot;&quot;;[.E159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8]&lt;&gt;&quot;&quot;;[.E1598]&lt;&gt;&quot;&quot;);&quot;Brak Przerwy&quot;;IF(OR([.D1598]&lt;&gt;&quot;&quot;;[.E159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599]&lt;&gt;&quot;&quot;;[.E1599]&lt;&gt;&quot;&quot;);&quot;Brak Przerwy&quot;;IF(OR([.D1599]&lt;&gt;&quot;&quot;;[.E159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0]&lt;&gt;&quot;&quot;;[.E1600]&lt;&gt;&quot;&quot;);&quot;Brak Przerwy&quot;;IF(OR([.D1600]&lt;&gt;&quot;&quot;;[.E160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1]&lt;&gt;&quot;&quot;;[.E1601]&lt;&gt;&quot;&quot;);&quot;Brak Przerwy&quot;;IF(OR([.D1601]&lt;&gt;&quot;&quot;;[.E160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2]&lt;&gt;&quot;&quot;;[.E1602]&lt;&gt;&quot;&quot;);&quot;Brak Przerwy&quot;;IF(OR([.D1602]&lt;&gt;&quot;&quot;;[.E160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3]&lt;&gt;&quot;&quot;;[.E1603]&lt;&gt;&quot;&quot;);&quot;Brak Przerwy&quot;;IF(OR([.D1603]&lt;&gt;&quot;&quot;;[.E160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4]&lt;&gt;&quot;&quot;;[.E1604]&lt;&gt;&quot;&quot;);&quot;Brak Przerwy&quot;;IF(OR([.D1604]&lt;&gt;&quot;&quot;;[.E160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5]&lt;&gt;&quot;&quot;;[.E1605]&lt;&gt;&quot;&quot;);&quot;Brak Przerwy&quot;;IF(OR([.D1605]&lt;&gt;&quot;&quot;;[.E160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6]&lt;&gt;&quot;&quot;;[.E1606]&lt;&gt;&quot;&quot;);&quot;Brak Przerwy&quot;;IF(OR([.D1606]&lt;&gt;&quot;&quot;;[.E160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7]&lt;&gt;&quot;&quot;;[.E1607]&lt;&gt;&quot;&quot;);&quot;Brak Przerwy&quot;;IF(OR([.D1607]&lt;&gt;&quot;&quot;;[.E160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8]&lt;&gt;&quot;&quot;;[.E1608]&lt;&gt;&quot;&quot;);&quot;Brak Przerwy&quot;;IF(OR([.D1608]&lt;&gt;&quot;&quot;;[.E160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09]&lt;&gt;&quot;&quot;;[.E1609]&lt;&gt;&quot;&quot;);&quot;Brak Przerwy&quot;;IF(OR([.D1609]&lt;&gt;&quot;&quot;;[.E160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0]&lt;&gt;&quot;&quot;;[.E1610]&lt;&gt;&quot;&quot;);&quot;Brak Przerwy&quot;;IF(OR([.D1610]&lt;&gt;&quot;&quot;;[.E161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1]&lt;&gt;&quot;&quot;;[.E1611]&lt;&gt;&quot;&quot;);&quot;Brak Przerwy&quot;;IF(OR([.D1611]&lt;&gt;&quot;&quot;;[.E161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2]&lt;&gt;&quot;&quot;;[.E1612]&lt;&gt;&quot;&quot;);&quot;Brak Przerwy&quot;;IF(OR([.D1612]&lt;&gt;&quot;&quot;;[.E161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3]&lt;&gt;&quot;&quot;;[.E1613]&lt;&gt;&quot;&quot;);&quot;Brak Przerwy&quot;;IF(OR([.D1613]&lt;&gt;&quot;&quot;;[.E161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4]&lt;&gt;&quot;&quot;;[.E1614]&lt;&gt;&quot;&quot;);&quot;Brak Przerwy&quot;;IF(OR([.D1614]&lt;&gt;&quot;&quot;;[.E161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5]&lt;&gt;&quot;&quot;;[.E1615]&lt;&gt;&quot;&quot;);&quot;Brak Przerwy&quot;;IF(OR([.D1615]&lt;&gt;&quot;&quot;;[.E161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6]&lt;&gt;&quot;&quot;;[.E1616]&lt;&gt;&quot;&quot;);&quot;Brak Przerwy&quot;;IF(OR([.D1616]&lt;&gt;&quot;&quot;;[.E161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7]&lt;&gt;&quot;&quot;;[.E1617]&lt;&gt;&quot;&quot;);&quot;Brak Przerwy&quot;;IF(OR([.D1617]&lt;&gt;&quot;&quot;;[.E161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8]&lt;&gt;&quot;&quot;;[.E1618]&lt;&gt;&quot;&quot;);&quot;Brak Przerwy&quot;;IF(OR([.D1618]&lt;&gt;&quot;&quot;;[.E161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19]&lt;&gt;&quot;&quot;;[.E1619]&lt;&gt;&quot;&quot;);&quot;Brak Przerwy&quot;;IF(OR([.D1619]&lt;&gt;&quot;&quot;;[.E161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0]&lt;&gt;&quot;&quot;;[.E1620]&lt;&gt;&quot;&quot;);&quot;Brak Przerwy&quot;;IF(OR([.D1620]&lt;&gt;&quot;&quot;;[.E162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1]&lt;&gt;&quot;&quot;;[.E1621]&lt;&gt;&quot;&quot;);&quot;Brak Przerwy&quot;;IF(OR([.D1621]&lt;&gt;&quot;&quot;;[.E162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2]&lt;&gt;&quot;&quot;;[.E1622]&lt;&gt;&quot;&quot;);&quot;Brak Przerwy&quot;;IF(OR([.D1622]&lt;&gt;&quot;&quot;;[.E162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3]&lt;&gt;&quot;&quot;;[.E1623]&lt;&gt;&quot;&quot;);&quot;Brak Przerwy&quot;;IF(OR([.D1623]&lt;&gt;&quot;&quot;;[.E162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4]&lt;&gt;&quot;&quot;;[.E1624]&lt;&gt;&quot;&quot;);&quot;Brak Przerwy&quot;;IF(OR([.D1624]&lt;&gt;&quot;&quot;;[.E162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5]&lt;&gt;&quot;&quot;;[.E1625]&lt;&gt;&quot;&quot;);&quot;Brak Przerwy&quot;;IF(OR([.D1625]&lt;&gt;&quot;&quot;;[.E162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6]&lt;&gt;&quot;&quot;;[.E1626]&lt;&gt;&quot;&quot;);&quot;Brak Przerwy&quot;;IF(OR([.D1626]&lt;&gt;&quot;&quot;;[.E162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7]&lt;&gt;&quot;&quot;;[.E1627]&lt;&gt;&quot;&quot;);&quot;Brak Przerwy&quot;;IF(OR([.D1627]&lt;&gt;&quot;&quot;;[.E162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8]&lt;&gt;&quot;&quot;;[.E1628]&lt;&gt;&quot;&quot;);&quot;Brak Przerwy&quot;;IF(OR([.D1628]&lt;&gt;&quot;&quot;;[.E162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29]&lt;&gt;&quot;&quot;;[.E1629]&lt;&gt;&quot;&quot;);&quot;Brak Przerwy&quot;;IF(OR([.D1629]&lt;&gt;&quot;&quot;;[.E162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0]&lt;&gt;&quot;&quot;;[.E1630]&lt;&gt;&quot;&quot;);&quot;Brak Przerwy&quot;;IF(OR([.D1630]&lt;&gt;&quot;&quot;;[.E163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1]&lt;&gt;&quot;&quot;;[.E1631]&lt;&gt;&quot;&quot;);&quot;Brak Przerwy&quot;;IF(OR([.D1631]&lt;&gt;&quot;&quot;;[.E163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2]&lt;&gt;&quot;&quot;;[.E1632]&lt;&gt;&quot;&quot;);&quot;Brak Przerwy&quot;;IF(OR([.D1632]&lt;&gt;&quot;&quot;;[.E163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3]&lt;&gt;&quot;&quot;;[.E1633]&lt;&gt;&quot;&quot;);&quot;Brak Przerwy&quot;;IF(OR([.D1633]&lt;&gt;&quot;&quot;;[.E163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4]&lt;&gt;&quot;&quot;;[.E1634]&lt;&gt;&quot;&quot;);&quot;Brak Przerwy&quot;;IF(OR([.D1634]&lt;&gt;&quot;&quot;;[.E163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5]&lt;&gt;&quot;&quot;;[.E1635]&lt;&gt;&quot;&quot;);&quot;Brak Przerwy&quot;;IF(OR([.D1635]&lt;&gt;&quot;&quot;;[.E163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6]&lt;&gt;&quot;&quot;;[.E1636]&lt;&gt;&quot;&quot;);&quot;Brak Przerwy&quot;;IF(OR([.D1636]&lt;&gt;&quot;&quot;;[.E163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7]&lt;&gt;&quot;&quot;;[.E1637]&lt;&gt;&quot;&quot;);&quot;Brak Przerwy&quot;;IF(OR([.D1637]&lt;&gt;&quot;&quot;;[.E163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8]&lt;&gt;&quot;&quot;;[.E1638]&lt;&gt;&quot;&quot;);&quot;Brak Przerwy&quot;;IF(OR([.D1638]&lt;&gt;&quot;&quot;;[.E163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39]&lt;&gt;&quot;&quot;;[.E1639]&lt;&gt;&quot;&quot;);&quot;Brak Przerwy&quot;;IF(OR([.D1639]&lt;&gt;&quot;&quot;;[.E163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0]&lt;&gt;&quot;&quot;;[.E1640]&lt;&gt;&quot;&quot;);&quot;Brak Przerwy&quot;;IF(OR([.D1640]&lt;&gt;&quot;&quot;;[.E164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1]&lt;&gt;&quot;&quot;;[.E1641]&lt;&gt;&quot;&quot;);&quot;Brak Przerwy&quot;;IF(OR([.D1641]&lt;&gt;&quot;&quot;;[.E164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2]&lt;&gt;&quot;&quot;;[.E1642]&lt;&gt;&quot;&quot;);&quot;Brak Przerwy&quot;;IF(OR([.D1642]&lt;&gt;&quot;&quot;;[.E164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3]&lt;&gt;&quot;&quot;;[.E1643]&lt;&gt;&quot;&quot;);&quot;Brak Przerwy&quot;;IF(OR([.D1643]&lt;&gt;&quot;&quot;;[.E164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4]&lt;&gt;&quot;&quot;;[.E1644]&lt;&gt;&quot;&quot;);&quot;Brak Przerwy&quot;;IF(OR([.D1644]&lt;&gt;&quot;&quot;;[.E164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5]&lt;&gt;&quot;&quot;;[.E1645]&lt;&gt;&quot;&quot;);&quot;Brak Przerwy&quot;;IF(OR([.D1645]&lt;&gt;&quot;&quot;;[.E164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6]&lt;&gt;&quot;&quot;;[.E1646]&lt;&gt;&quot;&quot;);&quot;Brak Przerwy&quot;;IF(OR([.D1646]&lt;&gt;&quot;&quot;;[.E164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7]&lt;&gt;&quot;&quot;;[.E1647]&lt;&gt;&quot;&quot;);&quot;Brak Przerwy&quot;;IF(OR([.D1647]&lt;&gt;&quot;&quot;;[.E164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8]&lt;&gt;&quot;&quot;;[.E1648]&lt;&gt;&quot;&quot;);&quot;Brak Przerwy&quot;;IF(OR([.D1648]&lt;&gt;&quot;&quot;;[.E164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49]&lt;&gt;&quot;&quot;;[.E1649]&lt;&gt;&quot;&quot;);&quot;Brak Przerwy&quot;;IF(OR([.D1649]&lt;&gt;&quot;&quot;;[.E164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0]&lt;&gt;&quot;&quot;;[.E1650]&lt;&gt;&quot;&quot;);&quot;Brak Przerwy&quot;;IF(OR([.D1650]&lt;&gt;&quot;&quot;;[.E165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1]&lt;&gt;&quot;&quot;;[.E1651]&lt;&gt;&quot;&quot;);&quot;Brak Przerwy&quot;;IF(OR([.D1651]&lt;&gt;&quot;&quot;;[.E165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2]&lt;&gt;&quot;&quot;;[.E1652]&lt;&gt;&quot;&quot;);&quot;Brak Przerwy&quot;;IF(OR([.D1652]&lt;&gt;&quot;&quot;;[.E165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3]&lt;&gt;&quot;&quot;;[.E1653]&lt;&gt;&quot;&quot;);&quot;Brak Przerwy&quot;;IF(OR([.D1653]&lt;&gt;&quot;&quot;;[.E165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4]&lt;&gt;&quot;&quot;;[.E1654]&lt;&gt;&quot;&quot;);&quot;Brak Przerwy&quot;;IF(OR([.D1654]&lt;&gt;&quot;&quot;;[.E165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5]&lt;&gt;&quot;&quot;;[.E1655]&lt;&gt;&quot;&quot;);&quot;Brak Przerwy&quot;;IF(OR([.D1655]&lt;&gt;&quot;&quot;;[.E165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6]&lt;&gt;&quot;&quot;;[.E1656]&lt;&gt;&quot;&quot;);&quot;Brak Przerwy&quot;;IF(OR([.D1656]&lt;&gt;&quot;&quot;;[.E165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7]&lt;&gt;&quot;&quot;;[.E1657]&lt;&gt;&quot;&quot;);&quot;Brak Przerwy&quot;;IF(OR([.D1657]&lt;&gt;&quot;&quot;;[.E165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8]&lt;&gt;&quot;&quot;;[.E1658]&lt;&gt;&quot;&quot;);&quot;Brak Przerwy&quot;;IF(OR([.D1658]&lt;&gt;&quot;&quot;;[.E165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59]&lt;&gt;&quot;&quot;;[.E1659]&lt;&gt;&quot;&quot;);&quot;Brak Przerwy&quot;;IF(OR([.D1659]&lt;&gt;&quot;&quot;;[.E165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0]&lt;&gt;&quot;&quot;;[.E1660]&lt;&gt;&quot;&quot;);&quot;Brak Przerwy&quot;;IF(OR([.D1660]&lt;&gt;&quot;&quot;;[.E166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1]&lt;&gt;&quot;&quot;;[.E1661]&lt;&gt;&quot;&quot;);&quot;Brak Przerwy&quot;;IF(OR([.D1661]&lt;&gt;&quot;&quot;;[.E166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2]&lt;&gt;&quot;&quot;;[.E1662]&lt;&gt;&quot;&quot;);&quot;Brak Przerwy&quot;;IF(OR([.D1662]&lt;&gt;&quot;&quot;;[.E166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3]&lt;&gt;&quot;&quot;;[.E1663]&lt;&gt;&quot;&quot;);&quot;Brak Przerwy&quot;;IF(OR([.D1663]&lt;&gt;&quot;&quot;;[.E166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4]&lt;&gt;&quot;&quot;;[.E1664]&lt;&gt;&quot;&quot;);&quot;Brak Przerwy&quot;;IF(OR([.D1664]&lt;&gt;&quot;&quot;;[.E166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5]&lt;&gt;&quot;&quot;;[.E1665]&lt;&gt;&quot;&quot;);&quot;Brak Przerwy&quot;;IF(OR([.D1665]&lt;&gt;&quot;&quot;;[.E166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6]&lt;&gt;&quot;&quot;;[.E1666]&lt;&gt;&quot;&quot;);&quot;Brak Przerwy&quot;;IF(OR([.D1666]&lt;&gt;&quot;&quot;;[.E166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7]&lt;&gt;&quot;&quot;;[.E1667]&lt;&gt;&quot;&quot;);&quot;Brak Przerwy&quot;;IF(OR([.D1667]&lt;&gt;&quot;&quot;;[.E166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8]&lt;&gt;&quot;&quot;;[.E1668]&lt;&gt;&quot;&quot;);&quot;Brak Przerwy&quot;;IF(OR([.D1668]&lt;&gt;&quot;&quot;;[.E166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69]&lt;&gt;&quot;&quot;;[.E1669]&lt;&gt;&quot;&quot;);&quot;Brak Przerwy&quot;;IF(OR([.D1669]&lt;&gt;&quot;&quot;;[.E166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0]&lt;&gt;&quot;&quot;;[.E1670]&lt;&gt;&quot;&quot;);&quot;Brak Przerwy&quot;;IF(OR([.D1670]&lt;&gt;&quot;&quot;;[.E167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1]&lt;&gt;&quot;&quot;;[.E1671]&lt;&gt;&quot;&quot;);&quot;Brak Przerwy&quot;;IF(OR([.D1671]&lt;&gt;&quot;&quot;;[.E167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2]&lt;&gt;&quot;&quot;;[.E1672]&lt;&gt;&quot;&quot;);&quot;Brak Przerwy&quot;;IF(OR([.D1672]&lt;&gt;&quot;&quot;;[.E167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3]&lt;&gt;&quot;&quot;;[.E1673]&lt;&gt;&quot;&quot;);&quot;Brak Przerwy&quot;;IF(OR([.D1673]&lt;&gt;&quot;&quot;;[.E167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4]&lt;&gt;&quot;&quot;;[.E1674]&lt;&gt;&quot;&quot;);&quot;Brak Przerwy&quot;;IF(OR([.D1674]&lt;&gt;&quot;&quot;;[.E167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5]&lt;&gt;&quot;&quot;;[.E1675]&lt;&gt;&quot;&quot;);&quot;Brak Przerwy&quot;;IF(OR([.D1675]&lt;&gt;&quot;&quot;;[.E167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6]&lt;&gt;&quot;&quot;;[.E1676]&lt;&gt;&quot;&quot;);&quot;Brak Przerwy&quot;;IF(OR([.D1676]&lt;&gt;&quot;&quot;;[.E167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7]&lt;&gt;&quot;&quot;;[.E1677]&lt;&gt;&quot;&quot;);&quot;Brak Przerwy&quot;;IF(OR([.D1677]&lt;&gt;&quot;&quot;;[.E167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8]&lt;&gt;&quot;&quot;;[.E1678]&lt;&gt;&quot;&quot;);&quot;Brak Przerwy&quot;;IF(OR([.D1678]&lt;&gt;&quot;&quot;;[.E167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79]&lt;&gt;&quot;&quot;;[.E1679]&lt;&gt;&quot;&quot;);&quot;Brak Przerwy&quot;;IF(OR([.D1679]&lt;&gt;&quot;&quot;;[.E167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0]&lt;&gt;&quot;&quot;;[.E1680]&lt;&gt;&quot;&quot;);&quot;Brak Przerwy&quot;;IF(OR([.D1680]&lt;&gt;&quot;&quot;;[.E168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1]&lt;&gt;&quot;&quot;;[.E1681]&lt;&gt;&quot;&quot;);&quot;Brak Przerwy&quot;;IF(OR([.D1681]&lt;&gt;&quot;&quot;;[.E168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2]&lt;&gt;&quot;&quot;;[.E1682]&lt;&gt;&quot;&quot;);&quot;Brak Przerwy&quot;;IF(OR([.D1682]&lt;&gt;&quot;&quot;;[.E168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3]&lt;&gt;&quot;&quot;;[.E1683]&lt;&gt;&quot;&quot;);&quot;Brak Przerwy&quot;;IF(OR([.D1683]&lt;&gt;&quot;&quot;;[.E168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4]&lt;&gt;&quot;&quot;;[.E1684]&lt;&gt;&quot;&quot;);&quot;Brak Przerwy&quot;;IF(OR([.D1684]&lt;&gt;&quot;&quot;;[.E168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5]&lt;&gt;&quot;&quot;;[.E1685]&lt;&gt;&quot;&quot;);&quot;Brak Przerwy&quot;;IF(OR([.D1685]&lt;&gt;&quot;&quot;;[.E168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6]&lt;&gt;&quot;&quot;;[.E1686]&lt;&gt;&quot;&quot;);&quot;Brak Przerwy&quot;;IF(OR([.D1686]&lt;&gt;&quot;&quot;;[.E168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7]&lt;&gt;&quot;&quot;;[.E1687]&lt;&gt;&quot;&quot;);&quot;Brak Przerwy&quot;;IF(OR([.D1687]&lt;&gt;&quot;&quot;;[.E168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8]&lt;&gt;&quot;&quot;;[.E1688]&lt;&gt;&quot;&quot;);&quot;Brak Przerwy&quot;;IF(OR([.D1688]&lt;&gt;&quot;&quot;;[.E168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89]&lt;&gt;&quot;&quot;;[.E1689]&lt;&gt;&quot;&quot;);&quot;Brak Przerwy&quot;;IF(OR([.D1689]&lt;&gt;&quot;&quot;;[.E168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0]&lt;&gt;&quot;&quot;;[.E1690]&lt;&gt;&quot;&quot;);&quot;Brak Przerwy&quot;;IF(OR([.D1690]&lt;&gt;&quot;&quot;;[.E169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1]&lt;&gt;&quot;&quot;;[.E1691]&lt;&gt;&quot;&quot;);&quot;Brak Przerwy&quot;;IF(OR([.D1691]&lt;&gt;&quot;&quot;;[.E169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2]&lt;&gt;&quot;&quot;;[.E1692]&lt;&gt;&quot;&quot;);&quot;Brak Przerwy&quot;;IF(OR([.D1692]&lt;&gt;&quot;&quot;;[.E169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3]&lt;&gt;&quot;&quot;;[.E1693]&lt;&gt;&quot;&quot;);&quot;Brak Przerwy&quot;;IF(OR([.D1693]&lt;&gt;&quot;&quot;;[.E169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4]&lt;&gt;&quot;&quot;;[.E1694]&lt;&gt;&quot;&quot;);&quot;Brak Przerwy&quot;;IF(OR([.D1694]&lt;&gt;&quot;&quot;;[.E169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5]&lt;&gt;&quot;&quot;;[.E1695]&lt;&gt;&quot;&quot;);&quot;Brak Przerwy&quot;;IF(OR([.D1695]&lt;&gt;&quot;&quot;;[.E169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6]&lt;&gt;&quot;&quot;;[.E1696]&lt;&gt;&quot;&quot;);&quot;Brak Przerwy&quot;;IF(OR([.D1696]&lt;&gt;&quot;&quot;;[.E169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7]&lt;&gt;&quot;&quot;;[.E1697]&lt;&gt;&quot;&quot;);&quot;Brak Przerwy&quot;;IF(OR([.D1697]&lt;&gt;&quot;&quot;;[.E169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8]&lt;&gt;&quot;&quot;;[.E1698]&lt;&gt;&quot;&quot;);&quot;Brak Przerwy&quot;;IF(OR([.D1698]&lt;&gt;&quot;&quot;;[.E169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699]&lt;&gt;&quot;&quot;;[.E1699]&lt;&gt;&quot;&quot;);&quot;Brak Przerwy&quot;;IF(OR([.D1699]&lt;&gt;&quot;&quot;;[.E169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0]&lt;&gt;&quot;&quot;;[.E1700]&lt;&gt;&quot;&quot;);&quot;Brak Przerwy&quot;;IF(OR([.D1700]&lt;&gt;&quot;&quot;;[.E170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1]&lt;&gt;&quot;&quot;;[.E1701]&lt;&gt;&quot;&quot;);&quot;Brak Przerwy&quot;;IF(OR([.D1701]&lt;&gt;&quot;&quot;;[.E170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2]&lt;&gt;&quot;&quot;;[.E1702]&lt;&gt;&quot;&quot;);&quot;Brak Przerwy&quot;;IF(OR([.D1702]&lt;&gt;&quot;&quot;;[.E170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3]&lt;&gt;&quot;&quot;;[.E1703]&lt;&gt;&quot;&quot;);&quot;Brak Przerwy&quot;;IF(OR([.D1703]&lt;&gt;&quot;&quot;;[.E170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4]&lt;&gt;&quot;&quot;;[.E1704]&lt;&gt;&quot;&quot;);&quot;Brak Przerwy&quot;;IF(OR([.D1704]&lt;&gt;&quot;&quot;;[.E170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5]&lt;&gt;&quot;&quot;;[.E1705]&lt;&gt;&quot;&quot;);&quot;Brak Przerwy&quot;;IF(OR([.D1705]&lt;&gt;&quot;&quot;;[.E170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6]&lt;&gt;&quot;&quot;;[.E1706]&lt;&gt;&quot;&quot;);&quot;Brak Przerwy&quot;;IF(OR([.D1706]&lt;&gt;&quot;&quot;;[.E170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7]&lt;&gt;&quot;&quot;;[.E1707]&lt;&gt;&quot;&quot;);&quot;Brak Przerwy&quot;;IF(OR([.D1707]&lt;&gt;&quot;&quot;;[.E170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8]&lt;&gt;&quot;&quot;;[.E1708]&lt;&gt;&quot;&quot;);&quot;Brak Przerwy&quot;;IF(OR([.D1708]&lt;&gt;&quot;&quot;;[.E170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09]&lt;&gt;&quot;&quot;;[.E1709]&lt;&gt;&quot;&quot;);&quot;Brak Przerwy&quot;;IF(OR([.D1709]&lt;&gt;&quot;&quot;;[.E170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0]&lt;&gt;&quot;&quot;;[.E1710]&lt;&gt;&quot;&quot;);&quot;Brak Przerwy&quot;;IF(OR([.D1710]&lt;&gt;&quot;&quot;;[.E171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1]&lt;&gt;&quot;&quot;;[.E1711]&lt;&gt;&quot;&quot;);&quot;Brak Przerwy&quot;;IF(OR([.D1711]&lt;&gt;&quot;&quot;;[.E171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2]&lt;&gt;&quot;&quot;;[.E1712]&lt;&gt;&quot;&quot;);&quot;Brak Przerwy&quot;;IF(OR([.D1712]&lt;&gt;&quot;&quot;;[.E171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3]&lt;&gt;&quot;&quot;;[.E1713]&lt;&gt;&quot;&quot;);&quot;Brak Przerwy&quot;;IF(OR([.D1713]&lt;&gt;&quot;&quot;;[.E171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4]&lt;&gt;&quot;&quot;;[.E1714]&lt;&gt;&quot;&quot;);&quot;Brak Przerwy&quot;;IF(OR([.D1714]&lt;&gt;&quot;&quot;;[.E171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5]&lt;&gt;&quot;&quot;;[.E1715]&lt;&gt;&quot;&quot;);&quot;Brak Przerwy&quot;;IF(OR([.D1715]&lt;&gt;&quot;&quot;;[.E171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6]&lt;&gt;&quot;&quot;;[.E1716]&lt;&gt;&quot;&quot;);&quot;Brak Przerwy&quot;;IF(OR([.D1716]&lt;&gt;&quot;&quot;;[.E171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7]&lt;&gt;&quot;&quot;;[.E1717]&lt;&gt;&quot;&quot;);&quot;Brak Przerwy&quot;;IF(OR([.D1717]&lt;&gt;&quot;&quot;;[.E171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8]&lt;&gt;&quot;&quot;;[.E1718]&lt;&gt;&quot;&quot;);&quot;Brak Przerwy&quot;;IF(OR([.D1718]&lt;&gt;&quot;&quot;;[.E171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19]&lt;&gt;&quot;&quot;;[.E1719]&lt;&gt;&quot;&quot;);&quot;Brak Przerwy&quot;;IF(OR([.D1719]&lt;&gt;&quot;&quot;;[.E171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0]&lt;&gt;&quot;&quot;;[.E1720]&lt;&gt;&quot;&quot;);&quot;Brak Przerwy&quot;;IF(OR([.D1720]&lt;&gt;&quot;&quot;;[.E172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1]&lt;&gt;&quot;&quot;;[.E1721]&lt;&gt;&quot;&quot;);&quot;Brak Przerwy&quot;;IF(OR([.D1721]&lt;&gt;&quot;&quot;;[.E172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2]&lt;&gt;&quot;&quot;;[.E1722]&lt;&gt;&quot;&quot;);&quot;Brak Przerwy&quot;;IF(OR([.D1722]&lt;&gt;&quot;&quot;;[.E172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3]&lt;&gt;&quot;&quot;;[.E1723]&lt;&gt;&quot;&quot;);&quot;Brak Przerwy&quot;;IF(OR([.D1723]&lt;&gt;&quot;&quot;;[.E172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4]&lt;&gt;&quot;&quot;;[.E1724]&lt;&gt;&quot;&quot;);&quot;Brak Przerwy&quot;;IF(OR([.D1724]&lt;&gt;&quot;&quot;;[.E172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5]&lt;&gt;&quot;&quot;;[.E1725]&lt;&gt;&quot;&quot;);&quot;Brak Przerwy&quot;;IF(OR([.D1725]&lt;&gt;&quot;&quot;;[.E172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6]&lt;&gt;&quot;&quot;;[.E1726]&lt;&gt;&quot;&quot;);&quot;Brak Przerwy&quot;;IF(OR([.D1726]&lt;&gt;&quot;&quot;;[.E172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7]&lt;&gt;&quot;&quot;;[.E1727]&lt;&gt;&quot;&quot;);&quot;Brak Przerwy&quot;;IF(OR([.D1727]&lt;&gt;&quot;&quot;;[.E172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8]&lt;&gt;&quot;&quot;;[.E1728]&lt;&gt;&quot;&quot;);&quot;Brak Przerwy&quot;;IF(OR([.D1728]&lt;&gt;&quot;&quot;;[.E172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29]&lt;&gt;&quot;&quot;;[.E1729]&lt;&gt;&quot;&quot;);&quot;Brak Przerwy&quot;;IF(OR([.D1729]&lt;&gt;&quot;&quot;;[.E172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0]&lt;&gt;&quot;&quot;;[.E1730]&lt;&gt;&quot;&quot;);&quot;Brak Przerwy&quot;;IF(OR([.D1730]&lt;&gt;&quot;&quot;;[.E173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1]&lt;&gt;&quot;&quot;;[.E1731]&lt;&gt;&quot;&quot;);&quot;Brak Przerwy&quot;;IF(OR([.D1731]&lt;&gt;&quot;&quot;;[.E173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2]&lt;&gt;&quot;&quot;;[.E1732]&lt;&gt;&quot;&quot;);&quot;Brak Przerwy&quot;;IF(OR([.D1732]&lt;&gt;&quot;&quot;;[.E173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3]&lt;&gt;&quot;&quot;;[.E1733]&lt;&gt;&quot;&quot;);&quot;Brak Przerwy&quot;;IF(OR([.D1733]&lt;&gt;&quot;&quot;;[.E173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4]&lt;&gt;&quot;&quot;;[.E1734]&lt;&gt;&quot;&quot;);&quot;Brak Przerwy&quot;;IF(OR([.D1734]&lt;&gt;&quot;&quot;;[.E173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5]&lt;&gt;&quot;&quot;;[.E1735]&lt;&gt;&quot;&quot;);&quot;Brak Przerwy&quot;;IF(OR([.D1735]&lt;&gt;&quot;&quot;;[.E173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6]&lt;&gt;&quot;&quot;;[.E1736]&lt;&gt;&quot;&quot;);&quot;Brak Przerwy&quot;;IF(OR([.D1736]&lt;&gt;&quot;&quot;;[.E173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7]&lt;&gt;&quot;&quot;;[.E1737]&lt;&gt;&quot;&quot;);&quot;Brak Przerwy&quot;;IF(OR([.D1737]&lt;&gt;&quot;&quot;;[.E173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8]&lt;&gt;&quot;&quot;;[.E1738]&lt;&gt;&quot;&quot;);&quot;Brak Przerwy&quot;;IF(OR([.D1738]&lt;&gt;&quot;&quot;;[.E173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39]&lt;&gt;&quot;&quot;;[.E1739]&lt;&gt;&quot;&quot;);&quot;Brak Przerwy&quot;;IF(OR([.D1739]&lt;&gt;&quot;&quot;;[.E173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0]&lt;&gt;&quot;&quot;;[.E1740]&lt;&gt;&quot;&quot;);&quot;Brak Przerwy&quot;;IF(OR([.D1740]&lt;&gt;&quot;&quot;;[.E174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1]&lt;&gt;&quot;&quot;;[.E1741]&lt;&gt;&quot;&quot;);&quot;Brak Przerwy&quot;;IF(OR([.D1741]&lt;&gt;&quot;&quot;;[.E174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2]&lt;&gt;&quot;&quot;;[.E1742]&lt;&gt;&quot;&quot;);&quot;Brak Przerwy&quot;;IF(OR([.D1742]&lt;&gt;&quot;&quot;;[.E174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3]&lt;&gt;&quot;&quot;;[.E1743]&lt;&gt;&quot;&quot;);&quot;Brak Przerwy&quot;;IF(OR([.D1743]&lt;&gt;&quot;&quot;;[.E174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4]&lt;&gt;&quot;&quot;;[.E1744]&lt;&gt;&quot;&quot;);&quot;Brak Przerwy&quot;;IF(OR([.D1744]&lt;&gt;&quot;&quot;;[.E174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5]&lt;&gt;&quot;&quot;;[.E1745]&lt;&gt;&quot;&quot;);&quot;Brak Przerwy&quot;;IF(OR([.D1745]&lt;&gt;&quot;&quot;;[.E174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6]&lt;&gt;&quot;&quot;;[.E1746]&lt;&gt;&quot;&quot;);&quot;Brak Przerwy&quot;;IF(OR([.D1746]&lt;&gt;&quot;&quot;;[.E174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7]&lt;&gt;&quot;&quot;;[.E1747]&lt;&gt;&quot;&quot;);&quot;Brak Przerwy&quot;;IF(OR([.D1747]&lt;&gt;&quot;&quot;;[.E174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8]&lt;&gt;&quot;&quot;;[.E1748]&lt;&gt;&quot;&quot;);&quot;Brak Przerwy&quot;;IF(OR([.D1748]&lt;&gt;&quot;&quot;;[.E174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49]&lt;&gt;&quot;&quot;;[.E1749]&lt;&gt;&quot;&quot;);&quot;Brak Przerwy&quot;;IF(OR([.D1749]&lt;&gt;&quot;&quot;;[.E174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0]&lt;&gt;&quot;&quot;;[.E1750]&lt;&gt;&quot;&quot;);&quot;Brak Przerwy&quot;;IF(OR([.D1750]&lt;&gt;&quot;&quot;;[.E175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1]&lt;&gt;&quot;&quot;;[.E1751]&lt;&gt;&quot;&quot;);&quot;Brak Przerwy&quot;;IF(OR([.D1751]&lt;&gt;&quot;&quot;;[.E1751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2]&lt;&gt;&quot;&quot;;[.E1752]&lt;&gt;&quot;&quot;);&quot;Brak Przerwy&quot;;IF(OR([.D1752]&lt;&gt;&quot;&quot;;[.E1752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3]&lt;&gt;&quot;&quot;;[.E1753]&lt;&gt;&quot;&quot;);&quot;Brak Przerwy&quot;;IF(OR([.D1753]&lt;&gt;&quot;&quot;;[.E1753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4]&lt;&gt;&quot;&quot;;[.E1754]&lt;&gt;&quot;&quot;);&quot;Brak Przerwy&quot;;IF(OR([.D1754]&lt;&gt;&quot;&quot;;[.E1754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5]&lt;&gt;&quot;&quot;;[.E1755]&lt;&gt;&quot;&quot;);&quot;Brak Przerwy&quot;;IF(OR([.D1755]&lt;&gt;&quot;&quot;;[.E1755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6]&lt;&gt;&quot;&quot;;[.E1756]&lt;&gt;&quot;&quot;);&quot;Brak Przerwy&quot;;IF(OR([.D1756]&lt;&gt;&quot;&quot;;[.E1756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7]&lt;&gt;&quot;&quot;;[.E1757]&lt;&gt;&quot;&quot;);&quot;Brak Przerwy&quot;;IF(OR([.D1757]&lt;&gt;&quot;&quot;;[.E1757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8]&lt;&gt;&quot;&quot;;[.E1758]&lt;&gt;&quot;&quot;);&quot;Brak Przerwy&quot;;IF(OR([.D1758]&lt;&gt;&quot;&quot;;[.E1758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59]&lt;&gt;&quot;&quot;;[.E1759]&lt;&gt;&quot;&quot;);&quot;Brak Przerwy&quot;;IF(OR([.D1759]&lt;&gt;&quot;&quot;;[.E1759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style-name="ro1">
          <table:table-cell/>
          <table:table-cell table:content-validation-name="val3" table:style-name="ce1"/>
          <table:table-cell office:value-type="string" office:string-value="" table:formula="of:=IF(AND([.D1760]&lt;&gt;&quot;&quot;;[.E1760]&lt;&gt;&quot;&quot;);&quot;Brak Przerwy&quot;;IF(OR([.D1760]&lt;&gt;&quot;&quot;;[.E1760]&lt;&gt;&quot;&quot;);&quot;Przerwa&quot;;&quot;&quot;))" table:style-name="ce1"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  <table:table-row table:number-rows-repeated="1046816" table:style-name="ro1">
          <table:table-cell/>
          <table:table-cell table:content-validation-name="val3" table:style-name="ce1"/>
          <table:table-cell/>
          <table:table-cell table:content-validation-name="val2" table:style-name="ce13"/>
          <table:table-cell table:content-validation-name="val1" table:style-name="ce16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Impact" svg:font-family="Impact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6EFCE"/>
      <style:text-properties fo:color="#006100"/>
    </style:style>
    <style:style style:name="cf3" style:family="table-cell">
      <style:table-cell-properties fo:background-color="#FF0000"/>
    </style:style>
    <style:style style:name="cf4" style:family="table-cell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Patryk Gierszewski</meta:initial-creator>
    <dc:creator>Patryk Gierszewski</dc:creator>
    <meta:creation-date>2026-04-22T17:53:05Z</meta:creation-date>
    <dc:date>2026-04-22T19:15:32Z</dc:date>
  </office:meta>
</office:document-meta>
</file>